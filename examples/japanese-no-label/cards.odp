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4B094EE3D13.png" manifest:media-type="image/png"/>
  <manifest:file-entry manifest:full-path="Pictures/10000001000004B0000004B0234D5FB2.png" manifest:media-type="image/png"/>
  <manifest:file-entry manifest:full-path="Pictures/10000001000004B0000004B0738827B0.png" manifest:media-type="image/png"/>
  <manifest:file-entry manifest:full-path="Pictures/100000010000016A0000004D81DD9967.png" manifest:media-type="image/png"/>
  <manifest:file-entry manifest:full-path="Pictures/10000001000004B0000004B07085C759.png" manifest:media-type="image/png"/>
  <manifest:file-entry manifest:full-path="Pictures/1000000100000800000000971AFCD363.png" manifest:media-type="image/png"/>
  <manifest:file-entry manifest:full-path="Pictures/10000001000004B0000004B0B5B1C782.png" manifest:media-type="image/png"/>
  <manifest:file-entry manifest:full-path="Pictures/10000001000004B0000004B07872F65E.png" manifest:media-type="image/png"/>
  <manifest:file-entry manifest:full-path="Pictures/10000001000004B0000004B05B434052.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igtree" svg:font-family="Figtree"/>
    <style:font-face style:name="Figtree Medium" svg:font-family="'Figtree Medium'"/>
    <style:font-face style:name="Figtree SemiBold" svg:font-family="'Figtree SemiBol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JP" svg:font-family="'Noto Sans JP'" style:font-adornments="Medium" style:font-family-generic="swiss" style:font-pitch="variable"/>
    <style:font-face style:name="Noto Sans JP1" svg:font-family="'Noto Sans JP'" style:font-family-generic="system" style:font-pitch="variable"/>
  </office:font-face-decls>
  <office:automatic-styles>
    <style:style style:name="dp1" style:family="drawing-page">
      <style:drawing-page-properties presentation:background-visible="true" presentation:background-objects-visible="true" draw:fill="solid" draw:fill-color="#430c6b"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595959"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7f60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218832"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4477aa"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ee6677"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a93377"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loext:decorative="false"/>
    </style:style>
    <style:style style:name="pr1" style:family="presentation" style:parent-style-name="CUSTOM_5f_5-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CUSTOM-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3" style:family="presentation" style:parent-style-name="CUSTOM-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4" style:family="presentation" style:parent-style-name="CUSTOM-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CUSTOM_5f_4_5f_1_5f_1_5f_1_5f_1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6" style:family="presentation" style:parent-style-name="CUSTOM_5f_4_5f_1_5f_1_5f_1_5f_1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7"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CUSTOM_5f_4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CUSTOM_5f_3-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14" style:family="presentation" style:parent-style-name="CUSTOM_5f_3-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15" style:family="presentation" style:parent-style-name="CUSTOM_5f_3-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CUSTOM_5f_3-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CUSTOM_5f_3-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CUSTOM_5f_3-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CUSTOM_5f_3-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CUSTOM_5f_4_5f_1_5f_1_5f_1_5f_1_5f_1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21" style:family="presentation" style:parent-style-name="CUSTOM_5f_4_5f_1_5f_1_5f_1_5f_1_5f_1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22"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4" style:family="presentation" style:parent-style-name="CUSTOM_5f_4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CUSTOM_5f_2-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36" style:family="presentation" style:parent-style-name="CUSTOM_5f_2-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37"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CUSTOM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3" style:family="presentation" style:parent-style-name="CUSTOM_5f_3_5f_1-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44" style:family="presentation" style:parent-style-name="CUSTOM_5f_3_5f_1-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45"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6"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8"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0"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2"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3"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4"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5"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6" style:family="presentation" style:parent-style-name="CUSTOM_5f_3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7" style:family="presentation" style:parent-style-name="CUSTOM_5f_3_5f_2-title">
      <style:graphic-properties draw:stroke="none" svg:stroke-width="0cm" draw:fill="none" draw:textarea-vertical-align="middle" draw:auto-grow-height="false" draw:fit-to-size="false" style:shrink-to-fit="false" fo:min-height="1.152cm" fo:padding-top="0.263cm" fo:padding-bottom="0.263cm" fo:padding-left="0.263cm" fo:padding-right="0.263cm" fo:wrap-option="wrap" loext:decorative="false"/>
      <style:paragraph-properties style:writing-mode="lr-tb"/>
    </style:style>
    <style:style style:name="pr58" style:family="presentation" style:parent-style-name="CUSTOM_5f_3_5f_2-subtitle">
      <style:graphic-properties draw:stroke="none" svg:stroke-width="0cm" draw:fill="none" draw:fill-color="#ffffff" draw:textarea-vertical-align="middle" draw:auto-grow-height="false" draw:fit-to-size="false" style:shrink-to-fit="false" fo:min-height="4.001cm" fo:padding-top="0.263cm" fo:padding-bottom="0.263cm" fo:padding-left="0.263cm" fo:padding-right="0.263cm" fo:wrap-option="wrap" loext:decorative="false"/>
      <style:paragraph-properties style:writing-mode="lr-tb"/>
    </style:style>
    <style:style style:name="pr59"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0"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1"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2"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3"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4"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5"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6"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7"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8"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9" style:family="presentation" style:parent-style-name="CUSTOM_5f_3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loext:graphic-properties draw:fill="none"/>
      <style:paragraph-properties fo:text-align="left"/>
      <style:text-properties fo:font-size="18pt"/>
    </style:style>
    <style:style style:name="P2" style:family="paragraph">
      <style:paragraph-properties fo:text-align="center"/>
    </style:style>
    <style:style style:name="P3" style:family="paragraph">
      <loext:graphic-properties draw:fill="none" draw:fill-color="#ffffff"/>
      <style:paragraph-properties fo:margin-left="0cm" fo:margin-right="0cm" fo:margin-top="0cm" fo:margin-bottom="0cm" fo:line-height="100%" fo:text-align="lef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42cm" fo:margin-bottom="0.35cm" fo:line-height="100%" fo:text-align="left" fo:text-indent="0cm" loext:tab-stop-distance="0cm" style:writing-mode="lr-tb">
        <style:tab-stops>
          <style:tab-stop style:position="0cm"/>
        </style:tab-stops>
      </style:paragraph-properties>
    </style:style>
    <style:style style:name="P5" style:family="paragraph">
      <loext:graphic-properties draw:fill="none"/>
      <style:paragraph-properties fo:text-align="left" style:font-independent-line-spacing="true"/>
      <style:text-properties style:font-name="Noto Sans JP" fo:font-size="15pt" style:font-name-asian="Noto Sans JP"/>
    </style:style>
    <style:style style:name="P6" style:family="paragraph">
      <style:paragraph-properties fo:margin-left="0cm" fo:margin-right="0cm" fo:margin-top="0.1cm" fo:margin-bottom="0cm" fo:line-height="100%" fo:text-align="left" fo:text-indent="0cm" loext:tab-stop-distance="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1cm" fo:margin-bottom="0cm" fo:line-height="100%" fo:text-align="left" fo:text-indent="0cm" loext:tab-stop-distance="0cm" style:font-independent-line-spacing="true">
        <style:tab-stops>
          <style:tab-stop style:position="0cm"/>
        </style:tab-stops>
      </style:paragraph-properties>
      <style:text-properties style:font-name="Noto Sans JP" fo:font-size="10pt" style:font-size-asian="10pt" style:font-size-complex="10pt"/>
    </style:style>
    <style:style style:name="P8" style:family="paragraph">
      <style:paragraph-properties fo:margin-left="0cm" fo:margin-right="0cm" fo:margin-top="0cm" fo:margin-bottom="0.4cm" fo:line-height="100%" fo:text-align="left" fo:text-indent="0cm" loext:tab-stop-distance="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4cm" fo:line-height="100%" fo:text-align="left" fo:text-indent="0cm" loext:tab-stop-distance="0cm" style:font-independent-line-spacing="true">
        <style:tab-stops>
          <style:tab-stop style:position="0cm"/>
        </style:tab-stops>
      </style:paragraph-properties>
      <style:text-properties style:font-name="Noto Sans JP" fo:font-size="8pt" style:font-name-asian="Noto Sans JP" style:font-size-asian="8pt" style:font-size-complex="8pt"/>
    </style:style>
    <style:style style:name="P10" style:family="paragraph">
      <loext:graphic-properties draw:fill="none"/>
      <style:paragraph-properties fo:text-align="left" style:font-independent-line-spacing="true"/>
      <style:text-properties style:font-name="Noto Sans JP" fo:font-size="15pt"/>
    </style:style>
    <style:style style:name="P11" style:family="paragraph">
      <loext:graphic-properties draw:fill="none" draw:fill-color="#ffffff"/>
      <style:paragraph-properties fo:margin-left="0cm" fo:margin-right="0cm" fo:margin-top="0.42cm" fo:margin-bottom="0.35cm" fo:line-height="100%" fo:text-align="left" fo:text-indent="0cm" loext:tab-stop-distance="0cm" style:font-independent-line-spacing="true">
        <style:tab-stops>
          <style:tab-stop style:position="0cm"/>
        </style:tab-stops>
      </style:paragraph-properties>
      <style:text-properties style:font-name="Noto Sans JP" fo:font-size="9pt" style:font-name-asian="Noto Sans JP" style:font-size-asian="9pt" style:font-size-complex="9pt"/>
    </style:style>
    <style:style style:name="P12" style:family="paragraph">
      <style:paragraph-properties fo:margin-left="0cm" fo:margin-right="0cm" fo:margin-top="0cm" fo:margin-bottom="0.35cm" fo:line-height="100%" fo:text-align="left" fo:text-indent="0cm" loext:tab-stop-distance="0cm" style:writing-mode="lr-tb">
        <style:tab-stops>
          <style:tab-stop style:position="0cm"/>
        </style:tab-stops>
      </style:paragraph-properties>
    </style:style>
    <style:style style:name="P13" style:family="paragraph">
      <loext:graphic-properties draw:fill="none" draw:fill-color="#ffffff"/>
      <style:paragraph-properties fo:margin-left="0cm" fo:margin-right="0cm" fo:margin-top="0cm" fo:margin-bottom="0.35cm" fo:line-height="100%" fo:text-align="left" fo:text-indent="0cm" loext:tab-stop-distance="0cm" style:font-independent-line-spacing="true">
        <style:tab-stops>
          <style:tab-stop style:position="0cm"/>
        </style:tab-stops>
      </style:paragraph-properties>
      <style:text-properties fo:color="#000000" loext:opacity="100%" style:font-name="Noto Sans JP" fo:font-size="9pt" style:font-name-asian="Noto Sans JP" style:font-size-asian="9pt" style:font-size-complex="9pt"/>
    </style:style>
    <style:style style:name="P14" style:family="paragraph">
      <loext:graphic-properties draw:fill="none" draw:fill-color="#ffffff"/>
      <style:paragraph-properties fo:margin-left="0cm" fo:margin-right="0cm" fo:margin-top="0cm" fo:margin-bottom="0cm" fo:line-height="100%" fo:text-align="left" fo:text-indent="0cm" loext:tab-stop-distance="0cm" style:font-independent-line-spacing="true">
        <style:tab-stops>
          <style:tab-stop style:position="0cm"/>
        </style:tab-stops>
      </style:paragraph-properties>
      <style:text-properties fo:color="#000000" loext:opacity="100%" style:font-name="Noto Sans JP" fo:font-size="9pt" style:font-name-asian="Noto Sans JP" style:font-size-asian="9pt" style:font-size-complex="9pt"/>
    </style:style>
    <style:style style:name="P15" style:family="paragraph">
      <loext:graphic-properties draw:fill="none"/>
      <style:paragraph-properties fo:text-align="left" style:font-independent-line-spacing="true"/>
      <style:text-properties style:font-name="Noto Sans JP" fo:font-size="13pt" style:font-name-asian="Noto Sans JP" style:font-size-asian="13pt" style:font-size-complex="13pt"/>
    </style:style>
    <style:style style:name="P16" style:family="paragraph">
      <loext:graphic-properties draw:fill="none" draw:fill-color="#ffffff"/>
      <style:paragraph-properties fo:margin-top="0cm" fo:margin-bottom="0.35cm" fo:text-align="left" style:font-independent-line-spacing="true"/>
      <style:text-properties style:font-name="Noto Sans JP" fo:font-size="9pt" style:font-name-asian="Noto Sans JP" style:font-size-asian="9pt" style:font-size-complex="9pt"/>
    </style:style>
    <style:style style:name="P17" style:family="paragraph">
      <loext:graphic-properties draw:fill="none" draw:fill-color="#ffffff"/>
      <style:paragraph-properties fo:text-align="left" style:font-independent-line-spacing="true"/>
      <style:text-properties style:font-name="Noto Sans JP" fo:font-size="9pt" style:font-name-asian="Noto Sans JP" style:font-size-asian="9pt" style:font-size-complex="9pt"/>
    </style:style>
    <style:style style:name="P18" style:family="paragraph">
      <loext:graphic-properties draw:fill="none"/>
      <style:paragraph-properties fo:text-align="left" style:font-independent-line-spacing="true"/>
      <style:text-properties style:font-name="Noto Sans JP" fo:font-size="14pt" style:font-name-asian="Noto Sans JP" style:font-size-asian="14pt" style:font-size-complex="14pt"/>
    </style:style>
    <style:style style:name="P19" style:family="paragraph">
      <style:paragraph-properties fo:margin-left="0cm" fo:margin-right="0cm" fo:margin-top="0cm" fo:margin-bottom="0cm" fo:line-height="100%" fo:text-align="left" fo:text-indent="0cm" loext:tab-stop-distance="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Noto Sans JP" fo:font-size="15pt" fo:letter-spacing="normal" fo:font-style="normal" style:text-underline-style="none" fo:font-weight="normal" style:font-name-asian="Noto Sans JP" style:font-size-asian="15pt" style:font-style-asian="normal" style:font-weight-asian="normal" style:font-name-complex="Figtree Medium" style:font-size-complex="15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Noto Sans JP" fo:font-size="7pt" fo:letter-spacing="normal" fo:font-style="normal" style:text-underline-style="none" fo:font-weight="bold" style:font-name-asian="Figtree" style:font-size-asian="7pt" style:font-style-asian="normal" style:font-weight-asian="bold" style:font-name-complex="Figtree" style:font-size-complex="7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 JP" fo:font-size="8pt" fo:letter-spacing="normal" fo:font-style="normal" style:text-underline-style="none" fo:font-weight="bold" style:font-name-asian="Noto Sans JP" style:font-size-asian="8pt" style:font-style-asian="normal" style:font-weight-asian="bold" style:font-name-complex="Figtree" style:font-size-complex="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Noto Sans JP" fo:font-size="15pt" fo:letter-spacing="normal" style:text-underline-style="none" fo:font-weight="normal" style:font-name-asian="Figtree Medium" style:font-size-asian="15pt" style:font-weight-asian="normal" style:font-name-complex="Figtree Medium" style:font-size-complex="15pt" style:font-weight-complex="normal"/>
    </style:style>
    <style:style style:name="T5" style:family="text">
      <style:text-properties fo:font-variant="normal" fo:text-transform="none" fo:color="#000000" loext:opacity="100%" style:text-line-through-style="none" style:text-line-through-type="none" style:text-position="0% 100%" style:font-name="Noto Sans JP" fo:font-size="8pt" fo:letter-spacing="normal" style:text-underline-style="none" fo:font-weight="normal" style:font-name-asian="Figtree Medium" style:font-size-asian="8pt" style:font-weight-asian="normal" style:font-name-complex="Figtree Medium" style:font-size-complex="8pt" style:font-weight-complex="normal"/>
    </style:style>
    <style:style style:name="T6" style:family="text">
      <style:text-properties fo:font-variant="normal" fo:text-transform="none" fo:color="#000000" loext:opacity="100%" style:text-line-through-style="none" style:text-line-through-type="none" style:text-position="0% 100%" style:font-name="Noto Sans JP" fo:font-size="8pt" fo:letter-spacing="normal" style:text-underline-style="none" fo:font-weight="normal" style:font-name-asian="Noto Sans JP" style:font-size-asian="8pt" style:font-weight-asian="normal" style:font-name-complex="Figtree Medium" style:font-size-complex="8pt" style:font-weight-complex="normal"/>
    </style:style>
    <style:style style:name="T7" style:family="text">
      <style:text-properties fo:font-variant="normal" fo:text-transform="none" fo:color="#000000" loext:opacity="100%" style:text-line-through-style="none" style:text-line-through-type="none" style:text-position="0% 100%" style:font-name="Noto Sans JP" fo:font-size="9pt" fo:letter-spacing="normal" fo:font-style="normal" style:text-underline-style="none" fo:font-weight="normal" style:font-name-asian="Noto Sans JP" style:font-size-asian="9pt" style:font-style-asian="normal" style:font-weight-asian="normal" style:font-name-complex="Figtree" style:font-size-complex="9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Noto Sans JP" fo:font-size="15pt" fo:letter-spacing="normal" fo:font-style="normal" style:text-underline-style="none" fo:font-weight="normal" style:font-name-asian="Noto Sans JP" style:font-size-asian="15pt" style:font-style-asian="normal" style:font-weight-asian="normal" style:font-name-complex="Figtree Medium" style:font-size-complex="1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 JP" fo:font-size="13pt" fo:letter-spacing="normal" fo:font-style="normal" style:text-underline-style="none" fo:font-weight="normal" style:font-name-asian="Noto Sans JP" style:font-size-asian="13pt" style:font-style-asian="normal" style:font-weight-asian="normal" style:font-name-complex="Figtree Medium" style:font-size-complex="13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Noto Sans JP" fo:font-size="9pt" fo:letter-spacing="normal" fo:font-style="normal" style:text-underline-style="none" fo:font-weight="bold" style:font-name-asian="Noto Sans JP" style:font-size-asian="9pt" style:font-style-asian="normal" style:font-weight-asian="bold" style:font-name-complex="Figtree" style:font-size-complex="9pt" style:font-style-complex="normal" style:font-weight-complex="bold"/>
    </style:style>
    <style:style style:name="T11" style:family="text">
      <style:text-properties fo:font-variant="normal" fo:text-transform="none" style:text-line-through-style="none" style:text-line-through-type="none" style:text-position="0% 100%" style:font-name="Noto Sans JP" fo:font-size="9pt" fo:letter-spacing="normal" fo:font-style="normal" style:text-underline-style="none" fo:font-weight="normal" style:font-name-asian="Noto Sans JP" style:font-size-asian="9pt" style:font-style-asian="normal" style:font-weight-asian="normal" style:font-name-complex="Figtree"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Noto Sans JP" fo:font-size="15pt" fo:letter-spacing="normal" fo:font-style="normal" style:text-underline-style="none" fo:font-weight="normal" style:font-name-asian="Figtree Medium" style:font-size-asian="15pt" style:font-style-asian="normal" style:font-weight-asian="normal" style:font-name-complex="Figtree Medium" style:font-size-complex="15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Noto Sans JP" fo:font-size="14pt" fo:letter-spacing="normal" fo:font-style="normal" style:text-underline-style="none" fo:font-weight="normal" style:font-name-asian="Noto Sans JP" style:font-size-asian="14pt" style:font-style-asian="normal" style:font-weight-asian="normal" style:font-name-complex="Figtree Medium"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5f_5" presentation:presentation-page-layout-name="AL1T0">
        <draw:frame draw:name="Google Shape;57;p10" draw:style-name="gr1" draw:text-style-name="P1" draw:layer="layout" svg:width="3.417cm" svg:height="3.417cm" svg:x="3.041cm" svg:y="0.897cm">
          <draw:image xlink:href="Pictures/10000001000004B0000004B094EE3D13.png" xlink:type="simple" xlink:show="embed" xlink:actuate="onLoad" draw:mime-type="image/png">
            <text:p/>
          </draw:image>
        </draw:frame>
        <draw:frame draw:style-name="gr2" draw:text-style-name="P2" draw:layer="layout" svg:width="3.875cm" svg:height="0.824cm" svg:x="2.825cm" svg:y="4.599cm">
          <draw:image xlink:href="Pictures/100000010000016A0000004D81DD9967.png" xlink:type="simple" xlink:show="embed" xlink:actuate="onLoad" draw:mime-type="image/png">
            <text:p/>
          </draw:image>
        </draw:frame>
        <presentation:notes draw:style-name="dp2">
          <draw:page-thumbnail draw:name="Google Shape;51;g33a83a7ceef_1_3:notes" draw:style-name="gr3" draw:layer="layout" svg:width="13.112cm" svg:height="9.524cm" svg:x="2.969cm" svg:y="1.905cm" draw:page-number="1" presentation:class="page"/>
          <draw:frame draw:name="Google Shape;52;g33a83a7ceef_1_3:notes" presentation:style-name="pr1" draw:text-style-name="P3" draw:layer="layout" svg:width="15.239cm" svg:height="11.429cm" svg:x="1.905cm" svg:y="12.065cm" presentation:class="notes" presentation:placeholder="true" presentation:user-transformed="true">
            <draw:text-box/>
          </draw:frame>
        </presentation:notes>
      </draw:page>
      <draw:page draw:name="Background" draw:style-name="dp1" draw:master-page-name="CUSTOM">
        <draw:frame draw:name="Google Shape;62;p11" presentation:style-name="pr2" draw:text-style-name="P5" draw:layer="layout" svg:width="8.548cm" svg:height="0.813cm" svg:x="0.427cm" svg:y="1.31cm" presentation:class="title" presentation:user-transformed="true">
          <draw:text-box>
            <text:p text:style-name="P4"><text:span text:style-name="T1">背景</text:span></text:p>
          </draw:text-box>
        </draw:frame>
        <draw:frame draw:name="Google Shape;63;p11" presentation:style-name="pr3" draw:text-style-name="P7" draw:layer="layout" svg:width="8.548cm" svg:height="4.4cm" svg:x="0.427cm" svg:y="2.173cm" presentation:class="subtitle" presentation:user-transformed="true">
          <draw:text-box>
            <text:p text:style-name="P6"><text:span text:style-name="T2">効果的な内部開発者プラットフォームは、事業拡大に伴い、業務のスピードアップ、安全性の向上、そして効率化を実現します。</text:span></text:p>
            <text:p text:style-name="P6"><text:span text:style-name="T2">効果的なプラットフォームを構築するには、以下の</text:span><text:span text:style-name="T2">3</text:span><text:span text:style-name="T2">つの基本原則を取り入れる必要があります：</text:span></text:p>
            <text:p text:style-name="P6"><text:span text:style-name="T2">1. </text:span><text:span text:style-name="T2">セルフサービスとオンデマンドアクセス</text:span></text:p>
            <text:p text:style-name="P6"><text:span text:style-name="T2">2. </text:span><text:span text:style-name="T2">一貫して適用されるビジネスプロセス</text:span></text:p>
            <text:p text:style-name="P6"><text:span text:style-name="T2">3. </text:span><text:span text:style-name="T2">大規模なサービス群の管理</text:span></text:p>
            <text:p text:style-name="P6"><text:span text:style-name="T2">内部開発者プラットフォームは、共通サービスを提供することで、これらを実現し、さらに多くの機能を提供します。このカードデッキを活用して、プラットフォームの基本原則をすべて満たす独自のサービスを設計してください。</text:span></text:p>
          </draw:text-box>
        </draw:frame>
        <draw:custom-shape draw:name="Google Shape;64;p11"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59;g2af853010e1_0_711:notes" draw:style-name="gr3" draw:layer="layout" svg:width="13.112cm" svg:height="9.524cm" svg:x="2.969cm" svg:y="1.905cm" draw:page-number="2" presentation:class="page"/>
          <draw:frame draw:name="Google Shape;60;g2af853010e1_0_711:notes" presentation:style-name="pr4" draw:text-style-name="P3" draw:layer="layout" svg:width="15.239cm" svg:height="11.429cm" svg:x="1.905cm" svg:y="12.065cm" presentation:class="notes" presentation:placeholder="true" presentation:user-transformed="true">
            <draw:text-box/>
          </draw:frame>
        </presentation:notes>
      </draw:page>
      <draw:page draw:name="Interfaces explained" draw:style-name="dp3" draw:master-page-name="CUSTOM_5f_4_5f_1_5f_1_5f_1_5f_1_5f_1">
        <draw:frame draw:name="Google Shape;70;p12" presentation:style-name="pr5" draw:text-style-name="P5" draw:layer="layout" svg:width="8.548cm" svg:height="0.813cm" svg:x="0.427cm" svg:y="1.31cm" presentation:class="title" presentation:user-transformed="true">
          <draw:text-box>
            <text:p text:style-name="P4"><text:span text:style-name="T1">インターフェースの説明</text:span></text:p>
          </draw:text-box>
        </draw:frame>
        <draw:frame draw:name="Google Shape;71;p12" presentation:style-name="pr6" draw:text-style-name="P9" draw:layer="layout" svg:width="8.548cm" svg:height="4.346cm" svg:x="0.427cm" svg:y="2.173cm" presentation:class="subtitle" presentation:user-transformed="true">
          <draw:text-box>
            <text:p text:style-name="P8"><text:span text:style-name="T3">インターフェースにより、ユーザーはプラットフォームの機能を作成、更新、削除、保守、および確認することができます。</text:span></text:p>
            <text:p text:style-name="P8"><text:span text:style-name="T3">プラットフォームにアクセスする唯一の正しい方法というものは存在しません。スクリプトが必要なタスクもあれば、視覚化に依存するタスクもあり、それぞれ異なるインターフェースを必要とします。</text:span></text:p>
            <text:p text:style-name="P8"><text:span text:style-name="T3">重要なのは、最小限のメンテナンスで、プラットフォームがあらゆる種類のインターフェースに対応できるようにすることです。</text:span></text:p>
          </draw:text-box>
        </draw:frame>
        <draw:custom-shape draw:name="Google Shape;72;p12"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67;g33a37bdba7f_0_83:notes" draw:style-name="gr3" draw:layer="layout" svg:width="13.112cm" svg:height="9.524cm" svg:x="2.969cm" svg:y="1.905cm" draw:page-number="3" presentation:class="page"/>
          <draw:frame draw:name="Google Shape;68;g33a37bdba7f_0_83:notes" presentation:style-name="pr7" draw:text-style-name="P3" draw:layer="layout" svg:width="15.239cm" svg:height="11.429cm" svg:x="1.905cm" svg:y="12.065cm" presentation:class="notes" presentation:placeholder="true" presentation:user-transformed="true">
            <draw:text-box/>
          </draw:frame>
        </presentation:notes>
      </draw:page>
      <draw:page draw:name="API (default)" draw:style-name="dp4" draw:master-page-name="CUSTOM_5f_4_5f_1_5f_1_5f_1_5f_1_5f_1">
        <draw:frame draw:name="Google Shape;77;p13" presentation:style-name="pr5" draw:text-style-name="P10" draw:layer="layout" svg:width="8.548cm" svg:height="0.813cm" svg:x="0.427cm" svg:y="1.31cm" presentation:class="title" presentation:user-transformed="true">
          <draw:text-box>
            <text:p text:style-name="P4"><text:span text:style-name="T4">API</text:span><text:span text:style-name="T5"> (</text:span><text:span text:style-name="T6">デフォルト</text:span><text:span text:style-name="T5">)</text:span></text:p>
          </draw:text-box>
        </draw:frame>
        <draw:frame draw:name="Google Shape;78;p13" presentation:style-name="pr6" draw:text-style-name="P11" draw:layer="layout" svg:width="8.548cm" svg:height="4.346cm" svg:x="0.427cm" svg:y="2.173cm" presentation:class="subtitle" presentation:user-transformed="true">
          <draw:text-box>
            <text:p text:style-name="P4"><text:span text:style-name="T7">今日のあらゆる最新プラットフォームは、強力な</text:span><text:span text:style-name="T7">API</text:span><text:span text:style-name="T7">を基盤とし、その上に追加のインターフェースを構築しています。例えば、クラウドプロバイダーは</text:span><text:span text:style-name="T7">API</text:span><text:span text:style-name="T7">を基盤とし、さまざまなユースケースに対応するために</text:span><text:span text:style-name="T7">CLI</text:span><text:span text:style-name="T7">や</text:span><text:span text:style-name="T7">GUI</text:span><text:span text:style-name="T7">へと拡張しています。</text:span></text:p>
            <text:p text:style-name="P4"><text:span text:style-name="T7">したがって、このインターフェースは「デフォルト」と見なされ、常にインターフェースのセクションに含める必要があります。</text:span></text:p>
          </draw:text-box>
        </draw:frame>
        <presentation:notes draw:style-name="dp2">
          <draw:page-thumbnail draw:name="Google Shape;74;g33bb146551b_0_8:notes" draw:style-name="gr3" draw:layer="layout" svg:width="13.112cm" svg:height="9.524cm" svg:x="2.969cm" svg:y="1.905cm" draw:page-number="4" presentation:class="page"/>
          <draw:frame draw:name="Google Shape;75;g33bb146551b_0_8:notes" presentation:style-name="pr8" draw:text-style-name="P3" draw:layer="layout" svg:width="15.239cm" svg:height="11.429cm" svg:x="1.905cm" svg:y="12.065cm" presentation:class="notes" presentation:placeholder="true" presentation:user-transformed="true">
            <draw:text-box/>
          </draw:frame>
        </presentation:notes>
      </draw:page>
      <draw:page draw:name="Portal" draw:style-name="dp4" draw:master-page-name="CUSTOM_5f_4_5f_1_5f_1_5f_1_5f_1_5f_1">
        <draw:frame draw:name="Google Shape;83;p14" presentation:style-name="pr5" draw:text-style-name="P5" draw:layer="layout" svg:width="8.548cm" svg:height="0.813cm" svg:x="0.427cm" svg:y="1.31cm" presentation:class="title" presentation:user-transformed="true">
          <draw:text-box>
            <text:p text:style-name="P4"><text:span text:style-name="T8">ポータル</text:span></text:p>
          </draw:text-box>
        </draw:frame>
        <draw:frame draw:name="Google Shape;84;p14" presentation:style-name="pr6" draw:text-style-name="P13" draw:layer="layout" svg:width="8.548cm" svg:height="4.346cm" svg:x="0.427cm" svg:y="2.173cm" presentation:class="subtitle" presentation:user-transformed="true">
          <draw:text-box>
            <text:p text:style-name="P12"><text:span text:style-name="T7">多くの場合、プラットフォームのサービスやリソースの一覧を表示するブラウザベース（</text:span><text:span text:style-name="T7">GUI</text:span><text:span text:style-name="T7">）のインターフェースです。</text:span></text:p>
            <text:p text:style-name="P12"><text:span text:style-name="T7">ポータルは、カスタム構築されたセルフホスト型プロジェクト（例：人気の</text:span><text:span text:style-name="T7">CNCF</text:span><text:span text:style-name="T7">プロジェクト「</text:span><text:span text:style-name="T7">Backstage</text:span><text:span text:style-name="T7">」）や、</text:span><text:span text:style-name="T7">SaaS</text:span><text:span text:style-name="T7">製品（例：</text:span><text:span text:style-name="T7">Port</text:span><text:span text:style-name="T7">、</text:span><text:span text:style-name="T7">Cortex</text:span><text:span text:style-name="T7">、</text:span><text:span text:style-name="T7">Roadie</text:span><text:span text:style-name="T7">）として提供されています。</text:span></text:p>
            <text:p text:style-name="P12"><text:span text:style-name="T7">ポータルの設定やデータはプラットフォームに直接依存するため、オーバーヘッドを削減するには、プラットフォーム自体によって管理されるべきです。</text:span></text:p>
          </draw:text-box>
        </draw:frame>
        <presentation:notes draw:style-name="dp2">
          <draw:page-thumbnail draw:name="Google Shape;80;g2af853010e1_0_696:notes" draw:style-name="gr3" draw:layer="layout" svg:width="13.112cm" svg:height="9.524cm" svg:x="2.969cm" svg:y="1.905cm" draw:page-number="5" presentation:class="page"/>
          <draw:frame draw:name="Google Shape;81;g2af853010e1_0_696:notes" presentation:style-name="pr9" draw:text-style-name="P3" draw:layer="layout" svg:width="15.239cm" svg:height="11.429cm" svg:x="1.905cm" svg:y="12.065cm" presentation:class="notes" presentation:placeholder="true" presentation:user-transformed="true">
            <draw:text-box/>
          </draw:frame>
        </presentation:notes>
      </draw:page>
      <draw:page draw:name="Ticketing System" draw:style-name="dp4" draw:master-page-name="CUSTOM_5f_4_5f_1_5f_1_5f_1_5f_1_5f_1">
        <draw:frame draw:name="Google Shape;89;p15" presentation:style-name="pr5" draw:text-style-name="P5" draw:layer="layout" svg:width="8.548cm" svg:height="0.813cm" svg:x="0.427cm" svg:y="1.31cm" presentation:class="title" presentation:user-transformed="true">
          <draw:text-box>
            <text:p text:style-name="P4"><text:span text:style-name="T8">チケット管理システム</text:span></text:p>
          </draw:text-box>
        </draw:frame>
        <draw:frame draw:name="Google Shape;90;p15" presentation:style-name="pr6" draw:text-style-name="P14" draw:layer="layout" svg:width="8.548cm" svg:height="4.346cm" svg:x="0.427cm" svg:y="2.173cm" presentation:class="subtitle" presentation:user-transformed="true">
          <draw:text-box>
            <text:p text:style-name="P4"><text:span text:style-name="T7">チケット管理システムといえば、長い待ち時間や手作業を連想しがちですが、組織のユーザー体験や追跡メカニズムの中核をなすことも少なくありません。</text:span></text:p>
            <text:p text:style-name="P4"><text:span text:style-name="T7">Jira</text:span><text:span text:style-name="T7">や</text:span><text:span text:style-name="T7">ServiceNow</text:span><text:span text:style-name="T7">などの既存ツールを通じてプラットフォームを連携させることで、ユーザー体験や追跡メカニズムを維持しつつ、手作業をオンデマンド型のサービスに置き換えることが可能です。</text:span></text:p>
          </draw:text-box>
        </draw:frame>
        <presentation:notes draw:style-name="dp2">
          <draw:page-thumbnail draw:name="Google Shape;86;g33a83a7ceef_0_0:notes" draw:style-name="gr3" draw:layer="layout" svg:width="13.112cm" svg:height="9.524cm" svg:x="2.969cm" svg:y="1.905cm" draw:page-number="6" presentation:class="page"/>
          <draw:frame draw:name="Google Shape;87;g33a83a7ceef_0_0:notes" presentation:style-name="pr10" draw:text-style-name="P3" draw:layer="layout" svg:width="15.239cm" svg:height="11.429cm" svg:x="1.905cm" svg:y="12.065cm" presentation:class="notes" presentation:placeholder="true" presentation:user-transformed="true">
            <draw:text-box/>
          </draw:frame>
        </presentation:notes>
      </draw:page>
      <draw:page draw:name="Command Line Interface (CLI)" draw:style-name="dp4" draw:master-page-name="CUSTOM_5f_4_5f_1_5f_1_5f_1_5f_1_5f_1">
        <draw:frame draw:name="Google Shape;95;p16" presentation:style-name="pr5" draw:text-style-name="P15" draw:layer="layout" svg:width="8.548cm" svg:height="0.813cm" svg:x="0.427cm" svg:y="1.31cm" presentation:class="title" presentation:user-transformed="true">
          <draw:text-box>
            <text:p text:style-name="P4"><text:span text:style-name="T9">コマンドラインインターフェース </text:span><text:span text:style-name="T9">(CLI)</text:span></text:p>
          </draw:text-box>
        </draw:frame>
        <draw:frame draw:name="Google Shape;96;p16" presentation:style-name="pr6" draw:text-style-name="P14" draw:layer="layout" svg:width="8.548cm" svg:height="4.346cm" svg:x="0.427cm" svg:y="2.173cm" presentation:class="subtitle" presentation:user-transformed="true">
          <draw:text-box>
            <text:p text:style-name="P4"><text:span text:style-name="T7">CLI</text:span><text:span text:style-name="T7">を利用することで、ターミナルベースのプラットフォーム操作が可能になります。これはエンジニアにとって好まれる方法であるだけでなく、ブラウザにアクセスできない</text:span><text:span text:style-name="T7">CI/CD</text:span><text:span text:style-name="T7">スクリプトなどの一部のタスクにおいては必須条件となることもあります。</text:span></text:p>
            <text:p text:style-name="P4"><text:span text:style-name="T7">CLI</text:span><text:span text:style-name="T7">の設定やデータはプラットフォームに直接依存するため、オーバーヘッドを軽減するには、プラットフォーム自体によって管理されるべきです。</text:span></text:p>
          </draw:text-box>
        </draw:frame>
        <presentation:notes draw:style-name="dp2">
          <draw:page-thumbnail draw:name="Google Shape;92;g33a83a7ceef_0_10:notes" draw:style-name="gr3" draw:layer="layout" svg:width="13.112cm" svg:height="9.524cm" svg:x="2.969cm" svg:y="1.905cm" draw:page-number="7" presentation:class="page"/>
          <draw:frame draw:name="Google Shape;93;g33a83a7ceef_0_10:notes" presentation:style-name="pr11" draw:text-style-name="P3" draw:layer="layout" svg:width="15.239cm" svg:height="11.429cm" svg:x="1.905cm" svg:y="12.065cm" presentation:class="notes" presentation:placeholder="true" presentation:user-transformed="true">
            <draw:text-box/>
          </draw:frame>
        </presentation:notes>
      </draw:page>
      <draw:page draw:name="Integrated Developer Env (IDE)" draw:style-name="dp4" draw:master-page-name="CUSTOM_5f_4_5f_1_5f_1_5f_1_5f_1_5f_1">
        <draw:frame draw:name="Google Shape;101;p17" presentation:style-name="pr5" draw:text-style-name="P5" draw:layer="layout" svg:width="8.548cm" svg:height="0.813cm" svg:x="0.427cm" svg:y="1.31cm" presentation:class="title" presentation:user-transformed="true">
          <draw:text-box>
            <text:p text:style-name="P4"><text:span text:style-name="T8">統合開発環境 </text:span><text:span text:style-name="T8">(IDE)</text:span></text:p>
          </draw:text-box>
        </draw:frame>
        <draw:frame draw:name="Google Shape;102;p17" presentation:style-name="pr6" draw:text-style-name="P14" draw:layer="layout" svg:width="8.548cm" svg:height="4.346cm" svg:x="0.427cm" svg:y="2.173cm" presentation:class="subtitle" presentation:user-transformed="true">
          <draw:text-box>
            <text:p text:style-name="P4"><text:span text:style-name="T7">開発者は、グラフィカルな環境（</text:span><text:span text:style-name="T7">JetBrains</text:span><text:span text:style-name="T7">や</text:span><text:span text:style-name="T7">VSCode</text:span><text:span text:style-name="T7">など）であれ、ターミナル環境（</text:span><text:span text:style-name="T7">VIM</text:span><text:span text:style-name="T7">や</text:span><text:span text:style-name="T7">Neo</text:span><text:span text:style-name="T7">など）であれ、</text:span><text:span text:style-name="T7">IDE</text:span><text:span text:style-name="T7">上で</text:span><text:span text:style-name="T7">AI</text:span><text:span text:style-name="T7">やコードを扱うことがよくあります。</text:span></text:p>
            <text:p text:style-name="P4"><text:span text:style-name="T7">プラットフォームは、あらゆる</text:span><text:span text:style-name="T7">IDE</text:span><text:span text:style-name="T7">向けに</text:span><text:span text:style-name="T7">MCP</text:span><text:span text:style-name="T7">サーバーやプラグインを提供することで、より迅速なフィードバックや、ツールや開発環境への容易なアクセスを可能にします。</text:span></text:p>
          </draw:text-box>
        </draw:frame>
        <presentation:notes draw:style-name="dp2">
          <draw:page-thumbnail draw:name="Google Shape;98;g33bb146551b_0_3:notes" draw:style-name="gr3" draw:layer="layout" svg:width="13.112cm" svg:height="9.524cm" svg:x="2.969cm" svg:y="1.905cm" draw:page-number="8" presentation:class="page"/>
          <draw:frame draw:name="Google Shape;99;g33bb146551b_0_3:notes" presentation:style-name="pr12" draw:text-style-name="P3" draw:layer="layout" svg:width="15.239cm" svg:height="11.429cm" svg:x="1.905cm" svg:y="12.065cm" presentation:class="notes" presentation:placeholder="true" presentation:user-transformed="true">
            <draw:text-box/>
          </draw:frame>
        </presentation:notes>
      </draw:page>
      <draw:page draw:name="Destinations explained" draw:style-name="dp5" draw:master-page-name="CUSTOM_5f_3">
        <draw:frame draw:name="Google Shape;107;p18" presentation:style-name="pr13" draw:text-style-name="P5" draw:layer="layout" svg:width="8.548cm" svg:height="0.813cm" svg:x="0.427cm" svg:y="1.31cm" presentation:class="title" presentation:user-transformed="true">
          <draw:text-box>
            <text:p text:style-name="P4"><text:span text:style-name="T1">デプロイ先の説明</text:span></text:p>
          </draw:text-box>
        </draw:frame>
        <draw:frame draw:name="Google Shape;108;p18" presentation:style-name="pr14" draw:text-style-name="P16" draw:layer="layout" svg:width="8.548cm" svg:height="4.346cm" svg:x="0.427cm" svg:y="2.173cm" presentation:class="subtitle" presentation:user-transformed="true">
          <draw:text-box>
            <text:p text:style-name="P12"><text:span text:style-name="T10">デプロイ先とは、宣言型コードのデプロイをスケジュールできる場所のことです。</text:span></text:p>
            <text:p text:style-name="P12"><text:span text:style-name="T10">プラットフォームには多数のデプロイ先が存在します。各デプロイ先は、</text:span><text:span text:style-name="T10">GitOps</text:span><text:span text:style-name="T10">やその他のデプロイプロセスを通じて宣言型コードを適用できるターゲットロケーションを指します。</text:span></text:p>
            <text:p text:style-name="P12"><text:span text:style-name="T10">デプロイ先の種類は、技術の種類、環境、所有権モデルなどによって範囲を定義できるため、その数は無数にあります。</text:span></text:p>
          </draw:text-box>
        </draw:frame>
        <draw:custom-shape draw:name="Google Shape;109;p18"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104;g2af853010e1_0_137:notes" draw:style-name="gr3" draw:layer="layout" svg:width="13.112cm" svg:height="9.524cm" svg:x="2.969cm" svg:y="1.905cm" draw:page-number="9" presentation:class="page"/>
          <draw:frame draw:name="Google Shape;105;g2af853010e1_0_137:notes" presentation:style-name="pr15" draw:text-style-name="P3" draw:layer="layout" svg:width="15.239cm" svg:height="11.429cm" svg:x="1.905cm" svg:y="12.065cm" presentation:class="notes" presentation:placeholder="true" presentation:user-transformed="true">
            <draw:text-box/>
          </draw:frame>
        </presentation:notes>
      </draw:page>
      <draw:page draw:name="Kubernetes cluster" draw:style-name="dp4" draw:master-page-name="CUSTOM_5f_3">
        <draw:frame draw:name="Google Shape;114;p19" presentation:style-name="pr13" draw:text-style-name="P5" draw:layer="layout" svg:width="8.774cm" svg:height="0.813cm" svg:x="0.427cm" svg:y="1.31cm" presentation:class="title" presentation:user-transformed="true">
          <draw:text-box>
            <text:p text:style-name="P4"><text:span text:style-name="T8">Kubernetes </text:span><text:span text:style-name="T8">クラスタ</text:span></text:p>
          </draw:text-box>
        </draw:frame>
        <draw:frame draw:name="Google Shape;115;p19" presentation:style-name="pr14" draw:text-style-name="P17" draw:layer="layout" svg:width="8.548cm" svg:height="4.346cm" svg:x="0.427cm" svg:y="2.173cm" presentation:class="subtitle" presentation:user-transformed="true">
          <draw:text-box>
            <text:p text:style-name="P4"><text:span text:style-name="T11">クラスタの数だけデプロイ先を設定できます。それぞれのデプロイ先は、そのユースケースに適したセキュリティレベルとスケーラビリティに合わせて構成されます。</text:span></text:p>
            <text:p text:style-name="P4"><text:span text:style-name="T11">各デプロイ先には、環境（開発／本番）、タイプ（</text:span><text:span text:style-name="T11">GPU</text:span><text:span text:style-name="T11">、</text:span><text:span text:style-name="T11">PCI</text:span><text:span text:style-name="T11">準拠）、または組織内でクラスタを分類するために用いるその他のドメインモデルを指定できます。</text:span></text:p>
          </draw:text-box>
        </draw:frame>
        <presentation:notes draw:style-name="dp2">
          <draw:page-thumbnail draw:name="Google Shape;111;g2af853010e1_0_681:notes" draw:style-name="gr3" draw:layer="layout" svg:width="13.112cm" svg:height="9.524cm" svg:x="2.969cm" svg:y="1.905cm" draw:page-number="10" presentation:class="page"/>
          <draw:frame draw:name="Google Shape;112;g2af853010e1_0_681:notes" presentation:style-name="pr16" draw:text-style-name="P3" draw:layer="layout" svg:width="15.239cm" svg:height="11.429cm" svg:x="1.905cm" svg:y="12.065cm" presentation:class="notes" presentation:placeholder="true" presentation:user-transformed="true">
            <draw:text-box/>
          </draw:frame>
        </presentation:notes>
      </draw:page>
      <draw:page draw:name="Cloud Provider" draw:style-name="dp4" draw:master-page-name="CUSTOM_5f_3">
        <draw:frame draw:name="Google Shape;120;p20" presentation:style-name="pr13" draw:text-style-name="P5" draw:layer="layout" svg:width="8.774cm" svg:height="0.813cm" svg:x="0.427cm" svg:y="1.31cm" presentation:class="title" presentation:user-transformed="true">
          <draw:text-box>
            <text:p text:style-name="P4"><text:span text:style-name="T8">クラウドプロバイダー</text:span></text:p>
          </draw:text-box>
        </draw:frame>
        <draw:frame draw:name="Google Shape;121;p20" presentation:style-name="pr14" draw:text-style-name="P17" draw:layer="layout" svg:width="8.548cm" svg:height="4.346cm" svg:x="0.427cm" svg:y="2.173cm" presentation:class="subtitle" presentation:user-transformed="true">
          <draw:text-box>
            <text:p text:style-name="P4"><text:span text:style-name="T11">プロバイダー、アカウント、さらにはリージョンごとに異なる環境をカバーするために、複数のクラウド先が必要になる場合があります。</text:span></text:p>
            <text:p text:style-name="P4"><text:span text:style-name="T11">各クラウド先は固有のドメインを表しており、独自のツール（</text:span><text:span text:style-name="T11">CloudFormation </text:span><text:span text:style-name="T11">や </text:span><text:span text:style-name="T11">Bicep </text:span><text:span text:style-name="T11">など）や、</text:span><text:span text:style-name="T11">Crossplane </text:span><text:span text:style-name="T11">や </text:span><text:span text:style-name="T11">Terraform </text:span><text:span text:style-name="T11">といった一般的な「</text:span><text:span text:style-name="T11">Infrastructure as Code</text:span><text:span text:style-name="T11">」ツールを使用して設定できます。</text:span></text:p>
          </draw:text-box>
        </draw:frame>
        <presentation:notes draw:style-name="dp2">
          <draw:page-thumbnail draw:name="Google Shape;117;g37ac36654bc_0_18:notes" draw:style-name="gr3" draw:layer="layout" svg:width="13.112cm" svg:height="9.524cm" svg:x="2.969cm" svg:y="1.905cm" draw:page-number="11" presentation:class="page"/>
          <draw:frame draw:name="Google Shape;118;g37ac36654bc_0_18:notes" presentation:style-name="pr17" draw:text-style-name="P3" draw:layer="layout" svg:width="15.239cm" svg:height="11.429cm" svg:x="1.905cm" svg:y="12.065cm" presentation:class="notes" presentation:placeholder="true" presentation:user-transformed="true">
            <draw:text-box/>
          </draw:frame>
        </presentation:notes>
      </draw:page>
      <draw:page draw:name="Software as a Service (SaaS)" draw:style-name="dp4" draw:master-page-name="CUSTOM_5f_3">
        <draw:frame draw:name="Google Shape;126;p21" presentation:style-name="pr13" draw:text-style-name="P10" draw:layer="layout" svg:width="8.548cm" svg:height="0.813cm" svg:x="0.427cm" svg:y="1.31cm" presentation:class="title" presentation:user-transformed="true">
          <draw:text-box>
            <text:p text:style-name="P4"><text:span text:style-name="T12">Software as a Service (SaaS)</text:span></text:p>
          </draw:text-box>
        </draw:frame>
        <draw:frame draw:name="Google Shape;127;p21" presentation:style-name="pr14" draw:text-style-name="P17" draw:layer="layout" svg:width="8.548cm" svg:height="4.346cm" svg:x="0.427cm" svg:y="2.173cm" presentation:class="subtitle" presentation:user-transformed="true">
          <draw:text-box>
            <text:p text:style-name="P4"><text:span text:style-name="T11">これは、あなたの会社が依存しているソフトウェアを運用するベンダーであり、インターネット経由でアクセスする、あらゆるベンダーを表すことができます。</text:span></text:p>
            <text:p text:style-name="P4"><text:span text:style-name="T11">このデプロイ先を使用することで、利用可能なベンダー機能の管理や、特定のテナントへのアクセス権や機能の提供を行うことができます。</text:span></text:p>
          </draw:text-box>
        </draw:frame>
        <presentation:notes draw:style-name="dp2">
          <draw:page-thumbnail draw:name="Google Shape;123;g2af853010e1_0_691:notes" draw:style-name="gr3" draw:layer="layout" svg:width="13.112cm" svg:height="9.524cm" svg:x="2.969cm" svg:y="1.905cm" draw:page-number="12" presentation:class="page"/>
          <draw:frame draw:name="Google Shape;124;g2af853010e1_0_691:notes" presentation:style-name="pr18" draw:text-style-name="P3" draw:layer="layout" svg:width="15.239cm" svg:height="11.429cm" svg:x="1.905cm" svg:y="12.065cm" presentation:class="notes" presentation:placeholder="true" presentation:user-transformed="true">
            <draw:text-box/>
          </draw:frame>
        </presentation:notes>
      </draw:page>
      <draw:page draw:name="On-premise / hardware" draw:style-name="dp4" draw:master-page-name="CUSTOM_5f_3">
        <draw:frame draw:name="Google Shape;132;p22" presentation:style-name="pr13" draw:text-style-name="P5" draw:layer="layout" svg:width="8.548cm" svg:height="0.813cm" svg:x="0.427cm" svg:y="1.31cm" presentation:class="title" presentation:user-transformed="true">
          <draw:text-box>
            <text:p text:style-name="P4"><text:span text:style-name="T8">オンプレミス </text:span><text:span text:style-name="T8">/ </text:span><text:span text:style-name="T8">ハードウェア</text:span></text:p>
          </draw:text-box>
        </draw:frame>
        <draw:frame draw:name="Google Shape;133;p22" presentation:style-name="pr14" draw:text-style-name="P17" draw:layer="layout" svg:width="8.548cm" svg:height="4.346cm" svg:x="0.427cm" svg:y="2.173cm" presentation:class="subtitle" presentation:user-transformed="true">
          <draw:text-box>
            <text:p text:style-name="P4"><text:span text:style-name="T11">すべてのリソースがクラウド上にあるわけではありません。</text:span></text:p>
            <text:p text:style-name="P4"><text:span text:style-name="T11">オンプレミスのインフラストラクチャを管理する必要がある場合は、</text:span><text:span text:style-name="T11">cron</text:span><text:span text:style-name="T11">ジョブのようなシンプルな手段を使って、デプロイ先で定義された状態を参照し、ネットワークデバイスからサーバー、メインフレームに至るまで、あらゆるリソースの設定を維持・更新することができます。</text:span></text:p>
          </draw:text-box>
        </draw:frame>
        <presentation:notes draw:style-name="dp2">
          <draw:page-thumbnail draw:name="Google Shape;129;g2af853010e1_0_701:notes" draw:style-name="gr3" draw:layer="layout" svg:width="13.112cm" svg:height="9.524cm" svg:x="2.969cm" svg:y="1.905cm" draw:page-number="13" presentation:class="page"/>
          <draw:frame draw:name="Google Shape;130;g2af853010e1_0_701:notes" presentation:style-name="pr19" draw:text-style-name="P3" draw:layer="layout" svg:width="15.239cm" svg:height="11.429cm" svg:x="1.905cm" svg:y="12.065cm" presentation:class="notes" presentation:placeholder="true" presentation:user-transformed="true">
            <draw:text-box/>
          </draw:frame>
        </presentation:notes>
      </draw:page>
      <draw:page draw:name="Inputs explained" draw:style-name="dp6" draw:master-page-name="CUSTOM_5f_4_5f_1_5f_1_5f_1_5f_1_5f_1_5f_1">
        <draw:frame draw:name="Google Shape;138;p23" presentation:style-name="pr20" draw:text-style-name="P5" draw:layer="layout" svg:width="8.548cm" svg:height="0.813cm" svg:x="0.427cm" svg:y="1.31cm" presentation:class="title" presentation:user-transformed="true">
          <draw:text-box>
            <text:p text:style-name="P4"><text:span text:style-name="T1">インプットの説明</text:span></text:p>
          </draw:text-box>
        </draw:frame>
        <draw:frame draw:name="Google Shape;139;p23" presentation:style-name="pr21" draw:text-style-name="P17" draw:layer="layout" svg:width="8.548cm" svg:height="4.346cm" svg:x="0.427cm" svg:y="2.173cm" presentation:class="subtitle" presentation:user-transformed="true">
          <draw:text-box>
            <text:p text:style-name="P4"><text:span text:style-name="T10">インプット項目とは、プラットフォームのユーザーが設定できる情報のことです。</text:span></text:p>
            <text:p text:style-name="P4"><text:span text:style-name="T10">インプットフィールドには、列挙型、文字列、数値、ブール値など、さまざまな形式があります。</text:span></text:p>
            <text:p text:style-name="P4"><text:span text:style-name="T10">インプット項目はユーザーがプラットフォームとやり取りするための手段であるため、共同作業の一環として捉える必要があります。</text:span></text:p>
          </draw:text-box>
        </draw:frame>
        <draw:custom-shape draw:name="Google Shape;140;p23"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135;g2af853010e1_0_121:notes" draw:style-name="gr3" draw:layer="layout" svg:width="13.112cm" svg:height="9.524cm" svg:x="2.969cm" svg:y="1.905cm" draw:page-number="14" presentation:class="page"/>
          <draw:frame draw:name="Google Shape;136;g2af853010e1_0_121:notes" presentation:style-name="pr22" draw:text-style-name="P3" draw:layer="layout" svg:width="15.239cm" svg:height="11.429cm" svg:x="1.905cm" svg:y="12.065cm" presentation:class="notes" presentation:placeholder="true" presentation:user-transformed="true">
            <draw:text-box/>
          </draw:frame>
        </presentation:notes>
      </draw:page>
      <draw:page draw:name="Name" draw:style-name="dp4" draw:master-page-name="CUSTOM_5f_4_5f_1_5f_1_5f_1_5f_1_5f_1_5f_1">
        <draw:frame draw:name="Google Shape;145;p24" presentation:style-name="pr20" draw:text-style-name="P5" draw:layer="layout" svg:width="8.548cm" svg:height="0.813cm" svg:x="0.427cm" svg:y="1.31cm" presentation:class="title" presentation:user-transformed="true">
          <draw:text-box>
            <text:p text:style-name="P4"><text:span text:style-name="T8">名前</text:span></text:p>
          </draw:text-box>
        </draw:frame>
        <draw:frame draw:name="Google Shape;146;p24" presentation:style-name="pr21" draw:text-style-name="P17" draw:layer="layout" svg:width="8.548cm" svg:height="4.346cm" svg:x="0.427cm" svg:y="2.173cm" presentation:class="subtitle" presentation:user-transformed="true">
          <draw:text-box>
            <text:p text:style-name="P4"><text:span text:style-name="T11">これは最も一般的なインプット項目であると同時に、多くの場合、最も不要なインプット項目でもあります。そのため、使用する前によく検討してください。ユーザーから名前を入力してもらう必要がありますか？それとも、自分で生成できるものでしょうか？</text:span></text:p>
            <text:p text:style-name="P4"><text:span text:style-name="T11">名前を入力する項目は、プラットフォーム外でその名前が頻繁に参照される場合に最も重要になります。</text:span></text:p>
          </draw:text-box>
        </draw:frame>
        <presentation:notes draw:style-name="dp2">
          <draw:page-thumbnail draw:name="Google Shape;142;g2af853010e1_0_476:notes" draw:style-name="gr3" draw:layer="layout" svg:width="13.112cm" svg:height="9.524cm" svg:x="2.969cm" svg:y="1.905cm" draw:page-number="15" presentation:class="page"/>
          <draw:frame draw:name="Google Shape;143;g2af853010e1_0_476:notes" presentation:style-name="pr23" draw:text-style-name="P3" draw:layer="layout" svg:width="15.239cm" svg:height="11.429cm" svg:x="1.905cm" svg:y="12.065cm" presentation:class="notes" presentation:placeholder="true" presentation:user-transformed="true">
            <draw:text-box/>
          </draw:frame>
        </presentation:notes>
      </draw:page>
      <draw:page draw:name="Size" draw:style-name="dp4" draw:master-page-name="CUSTOM_5f_4_5f_1_5f_1_5f_1_5f_1_5f_1_5f_1">
        <draw:frame draw:name="Google Shape;151;p25" presentation:style-name="pr20" draw:text-style-name="P5" draw:layer="layout" svg:width="8.548cm" svg:height="0.813cm" svg:x="0.427cm" svg:y="1.31cm" presentation:class="title" presentation:user-transformed="true">
          <draw:text-box>
            <text:p text:style-name="P4"><text:span text:style-name="T8">サイズ</text:span></text:p>
          </draw:text-box>
        </draw:frame>
        <draw:frame draw:name="Google Shape;152;p25" presentation:style-name="pr21" draw:text-style-name="P17" draw:layer="layout" svg:width="8.548cm" svg:height="4.346cm" svg:x="0.427cm" svg:y="2.173cm" presentation:class="subtitle" presentation:user-transformed="true">
          <draw:text-box>
            <text:p text:style-name="P4"><text:span text:style-name="T11">リソースの規模は、そのコストや効率性に影響を与える可能性があります。ユーザーは、バケットのサイズ（例：小、中、大）で要件を指定できる場合もあれば、具体的なバイト数を指定する必要がある場合もあります。</text:span></text:p>
            <text:p text:style-name="P4"><text:span text:style-name="T11">サイズを指定する場合、そのサイズが大きすぎたり小さすぎたりした場合は、実際のニーズに合わせてリクエストを更新する必要があるのはユーザー自身であることに留意してください。</text:span></text:p>
          </draw:text-box>
        </draw:frame>
        <presentation:notes draw:style-name="dp2">
          <draw:page-thumbnail draw:name="Google Shape;148;g2af853010e1_0_481:notes" draw:style-name="gr3" draw:layer="layout" svg:width="13.112cm" svg:height="9.524cm" svg:x="2.969cm" svg:y="1.905cm" draw:page-number="16" presentation:class="page"/>
          <draw:frame draw:name="Google Shape;149;g2af853010e1_0_481:notes" presentation:style-name="pr24" draw:text-style-name="P3" draw:layer="layout" svg:width="15.239cm" svg:height="11.429cm" svg:x="1.905cm" svg:y="12.065cm" presentation:class="notes" presentation:placeholder="true" presentation:user-transformed="true">
            <draw:text-box/>
          </draw:frame>
        </presentation:notes>
      </draw:page>
      <draw:page draw:name="Physical location" draw:style-name="dp4" draw:master-page-name="CUSTOM_5f_4_5f_1_5f_1_5f_1_5f_1_5f_1_5f_1">
        <draw:frame draw:name="Google Shape;157;p26" presentation:style-name="pr20" draw:text-style-name="P5" draw:layer="layout" svg:width="8.548cm" svg:height="0.813cm" svg:x="0.427cm" svg:y="1.31cm" presentation:class="title" presentation:user-transformed="true">
          <draw:text-box>
            <text:p text:style-name="P4"><text:span text:style-name="T8">物理的な場所</text:span></text:p>
          </draw:text-box>
        </draw:frame>
        <draw:frame draw:name="Google Shape;158;p26" presentation:style-name="pr21" draw:text-style-name="P17" draw:layer="layout" svg:width="8.548cm" svg:height="4.346cm" svg:x="0.427cm" svg:y="2.173cm" presentation:class="subtitle" presentation:user-transformed="true">
          <draw:text-box>
            <text:p text:style-name="P4"><text:span text:style-name="T11">多くの場合、ユーザーはリソースがどこにデプロイされているかには関心がなく、ネットワーク経由で利用可能であればそれで十分です。</text:span></text:p>
            <text:p text:style-name="P4"><text:span text:style-name="T11">しかし、場合によっては、ユーザーがデータレジデンシの要件やレイテンシ要件を満たす必要があり、そのためリソースを特定の物理的な場所に配置しなければならないこともあります。</text:span></text:p>
          </draw:text-box>
        </draw:frame>
        <presentation:notes draw:style-name="dp2">
          <draw:page-thumbnail draw:name="Google Shape;154;g2af853010e1_0_486:notes" draw:style-name="gr3" draw:layer="layout" svg:width="13.112cm" svg:height="9.524cm" svg:x="2.969cm" svg:y="1.905cm" draw:page-number="17" presentation:class="page"/>
          <draw:frame draw:name="Google Shape;155;g2af853010e1_0_486:notes" presentation:style-name="pr25" draw:text-style-name="P3" draw:layer="layout" svg:width="15.239cm" svg:height="11.429cm" svg:x="1.905cm" svg:y="12.065cm" presentation:class="notes" presentation:placeholder="true" presentation:user-transformed="true">
            <draw:text-box/>
          </draw:frame>
        </presentation:notes>
      </draw:page>
      <draw:page draw:name="Container image" draw:style-name="dp4" draw:master-page-name="CUSTOM_5f_4_5f_1_5f_1_5f_1_5f_1_5f_1_5f_1">
        <draw:frame draw:name="Google Shape;163;p27" presentation:style-name="pr20" draw:text-style-name="P5" draw:layer="layout" svg:width="8.548cm" svg:height="0.813cm" svg:x="0.427cm" svg:y="1.31cm" presentation:class="title" presentation:user-transformed="true">
          <draw:text-box>
            <text:p text:style-name="P4"><text:span text:style-name="T8">コンテナイメージ</text:span></text:p>
          </draw:text-box>
        </draw:frame>
        <draw:frame draw:name="Google Shape;164;p27" presentation:style-name="pr21" draw:text-style-name="P17" draw:layer="layout" svg:width="8.548cm" svg:height="4.346cm" svg:x="0.427cm" svg:y="2.173cm" presentation:class="subtitle" presentation:user-transformed="true">
          <draw:text-box>
            <text:p text:style-name="P4"><text:span text:style-name="T11">ユーザーがプラットフォームに対してソフトウェアのデプロイを依頼する場合、そのユーザーはデプロイするソフトウェアを用意する必要があるでしょう。その方法の一つとして、レジストリやその他の手段を通じて、あらかじめ構築済みのイメージを提供することが挙げられます。</text:span></text:p>
          </draw:text-box>
        </draw:frame>
        <presentation:notes draw:style-name="dp2">
          <draw:page-thumbnail draw:name="Google Shape;160;g2af853010e1_0_491:notes" draw:style-name="gr3" draw:layer="layout" svg:width="13.112cm" svg:height="9.524cm" svg:x="2.969cm" svg:y="1.905cm" draw:page-number="18" presentation:class="page"/>
          <draw:frame draw:name="Google Shape;161;g2af853010e1_0_491:notes" presentation:style-name="pr26" draw:text-style-name="P3" draw:layer="layout" svg:width="15.239cm" svg:height="11.429cm" svg:x="1.905cm" svg:y="12.065cm" presentation:class="notes" presentation:placeholder="true" presentation:user-transformed="true">
            <draw:text-box/>
          </draw:frame>
        </presentation:notes>
      </draw:page>
      <draw:page draw:name="Security level" draw:style-name="dp4" draw:master-page-name="CUSTOM_5f_4_5f_1_5f_1_5f_1_5f_1_5f_1_5f_1">
        <draw:frame draw:name="Google Shape;169;p28" presentation:style-name="pr20" draw:text-style-name="P5" draw:layer="layout" svg:width="8.548cm" svg:height="0.813cm" svg:x="0.427cm" svg:y="1.31cm" presentation:class="title" presentation:user-transformed="true">
          <draw:text-box>
            <text:p text:style-name="P4"><text:span text:style-name="T8">セキュリティレベル</text:span></text:p>
          </draw:text-box>
        </draw:frame>
        <draw:frame draw:name="Google Shape;170;p28" presentation:style-name="pr21" draw:text-style-name="P17" draw:layer="layout" svg:width="8.548cm" svg:height="4.346cm" svg:x="0.427cm" svg:y="2.173cm" presentation:class="subtitle" presentation:user-transformed="true">
          <draw:text-box>
            <text:p text:style-name="P4"><text:span text:style-name="T11">すべてのリソースに同じレベルのセキュリティが必要というわけではありません。たとえば、顧客データに一切触れないリソースもあれば、顧客情報だけでなく、金銭的被害やその他の個人攻撃に悪用される可能性のあるデータを含むリソースもあります。</text:span></text:p>
            <text:p text:style-name="P4"><text:span text:style-name="T11">プラットフォームが必要なセキュリティレベルを自動的に判断できない場合、ユーザー自身がその情報を指定することができます。</text:span></text:p>
          </draw:text-box>
        </draw:frame>
        <presentation:notes draw:style-name="dp2">
          <draw:page-thumbnail draw:name="Google Shape;166;g2af853010e1_0_496:notes" draw:style-name="gr3" draw:layer="layout" svg:width="13.112cm" svg:height="9.524cm" svg:x="2.969cm" svg:y="1.905cm" draw:page-number="19" presentation:class="page"/>
          <draw:frame draw:name="Google Shape;167;g2af853010e1_0_496:notes" presentation:style-name="pr27" draw:text-style-name="P3" draw:layer="layout" svg:width="15.239cm" svg:height="11.429cm" svg:x="1.905cm" svg:y="12.065cm" presentation:class="notes" presentation:placeholder="true" presentation:user-transformed="true">
            <draw:text-box/>
          </draw:frame>
        </presentation:notes>
      </draw:page>
      <draw:page draw:name="Dependencies" draw:style-name="dp4" draw:master-page-name="CUSTOM_5f_4_5f_1_5f_1_5f_1_5f_1_5f_1_5f_1">
        <draw:frame draw:name="Google Shape;175;p29" presentation:style-name="pr20" draw:text-style-name="P5" draw:layer="layout" svg:width="8.548cm" svg:height="0.813cm" svg:x="0.427cm" svg:y="1.31cm" presentation:class="title" presentation:user-transformed="true">
          <draw:text-box>
            <text:p text:style-name="P4"><text:span text:style-name="T8">依存関係</text:span></text:p>
          </draw:text-box>
        </draw:frame>
        <draw:frame draw:name="Google Shape;176;p29" presentation:style-name="pr21" draw:text-style-name="P17" draw:layer="layout" svg:width="8.548cm" svg:height="4.346cm" svg:x="0.427cm" svg:y="2.173cm" presentation:class="subtitle" presentation:user-transformed="true">
          <draw:text-box>
            <text:p text:style-name="P4"><text:span text:style-name="T11">リソースには、</text:span><text:span text:style-name="T11">1</text:span><text:span text:style-name="T11">つ以上のオプションの依存関係が存在する場合があります。たとえば、ソフトウェアアプリケーションは、フィーチャーフラグ設定サービスやデータベースを利用するように設定できます。</text:span></text:p>
            <text:p text:style-name="P4"><text:span text:style-name="T11">ユーザーは依存関係のリストを指定することで、プラットフォームは既存の依存関係にアクセスしたり、要求されたリソースに関連して新しいインスタンスを作成・管理したりすることができます。</text:span></text:p>
          </draw:text-box>
        </draw:frame>
        <presentation:notes draw:style-name="dp2">
          <draw:page-thumbnail draw:name="Google Shape;172;g2af853010e1_0_747:notes" draw:style-name="gr3" draw:layer="layout" svg:width="13.112cm" svg:height="9.524cm" svg:x="2.969cm" svg:y="1.905cm" draw:page-number="20" presentation:class="page"/>
          <draw:frame draw:name="Google Shape;173;g2af853010e1_0_747:notes" presentation:style-name="pr28" draw:text-style-name="P3" draw:layer="layout" svg:width="15.239cm" svg:height="11.429cm" svg:x="1.905cm" svg:y="12.065cm" presentation:class="notes" presentation:placeholder="true" presentation:user-transformed="true">
            <draw:text-box/>
          </draw:frame>
        </presentation:notes>
      </draw:page>
      <draw:page draw:name="Upgrade rules" draw:style-name="dp4" draw:master-page-name="CUSTOM_5f_4_5f_1_5f_1_5f_1_5f_1_5f_1_5f_1">
        <draw:frame draw:name="Google Shape;181;p30" presentation:style-name="pr20" draw:text-style-name="P5" draw:layer="layout" svg:width="8.548cm" svg:height="0.813cm" svg:x="0.427cm" svg:y="1.31cm" presentation:class="title" presentation:user-transformed="true">
          <draw:text-box>
            <text:p text:style-name="P4"><text:span text:style-name="T8">アップグレードルール</text:span></text:p>
          </draw:text-box>
        </draw:frame>
        <draw:frame draw:name="Google Shape;182;p30" presentation:style-name="pr21" draw:text-style-name="P17" draw:layer="layout" svg:width="8.548cm" svg:height="4.346cm" svg:x="0.427cm" svg:y="2.173cm" presentation:class="subtitle" presentation:user-transformed="true">
          <draw:text-box>
            <text:p text:style-name="P4"><text:span text:style-name="T11">プラットフォームの利点は、全システムを一括してアップグレードできる点にあります。しかし、プラットフォーム全体を同時に更新できるからといって、必ずしもそうすべきとは限りません。</text:span></text:p>
            <text:p text:style-name="P4"><text:span text:style-name="T11">ユーザーによっては、アップグレードのペースを緩やかにしたり、更新時期を遅らせたりすることを希望する一方、最先端のリリースをすぐに導入したいと考えるユーザーもいるでしょう。</text:span></text:p>
          </draw:text-box>
        </draw:frame>
        <presentation:notes draw:style-name="dp2">
          <draw:page-thumbnail draw:name="Google Shape;178;g2af853010e1_0_506:notes" draw:style-name="gr3" draw:layer="layout" svg:width="13.112cm" svg:height="9.524cm" svg:x="2.969cm" svg:y="1.905cm" draw:page-number="21" presentation:class="page"/>
          <draw:frame draw:name="Google Shape;179;g2af853010e1_0_506:notes" presentation:style-name="pr29" draw:text-style-name="P3" draw:layer="layout" svg:width="15.239cm" svg:height="11.429cm" svg:x="1.905cm" svg:y="12.065cm" presentation:class="notes" presentation:placeholder="true" presentation:user-transformed="true">
            <draw:text-box/>
          </draw:frame>
        </presentation:notes>
      </draw:page>
      <draw:page draw:name="Repository" draw:style-name="dp4" draw:master-page-name="CUSTOM_5f_4_5f_1_5f_1_5f_1_5f_1_5f_1_5f_1">
        <draw:frame draw:name="Google Shape;187;p31" presentation:style-name="pr20" draw:text-style-name="P5" draw:layer="layout" svg:width="8.548cm" svg:height="0.813cm" svg:x="0.427cm" svg:y="1.31cm" presentation:class="title" presentation:user-transformed="true">
          <draw:text-box>
            <text:p text:style-name="P4"><text:span text:style-name="T8">リポジトリ</text:span></text:p>
          </draw:text-box>
        </draw:frame>
        <draw:frame draw:name="Google Shape;188;p31" presentation:style-name="pr21" draw:text-style-name="P17" draw:layer="layout" svg:width="8.548cm" svg:height="4.346cm" svg:x="0.427cm" svg:y="2.173cm" presentation:class="subtitle" presentation:user-transformed="true">
          <draw:text-box>
            <text:p text:style-name="P4"><text:span text:style-name="T7">ユーザーがプラットフォームに対してソフトウェアのデプロイを依頼する場合、そのユーザーはデプロイするソフトウェアを提供する必要があるでしょう。一つの方法として、ソフトウェアが格納されているリポジトリを用意し、プラットフォームがそのリポジトリからデプロイ情報を取得できるようにすることが挙げられます。</text:span></text:p>
          </draw:text-box>
        </draw:frame>
        <presentation:notes draw:style-name="dp2">
          <draw:page-thumbnail draw:name="Google Shape;184;g2af853010e1_0_511:notes" draw:style-name="gr3" draw:layer="layout" svg:width="13.112cm" svg:height="9.524cm" svg:x="2.969cm" svg:y="1.905cm" draw:page-number="22" presentation:class="page"/>
          <draw:frame draw:name="Google Shape;185;g2af853010e1_0_511:notes" presentation:style-name="pr30" draw:text-style-name="P3" draw:layer="layout" svg:width="15.239cm" svg:height="11.429cm" svg:x="1.905cm" svg:y="12.065cm" presentation:class="notes" presentation:placeholder="true" presentation:user-transformed="true">
            <draw:text-box/>
          </draw:frame>
        </presentation:notes>
      </draw:page>
      <draw:page draw:name="Ownership" draw:style-name="dp4" draw:master-page-name="CUSTOM_5f_4_5f_1_5f_1_5f_1_5f_1_5f_1_5f_1">
        <draw:frame draw:name="Google Shape;193;p32" presentation:style-name="pr20" draw:text-style-name="P5" draw:layer="layout" svg:width="8.548cm" svg:height="0.813cm" svg:x="0.427cm" svg:y="1.31cm" presentation:class="title" presentation:user-transformed="true">
          <draw:text-box>
            <text:p text:style-name="P4"><text:span text:style-name="T8">所有権</text:span></text:p>
          </draw:text-box>
        </draw:frame>
        <draw:frame draw:name="Google Shape;194;p32" presentation:style-name="pr21" draw:text-style-name="P17" draw:layer="layout" svg:width="8.548cm" svg:height="4.346cm" svg:x="0.427cm" svg:y="2.173cm" presentation:class="subtitle" presentation:user-transformed="true">
          <draw:text-box>
            <text:p text:style-name="P4"><text:span text:style-name="T11">所有権は、タグ付けやアクセス権限の設定など、さまざまな用途に利用できます。</text:span></text:p>
            <text:p text:style-name="P4"><text:span text:style-name="T11">プラットフォームがリクエスト元のユーザーから所有権を特定できない場合、業務プロセスに準拠するために、所有権を明示的に指定する必要がある場合があります。</text:span></text:p>
          </draw:text-box>
        </draw:frame>
        <presentation:notes draw:style-name="dp2">
          <draw:page-thumbnail draw:name="Google Shape;190;g2af853010e1_0_516:notes" draw:style-name="gr3" draw:layer="layout" svg:width="13.112cm" svg:height="9.524cm" svg:x="2.969cm" svg:y="1.905cm" draw:page-number="23" presentation:class="page"/>
          <draw:frame draw:name="Google Shape;191;g2af853010e1_0_516:notes" presentation:style-name="pr31" draw:text-style-name="P3" draw:layer="layout" svg:width="15.239cm" svg:height="11.429cm" svg:x="1.905cm" svg:y="12.065cm" presentation:class="notes" presentation:placeholder="true" presentation:user-transformed="true">
            <draw:text-box/>
          </draw:frame>
        </presentation:notes>
      </draw:page>
      <draw:page draw:name="Version" draw:style-name="dp4" draw:master-page-name="CUSTOM_5f_4_5f_1_5f_1_5f_1_5f_1_5f_1_5f_1">
        <draw:frame draw:name="Google Shape;199;p33" presentation:style-name="pr20" draw:text-style-name="P5" draw:layer="layout" svg:width="8.548cm" svg:height="0.813cm" svg:x="0.427cm" svg:y="1.31cm" presentation:class="title" presentation:user-transformed="true">
          <draw:text-box>
            <text:p text:style-name="P4"><text:span text:style-name="T8">バージョン</text:span></text:p>
          </draw:text-box>
        </draw:frame>
        <draw:frame draw:name="Google Shape;200;p33" presentation:style-name="pr21" draw:text-style-name="P17" draw:layer="layout" svg:width="8.548cm" svg:height="4.346cm" svg:x="0.427cm" svg:y="2.173cm" presentation:class="subtitle" presentation:user-transformed="true">
          <draw:text-box>
            <text:p text:style-name="P4"><text:span text:style-name="T11">リソースのバージョンに対する所有権は、アップグレードやメンテナンスの責任を暗黙的に決定づけます。</text:span></text:p>
            <text:p text:style-name="P4"><text:span text:style-name="T11">例えば、プラットフォームがバージョンを入力パラメータとして公開している場合、ユーザーはリソースのアップグレードに対応する必要があります。しかし、プラットフォームがメジャーバージョンのみを公開している場合、マイナーバージョンおよびパッチバージョンの更新管理は、暗黙的にプラットフォーム側が担うことになります。</text:span></text:p>
          </draw:text-box>
        </draw:frame>
        <presentation:notes draw:style-name="dp2">
          <draw:page-thumbnail draw:name="Google Shape;196;g2af853010e1_0_521:notes" draw:style-name="gr3" draw:layer="layout" svg:width="13.112cm" svg:height="9.524cm" svg:x="2.969cm" svg:y="1.905cm" draw:page-number="24" presentation:class="page"/>
          <draw:frame draw:name="Google Shape;197;g2af853010e1_0_521:notes" presentation:style-name="pr32" draw:text-style-name="P3" draw:layer="layout" svg:width="15.239cm" svg:height="11.429cm" svg:x="1.905cm" svg:y="12.065cm" presentation:class="notes" presentation:placeholder="true" presentation:user-transformed="true">
            <draw:text-box/>
          </draw:frame>
        </presentation:notes>
      </draw:page>
      <draw:page draw:name="Configuration" draw:style-name="dp4" draw:master-page-name="CUSTOM_5f_4_5f_1_5f_1_5f_1_5f_1_5f_1_5f_1">
        <draw:frame draw:name="Google Shape;205;p34" presentation:style-name="pr20" draw:text-style-name="P5" draw:layer="layout" svg:width="8.548cm" svg:height="0.813cm" svg:x="0.427cm" svg:y="1.31cm" presentation:class="title" presentation:user-transformed="true">
          <draw:text-box>
            <text:p text:style-name="P4"><text:span text:style-name="T8">設定情報</text:span></text:p>
          </draw:text-box>
        </draw:frame>
        <draw:frame draw:name="Google Shape;206;p34" presentation:style-name="pr21" draw:text-style-name="P17" draw:layer="layout" svg:width="8.548cm" svg:height="4.346cm" svg:x="0.427cm" svg:y="2.173cm" presentation:class="subtitle" presentation:user-transformed="true">
          <draw:text-box>
            <text:p text:style-name="P4"><text:span text:style-name="T11">設定情報とは、定義された範囲内でリソースの動作に影響するあらゆるフィールドを総称して指すものです。</text:span></text:p>
            <text:p text:style-name="P4"><text:span text:style-name="T11">この入力項目を使用する場合は、具体的にどのような設定情報を公開するかを明記することを検討してください。</text:span></text:p>
          </draw:text-box>
        </draw:frame>
        <presentation:notes draw:style-name="dp2">
          <draw:page-thumbnail draw:name="Google Shape;202;g2af853010e1_0_526:notes" draw:style-name="gr3" draw:layer="layout" svg:width="13.112cm" svg:height="9.524cm" svg:x="2.969cm" svg:y="1.905cm" draw:page-number="25" presentation:class="page"/>
          <draw:frame draw:name="Google Shape;203;g2af853010e1_0_526:notes" presentation:style-name="pr33" draw:text-style-name="P3" draw:layer="layout" svg:width="15.239cm" svg:height="11.429cm" svg:x="1.905cm" svg:y="12.065cm" presentation:class="notes" presentation:placeholder="true" presentation:user-transformed="true">
            <draw:text-box/>
          </draw:frame>
        </presentation:notes>
      </draw:page>
      <draw:page draw:name="Environment" draw:style-name="dp4" draw:master-page-name="CUSTOM_5f_4_5f_1_5f_1_5f_1_5f_1_5f_1_5f_1">
        <draw:frame draw:name="Google Shape;211;p35" presentation:style-name="pr20" draw:text-style-name="P5" draw:layer="layout" svg:width="8.548cm" svg:height="0.813cm" svg:x="0.427cm" svg:y="1.31cm" presentation:class="title" presentation:user-transformed="true">
          <draw:text-box>
            <text:p text:style-name="P4"><text:span text:style-name="T8">環境情報</text:span></text:p>
          </draw:text-box>
        </draw:frame>
        <draw:frame draw:name="Google Shape;212;p35" presentation:style-name="pr21" draw:text-style-name="P17" draw:layer="layout" svg:width="8.548cm" svg:height="4.346cm" svg:x="0.427cm" svg:y="2.173cm" presentation:class="subtitle" presentation:user-transformed="true">
          <draw:text-box>
            <text:p text:style-name="P4"><text:span text:style-name="T7">ソフトウェアのビルド、テスト、デプロイを行う際、複数の異なるセットアップや構成が存在するのが一般的です。</text:span></text:p>
            <text:p text:style-name="P4"><text:span text:style-name="T7">環境によっては、同じインフラストラクチャやツールの構成要素が必要となる場合もありますが、その実装方法はしばしば異なります。こうした情報を基に、プラットフォームはユーザーに代わってこれらの構成を決定することができます。</text:span></text:p>
          </draw:text-box>
        </draw:frame>
        <presentation:notes draw:style-name="dp2">
          <draw:page-thumbnail draw:name="Google Shape;208;g2af853010e1_0_185:notes" draw:style-name="gr3" draw:layer="layout" svg:width="13.112cm" svg:height="9.524cm" svg:x="2.969cm" svg:y="1.905cm" draw:page-number="26" presentation:class="page"/>
          <draw:frame draw:name="Google Shape;209;g2af853010e1_0_185:notes" presentation:style-name="pr34" draw:text-style-name="P3" draw:layer="layout" svg:width="15.239cm" svg:height="11.429cm" svg:x="1.905cm" svg:y="12.065cm" presentation:class="notes" presentation:placeholder="true" presentation:user-transformed="true">
            <draw:text-box/>
          </draw:frame>
        </presentation:notes>
      </draw:page>
      <draw:page draw:name="Outputs explained" draw:style-name="dp7" draw:master-page-name="CUSTOM_5f_2">
        <draw:frame draw:name="Google Shape;217;p36" presentation:style-name="pr35" draw:text-style-name="P5" draw:layer="layout" svg:width="8.548cm" svg:height="0.813cm" svg:x="0.427cm" svg:y="1.31cm" presentation:class="title" presentation:user-transformed="true">
          <draw:text-box>
            <text:p text:style-name="P4"><text:span text:style-name="T1">アウトプットの説明</text:span></text:p>
          </draw:text-box>
        </draw:frame>
        <draw:frame draw:name="Google Shape;218;p36" presentation:style-name="pr36" draw:text-style-name="P17" draw:layer="layout" svg:width="8.548cm" svg:height="4.346cm" svg:x="0.427cm" svg:y="2.173cm" presentation:class="subtitle" presentation:user-transformed="true">
          <draw:text-box>
            <text:p text:style-name="P4"><text:span text:style-name="T10">アウトプットとは、プラットフォームがリソースの作成時およびその後の経過に応じてユーザーに報告する情報のことです。</text:span></text:p>
            <text:p text:style-name="P4"><text:span text:style-name="T10">通常、人間が読み取ることを想定したデータと、機械が解析することを想定したデータの両方が含まれます。</text:span></text:p>
            <text:p text:style-name="P4"><text:span text:style-name="T10">これらの出力は、ユーザーがリソースを利用し、デバッグを行う上で十分なものである必要があります。</text:span></text:p>
          </draw:text-box>
        </draw:frame>
        <draw:custom-shape draw:name="Google Shape;219;p36"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214;g2af853010e1_0_132:notes" draw:style-name="gr3" draw:layer="layout" svg:width="13.112cm" svg:height="9.524cm" svg:x="2.969cm" svg:y="1.905cm" draw:page-number="27" presentation:class="page"/>
          <draw:frame draw:name="Google Shape;215;g2af853010e1_0_132:notes" presentation:style-name="pr37" draw:text-style-name="P3" draw:layer="layout" svg:width="15.239cm" svg:height="11.429cm" svg:x="1.905cm" svg:y="12.065cm" presentation:class="notes" presentation:placeholder="true" presentation:user-transformed="true">
            <draw:text-box/>
          </draw:frame>
        </presentation:notes>
      </draw:page>
      <draw:page draw:name="Secrets" draw:style-name="dp4" draw:master-page-name="CUSTOM_5f_2">
        <draw:frame draw:name="Google Shape;224;p37" presentation:style-name="pr35" draw:text-style-name="P5" draw:layer="layout" svg:width="8.548cm" svg:height="0.813cm" svg:x="0.427cm" svg:y="1.31cm" presentation:class="title" presentation:user-transformed="true">
          <draw:text-box>
            <text:p text:style-name="P4"><text:span text:style-name="T8">シークレット</text:span></text:p>
          </draw:text-box>
        </draw:frame>
        <draw:frame draw:name="Google Shape;225;p37" presentation:style-name="pr36" draw:text-style-name="P17" draw:layer="layout" svg:width="8.548cm" svg:height="4.346cm" svg:x="0.427cm" svg:y="2.173cm" presentation:class="subtitle" presentation:user-transformed="true">
          <draw:text-box>
            <text:p text:style-name="P4"><text:span text:style-name="T7">リソースへのアクセスにシークレット（パスワードやデータベース接続文字列など）が必要な場合、ユーザーはそのシークレットの内容を知っておく必要があります。</text:span></text:p>
            <text:p text:style-name="P4"><text:span text:style-name="T7">API</text:span><text:span text:style-name="T7">のレスポンス自体は転送中に保護されていませんが、シークレットが利用可能な場所（例：</text:span><text:span text:style-name="T7">HashiCorp Vault</text:span><text:span text:style-name="T7">やクラウドシークレットマネージャーの</text:span><text:span text:style-name="T7">URL</text:span><text:span text:style-name="T7">など）を返すことは可能です。</text:span></text:p>
          </draw:text-box>
        </draw:frame>
        <presentation:notes draw:style-name="dp2">
          <draw:page-thumbnail draw:name="Google Shape;221;g2af853010e1_0_536:notes" draw:style-name="gr3" draw:layer="layout" svg:width="13.112cm" svg:height="9.524cm" svg:x="2.969cm" svg:y="1.905cm" draw:page-number="28" presentation:class="page"/>
          <draw:frame draw:name="Google Shape;222;g2af853010e1_0_536:notes" presentation:style-name="pr38" draw:text-style-name="P3" draw:layer="layout" svg:width="15.239cm" svg:height="11.429cm" svg:x="1.905cm" svg:y="12.065cm" presentation:class="notes" presentation:placeholder="true" presentation:user-transformed="true">
            <draw:text-box/>
          </draw:frame>
        </presentation:notes>
      </draw:page>
      <draw:page draw:name="Observability details" draw:style-name="dp4" draw:master-page-name="CUSTOM_5f_2">
        <draw:frame draw:name="Google Shape;230;p38" presentation:style-name="pr35" draw:text-style-name="P5" draw:layer="layout" svg:width="8.548cm" svg:height="0.813cm" svg:x="0.427cm" svg:y="1.31cm" presentation:class="title" presentation:user-transformed="true">
          <draw:text-box>
            <text:p text:style-name="P4"><text:span text:style-name="T8">オブザーバビリティの詳細</text:span></text:p>
          </draw:text-box>
        </draw:frame>
        <draw:frame draw:name="Google Shape;231;p38" presentation:style-name="pr36" draw:text-style-name="P17" draw:layer="layout" svg:width="8.548cm" svg:height="4.346cm" svg:x="0.427cm" svg:y="2.173cm" presentation:class="subtitle" presentation:user-transformed="true">
          <draw:text-box>
            <text:p text:style-name="P4"><text:span text:style-name="T11">プラットフォームは、ユーザーとプラットフォーム提供者の間に共同責任を生み出します。ユーザーは自身のリソースを管理し、適切な構成（サイズやセキュリティレベルなど）をリクエストしていることを確認する必要があります。</text:span></text:p>
            <text:p text:style-name="P4"><text:span text:style-name="T11">これらの要件を管理するため、プラットフォームは必要なオブザーバビリティデータやツールへのアクセスを提供する場合があります。</text:span></text:p>
          </draw:text-box>
        </draw:frame>
        <presentation:notes draw:style-name="dp2">
          <draw:page-thumbnail draw:name="Google Shape;227;g2af853010e1_0_551:notes" draw:style-name="gr3" draw:layer="layout" svg:width="13.112cm" svg:height="9.524cm" svg:x="2.969cm" svg:y="1.905cm" draw:page-number="29" presentation:class="page"/>
          <draw:frame draw:name="Google Shape;228;g2af853010e1_0_551:notes" presentation:style-name="pr39" draw:text-style-name="P3" draw:layer="layout" svg:width="15.239cm" svg:height="11.429cm" svg:x="1.905cm" svg:y="12.065cm" presentation:class="notes" presentation:placeholder="true" presentation:user-transformed="true">
            <draw:text-box/>
          </draw:frame>
        </presentation:notes>
      </draw:page>
      <draw:page draw:name="Access information" draw:style-name="dp4" draw:master-page-name="CUSTOM_5f_2">
        <draw:frame draw:name="Google Shape;236;p39" presentation:style-name="pr35" draw:text-style-name="P5" draw:layer="layout" svg:width="8.548cm" svg:height="0.813cm" svg:x="0.427cm" svg:y="1.31cm" presentation:class="title" presentation:user-transformed="true">
          <draw:text-box>
            <text:p text:style-name="P4"><text:span text:style-name="T8">アクセス情報</text:span></text:p>
          </draw:text-box>
        </draw:frame>
        <draw:frame draw:name="Google Shape;237;p39" presentation:style-name="pr36" draw:text-style-name="P17" draw:layer="layout" svg:width="8.548cm" svg:height="4.346cm" svg:x="0.427cm" svg:y="2.173cm" presentation:class="subtitle" presentation:user-transformed="true">
          <draw:text-box>
            <text:p text:style-name="P4"><text:span text:style-name="T11">リソースは、多くの場合、ユーザーや他のシステムによって物理的に依存しており、アウトプット情報によって下流の依存関係の詳細が提供されることがあります。</text:span></text:p>
            <text:p text:style-name="P4"><text:span text:style-name="T11">ユーザーは、手動テストを実行するために</text:span><text:span text:style-name="T11">URL</text:span><text:span text:style-name="T11">やエンドポイントを知る必要がある場合があります。あるいは、別のリソースが、接続して上位レベルのシステムを構築するために、</text:span><text:span text:style-name="T11">IP</text:span><text:span text:style-name="T11">アドレスやその他の識別情報を知る必要がある場合もあります。</text:span></text:p>
          </draw:text-box>
        </draw:frame>
        <presentation:notes draw:style-name="dp2">
          <draw:page-thumbnail draw:name="Google Shape;233;g2af853010e1_0_556:notes" draw:style-name="gr3" draw:layer="layout" svg:width="13.112cm" svg:height="9.524cm" svg:x="2.969cm" svg:y="1.905cm" draw:page-number="30" presentation:class="page"/>
          <draw:frame draw:name="Google Shape;234;g2af853010e1_0_556:notes" presentation:style-name="pr40" draw:text-style-name="P3" draw:layer="layout" svg:width="15.239cm" svg:height="11.429cm" svg:x="1.905cm" svg:y="12.065cm" presentation:class="notes" presentation:placeholder="true" presentation:user-transformed="true">
            <draw:text-box/>
          </draw:frame>
        </presentation:notes>
      </draw:page>
      <draw:page draw:name="Health and status" draw:style-name="dp4" draw:master-page-name="CUSTOM_5f_2">
        <draw:frame draw:name="Google Shape;242;p40" presentation:style-name="pr35" draw:text-style-name="P5" draw:layer="layout" svg:width="8.548cm" svg:height="0.813cm" svg:x="0.427cm" svg:y="1.31cm" presentation:class="title" presentation:user-transformed="true">
          <draw:text-box>
            <text:p text:style-name="P4"><text:span text:style-name="T8">健全性チェック</text:span></text:p>
          </draw:text-box>
        </draw:frame>
        <draw:frame draw:name="Google Shape;243;p40" presentation:style-name="pr36" draw:text-style-name="P17" draw:layer="layout" svg:width="8.548cm" svg:height="4.346cm" svg:x="0.427cm" svg:y="2.173cm" presentation:class="subtitle" presentation:user-transformed="true">
          <draw:text-box>
            <text:p text:style-name="P4"><text:span text:style-name="T7">「まだ着かないの？」という問いかけは、長距離ドライブに限った話ではありません。プラットフォームにおいて最も頻繁に聞かれる質問の一つは、リソースがいつ利用可能になるか、そしてそのライフサイクルを通じて常に利用可能かどうかということです。</text:span></text:p>
            <text:p text:style-name="P4"><text:span text:style-name="T7">健全性チェックの更新情報により、ユーザーはリソースの過剰または不足、セキュリティアラート、および問題発生時のデバッグ支援を含むその他の運用改善策について通知を受けることができます。</text:span></text:p>
          </draw:text-box>
        </draw:frame>
        <presentation:notes draw:style-name="dp2">
          <draw:page-thumbnail draw:name="Google Shape;239;g2af853010e1_0_561:notes" draw:style-name="gr3" draw:layer="layout" svg:width="13.112cm" svg:height="9.524cm" svg:x="2.969cm" svg:y="1.905cm" draw:page-number="31" presentation:class="page"/>
          <draw:frame draw:name="Google Shape;240;g2af853010e1_0_561:notes" presentation:style-name="pr41" draw:text-style-name="P3" draw:layer="layout" svg:width="15.239cm" svg:height="11.429cm" svg:x="1.905cm" svg:y="12.065cm" presentation:class="notes" presentation:placeholder="true" presentation:user-transformed="true">
            <draw:text-box/>
          </draw:frame>
        </presentation:notes>
      </draw:page>
      <draw:page draw:name="Deprecations" draw:style-name="dp4" draw:master-page-name="CUSTOM_5f_2">
        <draw:frame draw:name="Google Shape;248;p41" presentation:style-name="pr35" draw:text-style-name="P5" draw:layer="layout" svg:width="8.548cm" svg:height="0.813cm" svg:x="0.427cm" svg:y="1.31cm" presentation:class="title" presentation:user-transformed="true">
          <draw:text-box>
            <text:p text:style-name="P4"><text:span text:style-name="T8">非推奨機能</text:span></text:p>
          </draw:text-box>
        </draw:frame>
        <draw:frame draw:name="Google Shape;249;p41" presentation:style-name="pr36" draw:text-style-name="P17" draw:layer="layout" svg:width="8.548cm" svg:height="4.346cm" svg:x="0.427cm" svg:y="2.173cm" presentation:class="subtitle" presentation:user-transformed="true">
          <draw:text-box>
            <text:p text:style-name="P4"><text:span text:style-name="T7">サービスには継続的なサポートが必要です。アップデートにはユーザーの操作が必要な場合もあれば、プラットフォーム側で完全に処理される場合もありますが、ユーザーにはその旨を通知したい場合があります。</text:span></text:p>
            <text:p text:style-name="P4"><text:span text:style-name="T7">アウトプット情報として、廃止予定のバージョンについてユーザーに通知し、アップグレードの実施時期や方法について明確に伝えることができます。</text:span></text:p>
          </draw:text-box>
        </draw:frame>
        <presentation:notes draw:style-name="dp2">
          <draw:page-thumbnail draw:name="Google Shape;245;g2af853010e1_0_195:notes" draw:style-name="gr3" draw:layer="layout" svg:width="13.112cm" svg:height="9.524cm" svg:x="2.969cm" svg:y="1.905cm" draw:page-number="32" presentation:class="page"/>
          <draw:frame draw:name="Google Shape;246;g2af853010e1_0_195:notes" presentation:style-name="pr42" draw:text-style-name="P3" draw:layer="layout" svg:width="15.239cm" svg:height="11.429cm" svg:x="1.905cm" svg:y="12.065cm" presentation:class="notes" presentation:placeholder="true" presentation:user-transformed="true">
            <draw:text-box/>
          </draw:frame>
        </presentation:notes>
      </draw:page>
      <draw:page draw:name="Process rules explained" draw:style-name="dp8" draw:master-page-name="CUSTOM_5f_3_5f_1">
        <draw:frame draw:name="Google Shape;254;p42" presentation:style-name="pr43" draw:text-style-name="P5" draw:layer="layout" svg:width="8.548cm" svg:height="0.813cm" svg:x="0.427cm" svg:y="1.31cm" presentation:class="title" presentation:user-transformed="true">
          <draw:text-box>
            <text:p text:style-name="P4"><text:span text:style-name="T1">プロセスルールの説明</text:span></text:p>
          </draw:text-box>
        </draw:frame>
        <draw:frame draw:name="Google Shape;255;p42" presentation:style-name="pr44" draw:text-style-name="P16" draw:layer="layout" svg:width="8.548cm" svg:height="4.346cm" svg:x="0.427cm" svg:y="2.173cm" presentation:class="subtitle" presentation:user-transformed="true">
          <draw:text-box>
            <text:p text:style-name="P12"><text:span text:style-name="T10">プロセスルールとは、リソースのプロビジョニングと並行して実行されるビジネスタスクのことです。</text:span></text:p>
            <text:p text:style-name="P12"><text:span text:style-name="T10">プロセスルールは、リクエストチケットを通じて手動でリクエストに対応する場合の「</text:span><text:span text:style-name="T10">ToDo</text:span><text:span text:style-name="T10">リスト」の一部と捉えることもできれば、デリバリーパイプラインに組み込むことも可能です。</text:span></text:p>
            <text:p text:style-name="P12"><text:span text:style-name="T10">これらは、依存関係の設定やリソースごとの設定（あるいはその両方）で利用できます。</text:span></text:p>
          </draw:text-box>
        </draw:frame>
        <draw:custom-shape draw:name="Google Shape;256;p42"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251;g2af853010e1_0_142:notes" draw:style-name="gr3" draw:layer="layout" svg:width="13.112cm" svg:height="9.524cm" svg:x="2.969cm" svg:y="1.905cm" draw:page-number="33" presentation:class="page"/>
          <draw:frame draw:name="Google Shape;252;g2af853010e1_0_142:notes" presentation:style-name="pr45" draw:text-style-name="P3" draw:layer="layout" svg:width="15.239cm" svg:height="11.429cm" svg:x="1.905cm" svg:y="12.065cm" presentation:class="notes" presentation:placeholder="true" presentation:user-transformed="true">
            <draw:text-box/>
          </draw:frame>
        </presentation:notes>
      </draw:page>
      <draw:page draw:name="Security scan" draw:style-name="dp4" draw:master-page-name="CUSTOM_5f_3_5f_1">
        <draw:frame draw:name="Google Shape;261;p43" presentation:style-name="pr43" draw:text-style-name="P5" draw:layer="layout" svg:width="8.548cm" svg:height="0.813cm" svg:x="0.427cm" svg:y="1.31cm" presentation:class="title" presentation:user-transformed="true">
          <draw:text-box>
            <text:p text:style-name="P4"><text:span text:style-name="T8">セキュリティスキャン</text:span></text:p>
          </draw:text-box>
        </draw:frame>
        <draw:frame draw:name="Google Shape;262;p43" presentation:style-name="pr44" draw:text-style-name="P16" draw:layer="layout" svg:width="8.548cm" svg:height="4.346cm" svg:x="0.427cm" svg:y="2.173cm" presentation:class="subtitle" presentation:user-transformed="true">
          <draw:text-box>
            <text:p text:style-name="P12"><text:span text:style-name="T11">リソースは、多くの場合、導入前に静的スキャンを、使用中は定期的な動的スキャンを必要とします。</text:span></text:p>
            <text:p text:style-name="P12"><text:span text:style-name="T11">このスキャンは、ライフサイクルイベント時だけでなく定期的なスケジュールでも実行できるため、これらいずれかのスキャン、あるいは両方のスキャンとして利用できます。</text:span></text:p>
            <text:p text:style-name="P12"><text:span text:style-name="T11">また、このプラットフォームでは、スキャンの結果に基づいてさまざまなアクションを実行することも可能です。</text:span></text:p>
          </draw:text-box>
        </draw:frame>
        <presentation:notes draw:style-name="dp2">
          <draw:page-thumbnail draw:name="Google Shape;258;g2af853010e1_0_566:notes" draw:style-name="gr3" draw:layer="layout" svg:width="13.112cm" svg:height="9.524cm" svg:x="2.969cm" svg:y="1.905cm" draw:page-number="34" presentation:class="page"/>
          <draw:frame draw:name="Google Shape;259;g2af853010e1_0_566:notes" presentation:style-name="pr46" draw:text-style-name="P3" draw:layer="layout" svg:width="15.239cm" svg:height="11.429cm" svg:x="1.905cm" svg:y="12.065cm" presentation:class="notes" presentation:placeholder="true" presentation:user-transformed="true">
            <draw:text-box/>
          </draw:frame>
        </presentation:notes>
      </draw:page>
      <draw:page draw:name="Status check" draw:style-name="dp4" draw:master-page-name="CUSTOM_5f_3_5f_1">
        <draw:frame draw:name="Google Shape;267;p44" presentation:style-name="pr43" draw:text-style-name="P5" draw:layer="layout" svg:width="8.548cm" svg:height="0.813cm" svg:x="0.427cm" svg:y="1.31cm" presentation:class="title" presentation:user-transformed="true">
          <draw:text-box>
            <text:p text:style-name="P4"><text:span text:style-name="T8">ステータスチェック</text:span></text:p>
          </draw:text-box>
        </draw:frame>
        <draw:frame draw:name="Google Shape;268;p44" presentation:style-name="pr44" draw:text-style-name="P17" draw:layer="layout" svg:width="8.548cm" svg:height="4.346cm" svg:x="0.427cm" svg:y="2.173cm" presentation:class="subtitle" presentation:user-transformed="true">
          <draw:text-box>
            <text:p text:style-name="P4"><text:span text:style-name="T11">リソースの作成、更新、または削除の過程において、プラットフォームはそのリソースや他のリソースの状態を把握する必要がある場合があります。</text:span></text:p>
            <text:p text:style-name="P4"><text:span text:style-name="T11">例えば、プラットフォームには、優先度高のインシデントが発生している間はデプロイを行わない、あるいは一度に</text:span><text:span text:style-name="T11">1</text:span><text:span text:style-name="T11">つのアップグレードのみを実行するといったルールが設定されている場合があります。</text:span></text:p>
          </draw:text-box>
        </draw:frame>
        <presentation:notes draw:style-name="dp2">
          <draw:page-thumbnail draw:name="Google Shape;264;g2af853010e1_0_571:notes" draw:style-name="gr3" draw:layer="layout" svg:width="13.112cm" svg:height="9.524cm" svg:x="2.969cm" svg:y="1.905cm" draw:page-number="35" presentation:class="page"/>
          <draw:frame draw:name="Google Shape;265;g2af853010e1_0_571:notes" presentation:style-name="pr47" draw:text-style-name="P3" draw:layer="layout" svg:width="15.239cm" svg:height="11.429cm" svg:x="1.905cm" svg:y="12.065cm" presentation:class="notes" presentation:placeholder="true" presentation:user-transformed="true">
            <draw:text-box/>
          </draw:frame>
        </presentation:notes>
      </draw:page>
      <draw:page draw:name="Fetch available options" draw:style-name="dp4" draw:master-page-name="CUSTOM_5f_3_5f_1">
        <draw:frame draw:name="Google Shape;273;p45" presentation:style-name="pr43" draw:text-style-name="P5" draw:layer="layout" svg:width="8.548cm" svg:height="0.813cm" svg:x="0.427cm" svg:y="1.31cm" presentation:class="title" presentation:user-transformed="true">
          <draw:text-box>
            <text:p text:style-name="P4"><text:span text:style-name="T8">利用可能オプションの取得</text:span></text:p>
          </draw:text-box>
        </draw:frame>
        <draw:frame draw:name="Google Shape;274;p45" presentation:style-name="pr44" draw:text-style-name="P17" draw:layer="layout" svg:width="8.548cm" svg:height="4.346cm" svg:x="0.427cm" svg:y="2.173cm" presentation:class="subtitle" presentation:user-transformed="true">
          <draw:text-box>
            <text:p text:style-name="P4"><text:span text:style-name="T11">オプションは動的に変更される場合があり、プロビジョニング時に検証が必要になることがあります。</text:span></text:p>
            <text:p text:style-name="P4"><text:span text:style-name="T11">例えば、プラットフォームが一時的なテスト環境の負荷分散を行っている場合、プラットフォームは現在のテスト環境の状態を取得して、新しいアプリケーションをどこにデプロイすべきかを判断することができます。あるいは、プラットフォームが認証管理のために外部の</text:span><text:span text:style-name="T11">LDAP</text:span><text:span text:style-name="T11">サービスを利用する必要がある場合もあります。</text:span></text:p>
          </draw:text-box>
        </draw:frame>
        <presentation:notes draw:style-name="dp2">
          <draw:page-thumbnail draw:name="Google Shape;270;g2af853010e1_0_576:notes" draw:style-name="gr3" draw:layer="layout" svg:width="13.112cm" svg:height="9.524cm" svg:x="2.969cm" svg:y="1.905cm" draw:page-number="36" presentation:class="page"/>
          <draw:frame draw:name="Google Shape;271;g2af853010e1_0_576:notes" presentation:style-name="pr48" draw:text-style-name="P3" draw:layer="layout" svg:width="15.239cm" svg:height="11.429cm" svg:x="1.905cm" svg:y="12.065cm" presentation:class="notes" presentation:placeholder="true" presentation:user-transformed="true">
            <draw:text-box/>
          </draw:frame>
        </presentation:notes>
      </draw:page>
      <draw:page draw:name="Notification" draw:style-name="dp4" draw:master-page-name="CUSTOM_5f_3_5f_1">
        <draw:frame draw:name="Google Shape;279;p46" presentation:style-name="pr43" draw:text-style-name="P5" draw:layer="layout" svg:width="8.548cm" svg:height="0.813cm" svg:x="0.427cm" svg:y="1.31cm" presentation:class="title" presentation:user-transformed="true">
          <draw:text-box>
            <text:p text:style-name="P4"><text:span text:style-name="T8">通知</text:span></text:p>
          </draw:text-box>
        </draw:frame>
        <draw:frame draw:name="Google Shape;280;p46" presentation:style-name="pr44" draw:text-style-name="P17" draw:layer="layout" svg:width="8.548cm" svg:height="4.346cm" svg:x="0.427cm" svg:y="2.173cm" presentation:class="subtitle" presentation:user-transformed="true">
          <draw:text-box>
            <text:p text:style-name="P4"><text:span text:style-name="T11">リソースをリクエストしたユーザーだけでなく、その他の関係者に対しても、チャットボット、</text:span><text:span text:style-name="T11">SMS</text:span><text:span text:style-name="T11">、メール、その他の通知を送信することができます。</text:span></text:p>
            <text:p text:style-name="P4"><text:span text:style-name="T11">通知は、ユーザーへの情報提供や注意喚起に利用できます。リソースの監査が必要な場合は、レポートプロセスアクションの利用をご検討ください。</text:span></text:p>
          </draw:text-box>
        </draw:frame>
        <presentation:notes draw:style-name="dp2">
          <draw:page-thumbnail draw:name="Google Shape;276;g2af853010e1_0_581:notes" draw:style-name="gr3" draw:layer="layout" svg:width="13.112cm" svg:height="9.524cm" svg:x="2.969cm" svg:y="1.905cm" draw:page-number="37" presentation:class="page"/>
          <draw:frame draw:name="Google Shape;277;g2af853010e1_0_581:notes" presentation:style-name="pr49" draw:text-style-name="P3" draw:layer="layout" svg:width="15.239cm" svg:height="11.429cm" svg:x="1.905cm" svg:y="12.065cm" presentation:class="notes" presentation:placeholder="true" presentation:user-transformed="true">
            <draw:text-box/>
          </draw:frame>
        </presentation:notes>
      </draw:page>
      <draw:page draw:name="Budget check" draw:style-name="dp4" draw:master-page-name="CUSTOM_5f_3_5f_1">
        <draw:frame draw:name="Google Shape;285;p47" presentation:style-name="pr43" draw:text-style-name="P5" draw:layer="layout" svg:width="8.548cm" svg:height="0.813cm" svg:x="0.427cm" svg:y="1.31cm" presentation:class="title" presentation:user-transformed="true">
          <draw:text-box>
            <text:p text:style-name="P4"><text:span text:style-name="T8">予算チェック</text:span></text:p>
          </draw:text-box>
        </draw:frame>
        <draw:frame draw:name="Google Shape;286;p47" presentation:style-name="pr44" draw:text-style-name="P17" draw:layer="layout" svg:width="8.548cm" svg:height="4.346cm" svg:x="0.427cm" svg:y="2.173cm" presentation:class="subtitle" presentation:user-transformed="true">
          <draw:text-box>
            <text:p text:style-name="P4"><text:span text:style-name="T11">組織は、ユーザー、チーム、または組織全体のコストを長期的に追跡する際に、</text:span><text:span text:style-name="T11">FinOps</text:span><text:span text:style-name="T11">を実践することがあります。このプラットフォームは、</text:span><text:span text:style-name="T11">FinOps</text:span><text:span text:style-name="T11">の要件への準拠状況を確認し、その結果に基づいてリソースに対して「許可」「拒否」、または「承認待ちのアラート」のいずれかの措置を講じることができます。</text:span></text:p>
          </draw:text-box>
        </draw:frame>
        <presentation:notes draw:style-name="dp2">
          <draw:page-thumbnail draw:name="Google Shape;282;g2af853010e1_0_586:notes" draw:style-name="gr3" draw:layer="layout" svg:width="13.112cm" svg:height="9.524cm" svg:x="2.969cm" svg:y="1.905cm" draw:page-number="38" presentation:class="page"/>
          <draw:frame draw:name="Google Shape;283;g2af853010e1_0_586:notes" presentation:style-name="pr50" draw:text-style-name="P3" draw:layer="layout" svg:width="15.239cm" svg:height="11.429cm" svg:x="1.905cm" svg:y="12.065cm" presentation:class="notes" presentation:placeholder="true" presentation:user-transformed="true">
            <draw:text-box/>
          </draw:frame>
        </presentation:notes>
      </draw:page>
      <draw:page draw:name="Status update" draw:style-name="dp4" draw:master-page-name="CUSTOM_5f_3_5f_1">
        <draw:frame draw:name="Google Shape;291;p48" presentation:style-name="pr43" draw:text-style-name="P5" draw:layer="layout" svg:width="8.548cm" svg:height="0.813cm" svg:x="0.427cm" svg:y="1.31cm" presentation:class="title" presentation:user-transformed="true">
          <draw:text-box>
            <text:p text:style-name="P4"><text:span text:style-name="T8">ステータス更新</text:span></text:p>
          </draw:text-box>
        </draw:frame>
        <draw:frame draw:name="Google Shape;292;p48" presentation:style-name="pr44" draw:text-style-name="P17" draw:layer="layout" svg:width="8.548cm" svg:height="4.346cm" svg:x="0.427cm" svg:y="2.173cm" presentation:class="subtitle" presentation:user-transformed="true">
          <draw:text-box>
            <text:p text:style-name="P4"><text:span text:style-name="T11">プロビジョニングの終了時にステータスを更新するのが一般的ですが、進行状況を示すために、プロセス全体を通じてステータスを更新したい場合もあるでしょう。</text:span></text:p>
            <text:p text:style-name="P4"><text:span text:style-name="T11">ステータスは、単なる情報提供用である場合もあれば、必要なアクションを示す場合もあります。</text:span></text:p>
          </draw:text-box>
        </draw:frame>
        <presentation:notes draw:style-name="dp2">
          <draw:page-thumbnail draw:name="Google Shape;288;g2af853010e1_0_591:notes" draw:style-name="gr3" draw:layer="layout" svg:width="13.112cm" svg:height="9.524cm" svg:x="2.969cm" svg:y="1.905cm" draw:page-number="39" presentation:class="page"/>
          <draw:frame draw:name="Google Shape;289;g2af853010e1_0_591:notes" presentation:style-name="pr51" draw:text-style-name="P3" draw:layer="layout" svg:width="15.239cm" svg:height="11.429cm" svg:x="1.905cm" svg:y="12.065cm" presentation:class="notes" presentation:placeholder="true" presentation:user-transformed="true">
            <draw:text-box/>
          </draw:frame>
        </presentation:notes>
      </draw:page>
      <draw:page draw:name="Manual approval" draw:style-name="dp4" draw:master-page-name="CUSTOM_5f_3_5f_1">
        <draw:frame draw:name="Google Shape;297;p49" presentation:style-name="pr43" draw:text-style-name="P5" draw:layer="layout" svg:width="8.548cm" svg:height="0.813cm" svg:x="0.427cm" svg:y="1.31cm" presentation:class="title" presentation:user-transformed="true">
          <draw:text-box>
            <text:p text:style-name="P4"><text:span text:style-name="T8">手動による承認</text:span></text:p>
          </draw:text-box>
        </draw:frame>
        <draw:frame draw:name="Google Shape;298;p49" presentation:style-name="pr44" draw:text-style-name="P17" draw:layer="layout" svg:width="8.548cm" svg:height="4.346cm" svg:x="0.427cm" svg:y="2.173cm" presentation:class="subtitle" presentation:user-transformed="true">
          <draw:text-box>
            <text:p text:style-name="P4"><text:span text:style-name="T11">完全な自動化を目指しているとはいえ、コンプライアンス上の理由やこれまでの慣例から、手動による承認が依然として行われており、また行われるべき場合もあります。</text:span></text:p>
            <text:p text:style-name="P4"><text:span text:style-name="T11">このプロセスでは、権限を持つ担当者がリクエストを承認するまで一時停止し、待機することができます。</text:span></text:p>
          </draw:text-box>
        </draw:frame>
        <presentation:notes draw:style-name="dp2">
          <draw:page-thumbnail draw:name="Google Shape;294;g2af853010e1_0_596:notes" draw:style-name="gr3" draw:layer="layout" svg:width="13.112cm" svg:height="9.524cm" svg:x="2.969cm" svg:y="1.905cm" draw:page-number="40" presentation:class="page"/>
          <draw:frame draw:name="Google Shape;295;g2af853010e1_0_596:notes" presentation:style-name="pr52" draw:text-style-name="P3" draw:layer="layout" svg:width="15.239cm" svg:height="11.429cm" svg:x="1.905cm" svg:y="12.065cm" presentation:class="notes" presentation:placeholder="true" presentation:user-transformed="true">
            <draw:text-box/>
          </draw:frame>
        </presentation:notes>
      </draw:page>
      <draw:page draw:name="Resource tagging" draw:style-name="dp4" draw:master-page-name="CUSTOM_5f_3_5f_1">
        <draw:frame draw:name="Google Shape;303;p50" presentation:style-name="pr43" draw:text-style-name="P5" draw:layer="layout" svg:width="8.548cm" svg:height="0.813cm" svg:x="0.427cm" svg:y="1.31cm" presentation:class="title" presentation:user-transformed="true">
          <draw:text-box>
            <text:p text:style-name="P4"><text:span text:style-name="T8">リソースのタグ付け</text:span></text:p>
          </draw:text-box>
        </draw:frame>
        <draw:frame draw:name="Google Shape;304;p50" presentation:style-name="pr44" draw:text-style-name="P17" draw:layer="layout" svg:width="8.548cm" svg:height="4.346cm" svg:x="0.427cm" svg:y="2.173cm" presentation:class="subtitle" presentation:user-transformed="true">
          <draw:text-box>
            <text:p text:style-name="P4"><text:span text:style-name="T11">リソースにタグやラベルを付けることで、所有者の特定などが容易になります。</text:span></text:p>
            <text:p text:style-name="P4"><text:span text:style-name="T11">これらのラベルは、運用部門がリソースを管理する上で役立つだけでなく、組織全体のリソースに対して監査を行う際、財務部門やセキュリティ部門、その他の部門にとっても有益です。</text:span></text:p>
          </draw:text-box>
        </draw:frame>
        <presentation:notes draw:style-name="dp2">
          <draw:page-thumbnail draw:name="Google Shape;300;g2af853010e1_0_601:notes" draw:style-name="gr3" draw:layer="layout" svg:width="13.112cm" svg:height="9.524cm" svg:x="2.969cm" svg:y="1.905cm" draw:page-number="41" presentation:class="page"/>
          <draw:frame draw:name="Google Shape;301;g2af853010e1_0_601:notes" presentation:style-name="pr53" draw:text-style-name="P3" draw:layer="layout" svg:width="15.239cm" svg:height="11.429cm" svg:x="1.905cm" svg:y="12.065cm" presentation:class="notes" presentation:placeholder="true" presentation:user-transformed="true">
            <draw:text-box/>
          </draw:frame>
        </presentation:notes>
      </draw:page>
      <draw:page draw:name="Scheduling rules" draw:style-name="dp4" draw:master-page-name="CUSTOM_5f_3_5f_1">
        <draw:frame draw:name="Google Shape;309;p51" presentation:style-name="pr43" draw:text-style-name="P5" draw:layer="layout" svg:width="8.548cm" svg:height="0.813cm" svg:x="0.427cm" svg:y="1.31cm" presentation:class="title" presentation:user-transformed="true">
          <draw:text-box>
            <text:p text:style-name="P4"><text:span text:style-name="T8">スケジューリングルール</text:span></text:p>
          </draw:text-box>
        </draw:frame>
        <draw:frame draw:name="Google Shape;310;p51" presentation:style-name="pr44" draw:text-style-name="P17" draw:layer="layout" svg:width="8.548cm" svg:height="4.346cm" svg:x="0.427cm" svg:y="2.173cm" presentation:class="subtitle" presentation:user-transformed="true">
          <draw:text-box>
            <text:p text:style-name="P4"><text:span text:style-name="T11">宣言型プロビジョニングを使用する場合、リソースを適切なデプロイ先にスケジューリングする必要があります。</text:span></text:p>
            <text:p text:style-name="P4"><text:span text:style-name="T11">デフォルトでは、リソースは利用可能なデプロイ先のいずれかにスケジューリングされますが、場合によっては、プラットフォームがより具体的なルールを適用し、スケジューリング先の特定のデプロイ先を制御することがあります。</text:span></text:p>
          </draw:text-box>
        </draw:frame>
        <presentation:notes draw:style-name="dp2">
          <draw:page-thumbnail draw:name="Google Shape;306;g2af853010e1_0_606:notes" draw:style-name="gr3" draw:layer="layout" svg:width="13.112cm" svg:height="9.524cm" svg:x="2.969cm" svg:y="1.905cm" draw:page-number="42" presentation:class="page"/>
          <draw:frame draw:name="Google Shape;307;g2af853010e1_0_606:notes" presentation:style-name="pr54" draw:text-style-name="P3" draw:layer="layout" svg:width="15.239cm" svg:height="11.429cm" svg:x="1.905cm" svg:y="12.065cm" presentation:class="notes" presentation:placeholder="true" presentation:user-transformed="true">
            <draw:text-box/>
          </draw:frame>
        </presentation:notes>
      </draw:page>
      <draw:page draw:name="Deprecation management" draw:style-name="dp4" draw:master-page-name="CUSTOM_5f_3_5f_1">
        <draw:frame draw:name="Google Shape;315;p52" presentation:style-name="pr43" draw:text-style-name="P5" draw:layer="layout" svg:width="8.548cm" svg:height="0.813cm" svg:x="0.427cm" svg:y="1.31cm" presentation:class="title" presentation:user-transformed="true">
          <draw:text-box>
            <text:p text:style-name="P4"><text:span text:style-name="T8">非推奨機能の管理</text:span></text:p>
          </draw:text-box>
        </draw:frame>
        <draw:frame draw:name="Google Shape;316;p52" presentation:style-name="pr44" draw:text-style-name="P17" draw:layer="layout" svg:width="8.548cm" svg:height="4.346cm" svg:x="0.427cm" svg:y="2.173cm" presentation:class="subtitle" presentation:user-transformed="true">
          <draw:text-box>
            <text:p text:style-name="P4"><text:span text:style-name="T7">プラットフォームは、古くなった依存関係を特定し、その緊急度を判断し、影響を受ける関係者に通知し、安全なアップグレードを実施するためのプロセスを順守する必要があります。</text:span></text:p>
            <text:p text:style-name="P4"><text:span text:style-name="T7">プラットフォームは、プラットフォーム上のすべての新規および既存のリソースについて、コンプライアンス要件を順守する必要があります。</text:span></text:p>
          </draw:text-box>
        </draw:frame>
        <presentation:notes draw:style-name="dp2">
          <draw:page-thumbnail draw:name="Google Shape;312;g2af853010e1_0_200:notes" draw:style-name="gr3" draw:layer="layout" svg:width="13.112cm" svg:height="9.524cm" svg:x="2.969cm" svg:y="1.905cm" draw:page-number="43" presentation:class="page"/>
          <draw:frame draw:name="Google Shape;313;g2af853010e1_0_200:notes" presentation:style-name="pr55" draw:text-style-name="P3" draw:layer="layout" svg:width="15.239cm" svg:height="11.429cm" svg:x="1.905cm" svg:y="12.065cm" presentation:class="notes" presentation:placeholder="true" presentation:user-transformed="true">
            <draw:text-box/>
          </draw:frame>
        </presentation:notes>
      </draw:page>
      <draw:page draw:name="Reporting" draw:style-name="dp4" draw:master-page-name="CUSTOM_5f_3_5f_1">
        <draw:frame draw:name="Google Shape;321;p53" presentation:style-name="pr43" draw:text-style-name="P5" draw:layer="layout" svg:width="8.548cm" svg:height="0.813cm" svg:x="0.427cm" svg:y="1.31cm" presentation:class="title" presentation:user-transformed="true">
          <draw:text-box>
            <text:p text:style-name="P4"><text:span text:style-name="T8">レポート</text:span></text:p>
          </draw:text-box>
        </draw:frame>
        <draw:frame draw:name="Google Shape;322;p53" presentation:style-name="pr44" draw:text-style-name="P17" draw:layer="layout" svg:width="8.548cm" svg:height="4.346cm" svg:x="0.427cm" svg:y="2.173cm" presentation:class="subtitle" presentation:user-transformed="true">
          <draw:text-box>
            <text:p text:style-name="P4"><text:span text:style-name="T11">コンプライアンス規制やその他の要件によりユーザーのリクエストを追跡する必要がある場合は、プラットフォーム内でのリクエストや変更に関する監査イベントを送信するように設定できます。さらに、プラットフォームはリソースの状態について定期的に自動レポートを作成することも可能です。</text:span></text:p>
            <text:p text:style-name="P4"><text:span text:style-name="T11">単にユーザーへの通知を目的とする場合は、別のオプションとして通知をご確認ください。</text:span></text:p>
          </draw:text-box>
        </draw:frame>
        <presentation:notes draw:style-name="dp2">
          <draw:page-thumbnail draw:name="Google Shape;318;g2af853010e1_0_762:notes" draw:style-name="gr3" draw:layer="layout" svg:width="13.112cm" svg:height="9.524cm" svg:x="2.969cm" svg:y="1.905cm" draw:page-number="44" presentation:class="page"/>
          <draw:frame draw:name="Google Shape;319;g2af853010e1_0_762:notes" presentation:style-name="pr56" draw:text-style-name="P3" draw:layer="layout" svg:width="15.239cm" svg:height="11.429cm" svg:x="1.905cm" svg:y="12.065cm" presentation:class="notes" presentation:placeholder="true" presentation:user-transformed="true">
            <draw:text-box/>
          </draw:frame>
        </presentation:notes>
      </draw:page>
      <draw:page draw:name="Provisioning actions explained" draw:style-name="dp9" draw:master-page-name="CUSTOM_5f_3_5f_2">
        <draw:frame draw:name="Google Shape;327;p54" presentation:style-name="pr57" draw:text-style-name="P18" draw:layer="layout" svg:width="8.548cm" svg:height="0.813cm" svg:x="0.427cm" svg:y="1.31cm" presentation:class="title" presentation:user-transformed="true">
          <draw:text-box>
            <text:p text:style-name="P4"><text:span text:style-name="T13">プロビジョニングアクションの説明</text:span></text:p>
          </draw:text-box>
        </draw:frame>
        <draw:frame draw:name="Google Shape;328;p54" presentation:style-name="pr58" draw:text-style-name="P16" draw:layer="layout" svg:width="8.548cm" svg:height="4.346cm" svg:x="0.427cm" svg:y="2.173cm" presentation:class="subtitle" presentation:user-transformed="true">
          <draw:text-box>
            <text:p text:style-name="P12"><text:span text:style-name="T10">プロビジョニングアクションにより、具体的で実用的なプラットフォームサービスが生成されます。</text:span></text:p>
            <text:p text:style-name="P12"><text:span text:style-name="T10">プロビジョニングには、命令型と宣言型があります。命令型は段階的な手順を実行します。宣言型は望ましい状態を定義します。宣言型プロビジョニングでは、デプロイ先が必須となります。</text:span></text:p>
            <text:p text:style-name="P12"><text:span text:style-name="T10">これらは、依存関係の設定でも、リソースごとの設定でも（あるいはその両方でも）使用できます。</text:span></text:p>
          </draw:text-box>
        </draw:frame>
        <draw:custom-shape draw:name="Google Shape;329;p54" draw:style-name="gr4" draw:text-style-name="P1" draw:layer="layout" svg:width="9.517cm" svg:height="0.001cm" svg:x="-0.005cm" svg:y="1.303cm">
          <text:p/>
          <draw:enhanced-geometry draw:mirror-horizontal="false" draw:mirror-vertical="false" svg:viewBox="0 0 21600 21600" draw:type="mso-spt32" draw:enhanced-path="M 0 0 L 21600 21600 N"/>
        </draw:custom-shape>
        <presentation:notes draw:style-name="dp2">
          <draw:page-thumbnail draw:name="Google Shape;324;g2af853010e1_0_149:notes" draw:style-name="gr3" draw:layer="layout" svg:width="13.112cm" svg:height="9.524cm" svg:x="2.969cm" svg:y="1.905cm" draw:page-number="45" presentation:class="page"/>
          <draw:frame draw:name="Google Shape;325;g2af853010e1_0_149:notes" presentation:style-name="pr59" draw:text-style-name="P3" draw:layer="layout" svg:width="15.239cm" svg:height="11.429cm" svg:x="1.905cm" svg:y="12.065cm" presentation:class="notes" presentation:placeholder="true" presentation:user-transformed="true">
            <draw:text-box/>
          </draw:frame>
        </presentation:notes>
      </draw:page>
      <draw:page draw:name="Infrastructure" draw:style-name="dp4" draw:master-page-name="CUSTOM_5f_3_5f_2">
        <draw:frame draw:name="Google Shape;334;p55" presentation:style-name="pr57" draw:text-style-name="P5" draw:layer="layout" svg:width="8.548cm" svg:height="0.813cm" svg:x="0.427cm" svg:y="1.31cm" presentation:class="title" presentation:user-transformed="true">
          <draw:text-box>
            <text:p text:style-name="P4"><text:span text:style-name="T8">インフラストラクチャ</text:span></text:p>
          </draw:text-box>
        </draw:frame>
        <draw:frame draw:name="Google Shape;335;p55" presentation:style-name="pr58" draw:text-style-name="P16" draw:layer="layout" svg:width="8.548cm" svg:height="4.346cm" svg:x="0.427cm" svg:y="2.173cm" presentation:class="subtitle" presentation:user-transformed="true">
          <draw:text-box>
            <text:p text:style-name="P12"><text:span text:style-name="T7">インフラストラクチャとは、コンピューティング、データストレージ、ネットワーク、その他のリソースを実行できるクラウドまたは物理ハードウェアのことです。</text:span></text:p>
            <text:p text:style-name="P12"><text:span text:style-name="T7">インフラストラクチャは、完全な単体（アップルパイ全体のようなもの）として提供される場合もあれば、共有リソースの一部（パイの一切れのようなもの）として提供される場合もあります。いずれの場合も、定義されたインフラストラクチャを割り当てることになります。例としては、サーバー、データベース、</text:span><text:span text:style-name="T7">Kubernetes</text:span><text:span text:style-name="T7">クラスターなどが挙げられます。</text:span></text:p>
          </draw:text-box>
        </draw:frame>
        <presentation:notes draw:style-name="dp2">
          <draw:page-thumbnail draw:name="Google Shape;331;g2af853010e1_0_616:notes" draw:style-name="gr3" draw:layer="layout" svg:width="13.112cm" svg:height="9.524cm" svg:x="2.969cm" svg:y="1.905cm" draw:page-number="46" presentation:class="page"/>
          <draw:frame draw:name="Google Shape;332;g2af853010e1_0_616:notes" presentation:style-name="pr60" draw:text-style-name="P3" draw:layer="layout" svg:width="15.239cm" svg:height="11.429cm" svg:x="1.905cm" svg:y="12.065cm" presentation:class="notes" presentation:placeholder="true" presentation:user-transformed="true">
            <draw:text-box/>
          </draw:frame>
        </presentation:notes>
      </draw:page>
      <draw:page draw:name="Software as a Service (SaaS)" draw:style-name="dp4" draw:master-page-name="CUSTOM_5f_3_5f_2">
        <draw:frame draw:name="Google Shape;340;p56" presentation:style-name="pr57" draw:text-style-name="P10" draw:layer="layout" svg:width="8.548cm" svg:height="0.813cm" svg:x="0.427cm" svg:y="1.31cm" presentation:class="title" presentation:user-transformed="true">
          <draw:text-box>
            <text:p text:style-name="P19"><text:span text:style-name="T12">Software as a Service (SaaS)</text:span></text:p>
          </draw:text-box>
        </draw:frame>
        <draw:frame draw:name="Google Shape;341;p56" presentation:style-name="pr58" draw:text-style-name="P17" draw:layer="layout" svg:width="8.548cm" svg:height="4.346cm" svg:x="0.427cm" svg:y="2.173cm" presentation:class="subtitle" presentation:user-transformed="true">
          <draw:text-box>
            <text:p text:style-name="P4"><text:span text:style-name="T11">SaaS</text:span><text:span text:style-name="T11">製品の設定を管理します。たとえば、ユーザーアカウントの追加、リソースの作成、設定の更新などです。</text:span></text:p>
          </draw:text-box>
        </draw:frame>
        <presentation:notes draw:style-name="dp2">
          <draw:page-thumbnail draw:name="Google Shape;337;g2af853010e1_0_621:notes" draw:style-name="gr3" draw:layer="layout" svg:width="13.112cm" svg:height="9.524cm" svg:x="2.969cm" svg:y="1.905cm" draw:page-number="47" presentation:class="page"/>
          <draw:frame draw:name="Google Shape;338;g2af853010e1_0_621:notes" presentation:style-name="pr61" draw:text-style-name="P3" draw:layer="layout" svg:width="15.239cm" svg:height="11.429cm" svg:x="1.905cm" svg:y="12.065cm" presentation:class="notes" presentation:placeholder="true" presentation:user-transformed="true">
            <draw:text-box/>
          </draw:frame>
        </presentation:notes>
      </draw:page>
      <draw:page draw:name="Kubernetes cluster" draw:style-name="dp4" draw:master-page-name="CUSTOM_5f_3_5f_2">
        <draw:frame draw:name="Google Shape;346;p57" presentation:style-name="pr57" draw:text-style-name="P5" draw:layer="layout" svg:width="8.548cm" svg:height="0.813cm" svg:x="0.427cm" svg:y="1.31cm" presentation:class="title" presentation:user-transformed="true">
          <draw:text-box>
            <text:p text:style-name="P4"><text:span text:style-name="T8">Kubernetes </text:span><text:span text:style-name="T8">クラスター</text:span></text:p>
          </draw:text-box>
        </draw:frame>
        <draw:frame draw:name="Google Shape;347;p57" presentation:style-name="pr58" draw:text-style-name="P17" draw:layer="layout" svg:width="8.548cm" svg:height="4.346cm" svg:x="0.427cm" svg:y="2.173cm" presentation:class="subtitle" presentation:user-transformed="true">
          <draw:text-box>
            <text:p text:style-name="P4"><text:span text:style-name="T7">リソースは</text:span><text:span text:style-name="T7">Kubernetes</text:span><text:span text:style-name="T7">にデプロイ可能ですが、追加のプロビジョニングを行うために</text:span><text:span text:style-name="T7">Kubernetes</text:span><text:span text:style-name="T7">クラスターの作成が必要になる場合があります。</text:span></text:p>
          </draw:text-box>
        </draw:frame>
        <presentation:notes draw:style-name="dp2">
          <draw:page-thumbnail draw:name="Google Shape;343;g2af853010e1_0_626:notes" draw:style-name="gr3" draw:layer="layout" svg:width="13.112cm" svg:height="9.524cm" svg:x="2.969cm" svg:y="1.905cm" draw:page-number="48" presentation:class="page"/>
          <draw:frame draw:name="Google Shape;344;g2af853010e1_0_626:notes" presentation:style-name="pr62" draw:text-style-name="P3" draw:layer="layout" svg:width="15.239cm" svg:height="11.429cm" svg:x="1.905cm" svg:y="12.065cm" presentation:class="notes" presentation:placeholder="true" presentation:user-transformed="true">
            <draw:text-box/>
          </draw:frame>
        </presentation:notes>
      </draw:page>
      <draw:page draw:name="Credentials" draw:style-name="dp4" draw:master-page-name="CUSTOM_5f_3_5f_2">
        <draw:frame draw:name="Google Shape;352;p58" presentation:style-name="pr57" draw:text-style-name="P5" draw:layer="layout" svg:width="8.548cm" svg:height="0.813cm" svg:x="0.427cm" svg:y="1.31cm" presentation:class="title" presentation:user-transformed="true">
          <draw:text-box>
            <text:p text:style-name="P4"><text:span text:style-name="T8">認証情報</text:span></text:p>
          </draw:text-box>
        </draw:frame>
        <draw:frame draw:name="Google Shape;353;p58" presentation:style-name="pr58" draw:text-style-name="P17" draw:layer="layout" svg:width="8.548cm" svg:height="4.346cm" svg:x="0.427cm" svg:y="2.173cm" presentation:class="subtitle" presentation:user-transformed="true">
          <draw:text-box>
            <text:p text:style-name="P4"><text:span text:style-name="T11">要求されたリソースを作成およびアクセスするために使用する認証情報を作成または取得します。</text:span></text:p>
            <text:p text:style-name="P4"><text:span text:style-name="T11">認証情報は、</text:span><text:span text:style-name="T11">1</text:span><text:span text:style-name="T11">つ以上のユースケースにおいて、</text:span><text:span text:style-name="T11">1</text:span><text:span text:style-name="T11">人以上のユーザーによって使用される場合があります。そのため、認証情報には複数の場所からアクセスしたり、複数のリクエストで参照されたりする必要がある場合があります。</text:span></text:p>
          </draw:text-box>
        </draw:frame>
        <presentation:notes draw:style-name="dp2">
          <draw:page-thumbnail draw:name="Google Shape;349;g2af853010e1_0_631:notes" draw:style-name="gr3" draw:layer="layout" svg:width="13.112cm" svg:height="9.524cm" svg:x="2.969cm" svg:y="1.905cm" draw:page-number="49" presentation:class="page"/>
          <draw:frame draw:name="Google Shape;350;g2af853010e1_0_631:notes" presentation:style-name="pr63" draw:text-style-name="P3" draw:layer="layout" svg:width="15.239cm" svg:height="11.429cm" svg:x="1.905cm" svg:y="12.065cm" presentation:class="notes" presentation:placeholder="true" presentation:user-transformed="true">
            <draw:text-box/>
          </draw:frame>
        </presentation:notes>
      </draw:page>
      <draw:page draw:name="Cloud account" draw:style-name="dp4" draw:master-page-name="CUSTOM_5f_3_5f_2">
        <draw:frame draw:name="Google Shape;358;p59" presentation:style-name="pr57" draw:text-style-name="P5" draw:layer="layout" svg:width="8.548cm" svg:height="0.813cm" svg:x="0.427cm" svg:y="1.31cm" presentation:class="title" presentation:user-transformed="true">
          <draw:text-box>
            <text:p text:style-name="P4"><text:span text:style-name="T8">クラウドアカウント</text:span></text:p>
          </draw:text-box>
        </draw:frame>
        <draw:frame draw:name="Google Shape;359;p59" presentation:style-name="pr58" draw:text-style-name="P17" draw:layer="layout" svg:width="8.548cm" svg:height="4.346cm" svg:x="0.427cm" svg:y="2.173cm" presentation:class="subtitle" presentation:user-transformed="true">
          <draw:text-box>
            <text:p text:style-name="P4"><text:span text:style-name="T7">リソースはクラウドプロバイダーにデプロイすることができ、追加のプロビジョニングを行うためにアカウントの作成が必要になる場合があります。</text:span></text:p>
          </draw:text-box>
        </draw:frame>
        <presentation:notes draw:style-name="dp2">
          <draw:page-thumbnail draw:name="Google Shape;355;g2af853010e1_0_641:notes" draw:style-name="gr3" draw:layer="layout" svg:width="13.112cm" svg:height="9.524cm" svg:x="2.969cm" svg:y="1.905cm" draw:page-number="50" presentation:class="page"/>
          <draw:frame draw:name="Google Shape;356;g2af853010e1_0_641:notes" presentation:style-name="pr64" draw:text-style-name="P3" draw:layer="layout" svg:width="15.239cm" svg:height="11.429cm" svg:x="1.905cm" svg:y="12.065cm" presentation:class="notes" presentation:placeholder="true" presentation:user-transformed="true">
            <draw:text-box/>
          </draw:frame>
        </presentation:notes>
      </draw:page>
      <draw:page draw:name="Kubernetes namespace" draw:style-name="dp4" draw:master-page-name="CUSTOM_5f_3_5f_2">
        <draw:frame draw:name="Google Shape;364;p60" presentation:style-name="pr57" draw:text-style-name="P5" draw:layer="layout" svg:width="8.548cm" svg:height="0.813cm" svg:x="0.427cm" svg:y="1.31cm" presentation:class="title" presentation:user-transformed="true">
          <draw:text-box>
            <text:p text:style-name="P4"><text:span text:style-name="T8">Kubernetes </text:span><text:span text:style-name="T8">名前空間</text:span></text:p>
          </draw:text-box>
        </draw:frame>
        <draw:frame draw:name="Google Shape;365;p60" presentation:style-name="pr58" draw:text-style-name="P17" draw:layer="layout" svg:width="8.548cm" svg:height="4.346cm" svg:x="0.427cm" svg:y="2.173cm" presentation:class="subtitle" presentation:user-transformed="true">
          <draw:text-box>
            <text:p text:style-name="P4"><text:span text:style-name="T11">リソースは</text:span><text:span text:style-name="T11">Kubernetes</text:span><text:span text:style-name="T11">にデプロイ可能ですが、追加のプロビジョニングを行うために</text:span><text:span text:style-name="T11">Kubernetes</text:span><text:span text:style-name="T11">名前空間を作成する必要がある場合があります。</text:span></text:p>
          </draw:text-box>
        </draw:frame>
        <presentation:notes draw:style-name="dp2">
          <draw:page-thumbnail draw:name="Google Shape;361;g2af853010e1_0_646:notes" draw:style-name="gr3" draw:layer="layout" svg:width="13.112cm" svg:height="9.524cm" svg:x="2.969cm" svg:y="1.905cm" draw:page-number="51" presentation:class="page"/>
          <draw:frame draw:name="Google Shape;362;g2af853010e1_0_646:notes" presentation:style-name="pr65" draw:text-style-name="P3" draw:layer="layout" svg:width="15.239cm" svg:height="11.429cm" svg:x="1.905cm" svg:y="12.065cm" presentation:class="notes" presentation:placeholder="true" presentation:user-transformed="true">
            <draw:text-box/>
          </draw:frame>
        </presentation:notes>
      </draw:page>
      <draw:page draw:name="Configuration" draw:style-name="dp4" draw:master-page-name="CUSTOM_5f_3_5f_2">
        <draw:frame draw:name="Google Shape;370;p61" presentation:style-name="pr57" draw:text-style-name="P5" draw:layer="layout" svg:width="8.548cm" svg:height="0.813cm" svg:x="0.427cm" svg:y="1.31cm" presentation:class="title" presentation:user-transformed="true">
          <draw:text-box>
            <text:p text:style-name="P4"><text:span text:style-name="T8">設定情報</text:span></text:p>
          </draw:text-box>
        </draw:frame>
        <draw:frame draw:name="Google Shape;371;p61" presentation:style-name="pr58" draw:text-style-name="P17" draw:layer="layout" svg:width="8.548cm" svg:height="4.346cm" svg:x="0.427cm" svg:y="2.173cm" presentation:class="subtitle" presentation:user-transformed="true">
          <draw:text-box>
            <text:p text:style-name="P4"><text:span text:style-name="T7">設定情報とは、リソースに対する固有の設定を指します。</text:span></text:p>
            <text:p text:style-name="P4"><text:span text:style-name="T7">リソースには、グローバル設定やユーザーごとの設定が存在する場合があります。ユースケースによっては、他のリクエストの設定と組み合わせる必要がある場合があります。</text:span></text:p>
          </draw:text-box>
        </draw:frame>
        <presentation:notes draw:style-name="dp2">
          <draw:page-thumbnail draw:name="Google Shape;367;g2af853010e1_0_651:notes" draw:style-name="gr3" draw:layer="layout" svg:width="13.112cm" svg:height="9.524cm" svg:x="2.969cm" svg:y="1.905cm" draw:page-number="52" presentation:class="page"/>
          <draw:frame draw:name="Google Shape;368;g2af853010e1_0_651:notes" presentation:style-name="pr66" draw:text-style-name="P3" draw:layer="layout" svg:width="15.239cm" svg:height="11.429cm" svg:x="1.905cm" svg:y="12.065cm" presentation:class="notes" presentation:placeholder="true" presentation:user-transformed="true">
            <draw:text-box/>
          </draw:frame>
        </presentation:notes>
      </draw:page>
      <draw:page draw:name="Git repository" draw:style-name="dp4" draw:master-page-name="CUSTOM_5f_3_5f_2">
        <draw:frame draw:name="Google Shape;376;p62" presentation:style-name="pr57" draw:text-style-name="P5" draw:layer="layout" svg:width="8.548cm" svg:height="0.813cm" svg:x="0.427cm" svg:y="1.31cm" presentation:class="title" presentation:user-transformed="true">
          <draw:text-box>
            <text:p text:style-name="P4"><text:span text:style-name="T8">Git </text:span><text:span text:style-name="T8">リポジトリ</text:span></text:p>
          </draw:text-box>
        </draw:frame>
        <draw:frame draw:name="Google Shape;377;p62" presentation:style-name="pr58" draw:text-style-name="P17" draw:layer="layout" svg:width="8.548cm" svg:height="4.346cm" svg:x="0.427cm" svg:y="2.173cm" presentation:class="subtitle" presentation:user-transformed="true">
          <draw:text-box>
            <text:p text:style-name="P4"><text:span text:style-name="T11">プラットフォームが新規サービスの立ち上げ機能を提供している場合、初期のサンプルアプリケーションやデプロイメントも併せて提供するのが一般的です。</text:span></text:p>
            <text:p text:style-name="P4"><text:span text:style-name="T11">この処理は、単にリポジトリを作成してユーザーに引き渡すという命令型のアプローチで行うことも、プラットフォーム側が特定の設定を把握し、場合によっては制御することで継続的なサポートを提供する宣言型のアプローチで行うこともできます。</text:span></text:p>
          </draw:text-box>
        </draw:frame>
        <presentation:notes draw:style-name="dp2">
          <draw:page-thumbnail draw:name="Google Shape;373;g2af853010e1_0_671:notes" draw:style-name="gr3" draw:layer="layout" svg:width="13.112cm" svg:height="9.524cm" svg:x="2.969cm" svg:y="1.905cm" draw:page-number="53" presentation:class="page"/>
          <draw:frame draw:name="Google Shape;374;g2af853010e1_0_671:notes" presentation:style-name="pr67" draw:text-style-name="P3" draw:layer="layout" svg:width="15.239cm" svg:height="11.429cm" svg:x="1.905cm" svg:y="12.065cm" presentation:class="notes" presentation:placeholder="true" presentation:user-transformed="true">
            <draw:text-box/>
          </draw:frame>
        </presentation:notes>
      </draw:page>
      <draw:page draw:name="Identity &amp; Access" draw:style-name="dp4" draw:master-page-name="CUSTOM_5f_3_5f_2">
        <draw:frame draw:name="Google Shape;382;p63" presentation:style-name="pr57" draw:text-style-name="P5" draw:layer="layout" svg:width="8.548cm" svg:height="0.813cm" svg:x="0.427cm" svg:y="1.31cm" presentation:class="title" presentation:user-transformed="true">
          <draw:text-box>
            <text:p text:style-name="P4"><text:span text:style-name="T8">ID</text:span><text:span text:style-name="T8">とアクセス</text:span></text:p>
          </draw:text-box>
        </draw:frame>
        <draw:frame draw:name="Google Shape;383;p63" presentation:style-name="pr58" draw:text-style-name="P17" draw:layer="layout" svg:width="8.548cm" svg:height="4.346cm" svg:x="0.427cm" svg:y="2.173cm" presentation:class="subtitle" presentation:user-transformed="true">
          <draw:text-box>
            <text:p text:style-name="P4"><text:span text:style-name="T11">IAM</text:span><text:span text:style-name="T11">（</text:span><text:span text:style-name="T11">AuthN/AuthZ</text:span><text:span text:style-name="T11">）は、適切なユーザーが適切なリソースのみにアクセスできるようにするための、一連のルールと権限のセットです。</text:span></text:p>
            <text:p text:style-name="P4"><text:span text:style-name="T11">ルールによっては複数のユーザーに適用されるものもあれば、より具体的なものもあります。例えば、すべてのユーザーに</text:span><text:span text:style-name="T11">2</text:span><text:span text:style-name="T11">要素認証を義務付ける一方で、特定のリソースへのアクセスはリクエストを行ったユーザーに限定されるといったケースが考えられます。</text:span></text:p>
          </draw:text-box>
        </draw:frame>
        <presentation:notes draw:style-name="dp2">
          <draw:page-thumbnail draw:name="Google Shape;379;g2af853010e1_0_205:notes" draw:style-name="gr3" draw:layer="layout" svg:width="13.112cm" svg:height="9.524cm" svg:x="2.969cm" svg:y="1.905cm" draw:page-number="54" presentation:class="page"/>
          <draw:frame draw:name="Google Shape;380;g2af853010e1_0_205:notes" presentation:style-name="pr68" draw:text-style-name="P3" draw:layer="layout" svg:width="15.239cm" svg:height="11.429cm" svg:x="1.905cm" svg:y="12.065cm" presentation:class="notes" presentation:placeholder="true" presentation:user-transformed="true">
            <draw:text-box/>
          </draw:frame>
        </presentation:notes>
      </draw:page>
      <draw:page draw:name="Existing resources" draw:style-name="dp4" draw:master-page-name="CUSTOM_5f_3_5f_2">
        <draw:frame draw:name="Google Shape;388;p64" presentation:style-name="pr57" draw:text-style-name="P5" draw:layer="layout" svg:width="8.548cm" svg:height="0.813cm" svg:x="0.427cm" svg:y="1.31cm" presentation:class="title" presentation:user-transformed="true">
          <draw:text-box>
            <text:p text:style-name="P4"><text:span text:style-name="T8">既存のリソース</text:span></text:p>
          </draw:text-box>
        </draw:frame>
        <draw:frame draw:name="Google Shape;389;p64" presentation:style-name="pr58" draw:text-style-name="P17" draw:layer="layout" svg:width="8.548cm" svg:height="4.346cm" svg:x="0.427cm" svg:y="2.173cm" presentation:class="subtitle" presentation:user-transformed="true">
          <draw:text-box>
            <text:p text:style-name="P4"><text:span text:style-name="T11">一部のリソースは、複数の依存関係とライフサイクルを共有しています。たとえば、アプリケーションは常にそのデータベースとともにプロビジョニングおよび廃止される場合があります。</text:span></text:p>
            <text:p text:style-name="P4"><text:span text:style-name="T11">ルールによっては、プラットフォームはアプリケーションに対する単一のリクエストを受け入れ、そのアプリケーションに関連するデータベースのみを残すことを選択する場合があります。</text:span></text:p>
          </draw:text-box>
        </draw:frame>
        <presentation:notes draw:style-name="dp2">
          <draw:page-thumbnail draw:name="Google Shape;385;g2af853010e1_0_757:notes" draw:style-name="gr3" draw:layer="layout" svg:width="13.112cm" svg:height="9.524cm" svg:x="2.969cm" svg:y="1.905cm" draw:page-number="55" presentation:class="page"/>
          <draw:frame draw:name="Google Shape;386;g2af853010e1_0_757:notes" presentation:style-name="pr69"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igtree" svg:font-family="Figtree"/>
    <style:font-face style:name="Figtree Medium" svg:font-family="'Figtree Medium'"/>
    <style:font-face style:name="Figtree SemiBold" svg:font-family="'Figtree SemiBol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JP" svg:font-family="'Noto Sans JP'" style:font-adornments="Medium" style:font-family-generic="swiss" style:font-pitch="variable"/>
    <style:font-face style:name="Noto Sans JP1" svg:font-family="'Noto Sans J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4B0000004B07085C759.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CUSTOM_5f_5-background" style:display-name="CUSTOM_5-background" style:family="presentation">
      <style:graphic-properties draw:stroke="none" draw:fill="solid" draw:fill-color="#ffffff"/>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background" style:display-name="CUSTOM_4_1_1_1_1_1-background" style:family="presentation">
      <style:graphic-properties draw:stroke="none" draw:fill="bitmap" draw:fill-image-name="msFillBitmap_20_1" style:repeat="stretch"/>
      <style:text-properties style:letter-kerning="true"/>
    </style:style>
    <style:style style:name="CUSTOM_5f_4_5f_1_5f_1_5f_1_5f_1_5f_1-backgroundobjects" style:display-name="CUSTOM_4_1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_5f_1_5f_1-notes" style:display-name="CUSTOM_4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_5f_1_5f_1-outline1" style:display-name="CUSTOM_4_1_1_1_1_1-outline1" style:family="presentation">
      <style:graphic-properties draw:stroke="none" draw:fill="none" draw:auto-grow-height="false" draw:fit-to-size="false" style:shrink-to-fit="true">
        <text:list-style style:name="CUSTOM_5f_4_5f_1_5f_1_5f_1_5f_1_5f_1-outline1" style:display-name="CUSTOM_4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outline2" style:display-name="CUSTOM_4_1_1_1_1_1-outline2" style:family="presentation" style:parent-style-name="CUSTOM_5f_4_5f_1_5f_1_5f_1_5f_1_5f_1-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3" style:display-name="CUSTOM_4_1_1_1_1_1-outline3" style:family="presentation" style:parent-style-name="CUSTOM_5f_4_5f_1_5f_1_5f_1_5f_1_5f_1-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4" style:display-name="CUSTOM_4_1_1_1_1_1-outline4" style:family="presentation" style:parent-style-name="CUSTOM_5f_4_5f_1_5f_1_5f_1_5f_1_5f_1-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outline5" style:display-name="CUSTOM_4_1_1_1_1_1-outline5" style:family="presentation" style:parent-style-name="CUSTOM_5f_4_5f_1_5f_1_5f_1_5f_1_5f_1-outline4">
      <style:paragraph-properties fo:margin-top="0.1cm" fo:margin-bottom="0cm"/>
      <style:text-properties fo:font-size="20pt" style:font-size-asian="20pt" style:font-size-complex="20pt"/>
    </style:style>
    <style:style style:name="CUSTOM_5f_4_5f_1_5f_1_5f_1_5f_1_5f_1-outline6" style:display-name="CUSTOM_4_1_1_1_1_1-outline6" style:family="presentation" style:parent-style-name="CUSTOM_5f_4_5f_1_5f_1_5f_1_5f_1_5f_1-outline5">
      <style:paragraph-properties fo:margin-top="0.1cm" fo:margin-bottom="0cm"/>
      <style:text-properties fo:font-size="20pt" style:font-size-asian="20pt" style:font-size-complex="20pt"/>
    </style:style>
    <style:style style:name="CUSTOM_5f_4_5f_1_5f_1_5f_1_5f_1_5f_1-outline7" style:display-name="CUSTOM_4_1_1_1_1_1-outline7" style:family="presentation" style:parent-style-name="CUSTOM_5f_4_5f_1_5f_1_5f_1_5f_1_5f_1-outline6">
      <style:paragraph-properties fo:margin-top="0.1cm" fo:margin-bottom="0cm"/>
      <style:text-properties fo:font-size="20pt" style:font-size-asian="20pt" style:font-size-complex="20pt"/>
    </style:style>
    <style:style style:name="CUSTOM_5f_4_5f_1_5f_1_5f_1_5f_1_5f_1-outline8" style:display-name="CUSTOM_4_1_1_1_1_1-outline8" style:family="presentation" style:parent-style-name="CUSTOM_5f_4_5f_1_5f_1_5f_1_5f_1_5f_1-outline7">
      <style:paragraph-properties fo:margin-top="0.1cm" fo:margin-bottom="0cm"/>
      <style:text-properties fo:font-size="20pt" style:font-size-asian="20pt" style:font-size-complex="20pt"/>
    </style:style>
    <style:style style:name="CUSTOM_5f_4_5f_1_5f_1_5f_1_5f_1_5f_1-outline9" style:display-name="CUSTOM_4_1_1_1_1_1-outline9" style:family="presentation" style:parent-style-name="CUSTOM_5f_4_5f_1_5f_1_5f_1_5f_1_5f_1-outline8">
      <style:paragraph-properties fo:margin-top="0.1cm" fo:margin-bottom="0cm"/>
      <style:text-properties fo:font-size="20pt" style:font-size-asian="20pt" style:font-size-complex="20pt"/>
    </style:style>
    <style:style style:name="CUSTOM_5f_4_5f_1_5f_1_5f_1_5f_1_5f_1-subtitle" style:display-name="CUSTOM_4_1_1_1_1_1-subtitle" style:family="presentation">
      <style:graphic-properties draw:stroke="none" draw:fill="none" draw:textarea-vertical-align="middle">
        <text:list-style style:name="CUSTOM_5f_4_5f_1_5f_1_5f_1_5f_1_5f_1-subtitle" style:display-name="CUSTOM_4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_5f_1_5f_1-title" style:display-name="CUSTOM_4_1_1_1_1_1-title" style:family="presentation">
      <style:graphic-properties draw:stroke="none" draw:fill="none" draw:textarea-vertical-align="middle">
        <text:list-style style:name="CUSTOM_5f_4_5f_1_5f_1_5f_1_5f_1_5f_1-title" style:display-name="CUSTOM_4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_5f_1-background" style:display-name="CUSTOM_4_1_1_1_1_1_1-background" style:family="presentation">
      <style:graphic-properties draw:stroke="none" draw:fill="solid" draw:fill-color="#ffffff"/>
      <style:text-properties style:letter-kerning="true"/>
    </style:style>
    <style:style style:name="CUSTOM_5f_4_5f_1_5f_1_5f_1_5f_1_5f_1_5f_1-backgroundobjects" style:display-name="CUSTOM_4_1_1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_5f_1_5f_1_5f_1-notes" style:display-name="CUSTOM_4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_5f_1_5f_1_5f_1-outline1" style:display-name="CUSTOM_4_1_1_1_1_1_1-outline1" style:family="presentation">
      <style:graphic-properties draw:stroke="none" draw:fill="none" draw:auto-grow-height="false" draw:fit-to-size="false" style:shrink-to-fit="true">
        <text:list-style style:name="CUSTOM_5f_4_5f_1_5f_1_5f_1_5f_1_5f_1_5f_1-outline1" style:display-name="CUSTOM_4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_5f_1_5f_1_5f_1-outline2" style:display-name="CUSTOM_4_1_1_1_1_1_1-outline2" style:family="presentation" style:parent-style-name="CUSTOM_5f_4_5f_1_5f_1_5f_1_5f_1_5f_1_5f_1-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3" style:display-name="CUSTOM_4_1_1_1_1_1_1-outline3" style:family="presentation" style:parent-style-name="CUSTOM_5f_4_5f_1_5f_1_5f_1_5f_1_5f_1_5f_1-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4" style:display-name="CUSTOM_4_1_1_1_1_1_1-outline4" style:family="presentation" style:parent-style-name="CUSTOM_5f_4_5f_1_5f_1_5f_1_5f_1_5f_1_5f_1-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_5f_1_5f_1_5f_1-outline5" style:display-name="CUSTOM_4_1_1_1_1_1_1-outline5" style:family="presentation" style:parent-style-name="CUSTOM_5f_4_5f_1_5f_1_5f_1_5f_1_5f_1_5f_1-outline4">
      <style:paragraph-properties fo:margin-top="0.1cm" fo:margin-bottom="0cm"/>
      <style:text-properties fo:font-size="20pt" style:font-size-asian="20pt" style:font-size-complex="20pt"/>
    </style:style>
    <style:style style:name="CUSTOM_5f_4_5f_1_5f_1_5f_1_5f_1_5f_1_5f_1-outline6" style:display-name="CUSTOM_4_1_1_1_1_1_1-outline6" style:family="presentation" style:parent-style-name="CUSTOM_5f_4_5f_1_5f_1_5f_1_5f_1_5f_1_5f_1-outline5">
      <style:paragraph-properties fo:margin-top="0.1cm" fo:margin-bottom="0cm"/>
      <style:text-properties fo:font-size="20pt" style:font-size-asian="20pt" style:font-size-complex="20pt"/>
    </style:style>
    <style:style style:name="CUSTOM_5f_4_5f_1_5f_1_5f_1_5f_1_5f_1_5f_1-outline7" style:display-name="CUSTOM_4_1_1_1_1_1_1-outline7" style:family="presentation" style:parent-style-name="CUSTOM_5f_4_5f_1_5f_1_5f_1_5f_1_5f_1_5f_1-outline6">
      <style:paragraph-properties fo:margin-top="0.1cm" fo:margin-bottom="0cm"/>
      <style:text-properties fo:font-size="20pt" style:font-size-asian="20pt" style:font-size-complex="20pt"/>
    </style:style>
    <style:style style:name="CUSTOM_5f_4_5f_1_5f_1_5f_1_5f_1_5f_1_5f_1-outline8" style:display-name="CUSTOM_4_1_1_1_1_1_1-outline8" style:family="presentation" style:parent-style-name="CUSTOM_5f_4_5f_1_5f_1_5f_1_5f_1_5f_1_5f_1-outline7">
      <style:paragraph-properties fo:margin-top="0.1cm" fo:margin-bottom="0cm"/>
      <style:text-properties fo:font-size="20pt" style:font-size-asian="20pt" style:font-size-complex="20pt"/>
    </style:style>
    <style:style style:name="CUSTOM_5f_4_5f_1_5f_1_5f_1_5f_1_5f_1_5f_1-outline9" style:display-name="CUSTOM_4_1_1_1_1_1_1-outline9" style:family="presentation" style:parent-style-name="CUSTOM_5f_4_5f_1_5f_1_5f_1_5f_1_5f_1_5f_1-outline8">
      <style:paragraph-properties fo:margin-top="0.1cm" fo:margin-bottom="0cm"/>
      <style:text-properties fo:font-size="20pt" style:font-size-asian="20pt" style:font-size-complex="20pt"/>
    </style:style>
    <style:style style:name="CUSTOM_5f_4_5f_1_5f_1_5f_1_5f_1_5f_1_5f_1-subtitle" style:display-name="CUSTOM_4_1_1_1_1_1_1-subtitle" style:family="presentation">
      <style:graphic-properties draw:stroke="none" draw:fill="none" draw:textarea-vertical-align="middle">
        <text:list-style style:name="CUSTOM_5f_4_5f_1_5f_1_5f_1_5f_1_5f_1_5f_1-subtitle" style:display-name="CUSTOM_4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_5f_1_5f_1_5f_1-title" style:display-name="CUSTOM_4_1_1_1_1_1_1-title" style:family="presentation">
      <style:graphic-properties draw:stroke="none" draw:fill="none" draw:textarea-vertical-align="middle">
        <text:list-style style:name="CUSTOM_5f_4_5f_1_5f_1_5f_1_5f_1_5f_1_5f_1-title" style:display-name="CUSTOM_4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fffff"/>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2-background" style:display-name="CUSTOM_3_2-background" style:family="presentation">
      <style:graphic-properties draw:stroke="none" draw:fill="solid" draw:fill-color="#ffffff"/>
      <style:text-properties style:letter-kerning="true"/>
    </style:style>
    <style:style style:name="CUSTOM_5f_3_5f_2-backgroundobjects" style:display-name="CUSTOM_3_2-backgroundobjects" style:family="presentation">
      <style:graphic-properties draw:textarea-horizontal-align="justify" draw:shadow="hidden" draw:shadow-offset-x="0.2cm" draw:shadow-offset-y="0.2cm" draw:shadow-color="#808080"/>
      <style:text-properties style:letter-kerning="true"/>
    </style:style>
    <style:style style:name="CUSTOM_5f_3_5f_2-notes" style:display-name="CUSTOM_3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2-outline1" style:display-name="CUSTOM_3_2-outline1" style:family="presentation">
      <style:graphic-properties draw:stroke="none" draw:fill="none" draw:auto-grow-height="false" draw:fit-to-size="false" style:shrink-to-fit="true">
        <text:list-style style:name="CUSTOM_5f_3_5f_2-outline1" style:display-name="CUSTOM_3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2-outline2" style:display-name="CUSTOM_3_2-outline2" style:family="presentation" style:parent-style-name="CUSTOM_5f_3_5f_2-outline1">
      <style:paragraph-properties fo:margin-left="0cm" fo:margin-right="0cm" fo:margin-top="0.4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3" style:display-name="CUSTOM_3_2-outline3" style:family="presentation" style:parent-style-name="CUSTOM_5f_3_5f_2-outline2">
      <style:paragraph-properties fo:margin-left="0cm" fo:margin-right="0cm" fo:margin-top="0.3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4" style:display-name="CUSTOM_3_2-outline4" style:family="presentation" style:parent-style-name="CUSTOM_5f_3_5f_2-outline3">
      <style:paragraph-properties fo:margin-left="0cm" fo:margin-right="0cm" fo:margin-top="0.2cm" fo:margin-bottom="0cm" fo:line-height="100%" fo:text-align="lef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2-outline5" style:display-name="CUSTOM_3_2-outline5" style:family="presentation" style:parent-style-name="CUSTOM_5f_3_5f_2-outline4">
      <style:paragraph-properties fo:margin-top="0.1cm" fo:margin-bottom="0cm"/>
      <style:text-properties fo:font-size="20pt" style:font-size-asian="20pt" style:font-size-complex="20pt"/>
    </style:style>
    <style:style style:name="CUSTOM_5f_3_5f_2-outline6" style:display-name="CUSTOM_3_2-outline6" style:family="presentation" style:parent-style-name="CUSTOM_5f_3_5f_2-outline5">
      <style:paragraph-properties fo:margin-top="0.1cm" fo:margin-bottom="0cm"/>
      <style:text-properties fo:font-size="20pt" style:font-size-asian="20pt" style:font-size-complex="20pt"/>
    </style:style>
    <style:style style:name="CUSTOM_5f_3_5f_2-outline7" style:display-name="CUSTOM_3_2-outline7" style:family="presentation" style:parent-style-name="CUSTOM_5f_3_5f_2-outline6">
      <style:paragraph-properties fo:margin-top="0.1cm" fo:margin-bottom="0cm"/>
      <style:text-properties fo:font-size="20pt" style:font-size-asian="20pt" style:font-size-complex="20pt"/>
    </style:style>
    <style:style style:name="CUSTOM_5f_3_5f_2-outline8" style:display-name="CUSTOM_3_2-outline8" style:family="presentation" style:parent-style-name="CUSTOM_5f_3_5f_2-outline7">
      <style:paragraph-properties fo:margin-top="0.1cm" fo:margin-bottom="0cm"/>
      <style:text-properties fo:font-size="20pt" style:font-size-asian="20pt" style:font-size-complex="20pt"/>
    </style:style>
    <style:style style:name="CUSTOM_5f_3_5f_2-outline9" style:display-name="CUSTOM_3_2-outline9" style:family="presentation" style:parent-style-name="CUSTOM_5f_3_5f_2-outline8">
      <style:paragraph-properties fo:margin-top="0.1cm" fo:margin-bottom="0cm"/>
      <style:text-properties fo:font-size="20pt" style:font-size-asian="20pt" style:font-size-complex="20pt"/>
    </style:style>
    <style:style style:name="CUSTOM_5f_3_5f_2-subtitle" style:display-name="CUSTOM_3_2-subtitle" style:family="presentation">
      <style:graphic-properties draw:stroke="none" draw:fill="none" draw:textarea-vertical-align="middle">
        <text:list-style style:name="CUSTOM_5f_3_5f_2-subtitle" style:display-name="CUSTOM_3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2-title" style:display-name="CUSTOM_3_2-title" style:family="presentation">
      <style:graphic-properties draw:stroke="none" draw:fill="none" draw:textarea-vertical-align="middle">
        <text:list-style style:name="CUSTOM_5f_3_5f_2-title" style:display-name="CUSTOM_3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lef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5cm" fo:page-height="6.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430d6b"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63cm" fo:padding-bottom="0.263cm" fo:padding-left="0.263cm" fo:padding-right="0.263cm" fo:wrap-option="wrap" style:writing-mode="lr-tb" loext:decorative="false"/>
      <style:paragraph-properties style:writing-mode="lr-tb"/>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0.528cm, 0.962cm, 0.606cm)" draw:image-opacity="100%" style:mirror="none" loext:decorative="false"/>
    </style:style>
    <style:style style:name="Mgr6" style:family="graphic" style:parent-style-name="standard">
      <style:graphic-properties draw:stroke="none" svg:stroke-width="0cm" draw:fill="solid" draw:fill-color="#595959"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8" style:family="graphic" style:parent-style-name="standard">
      <style:graphic-properties draw:stroke="none" svg:stroke-width="0cm" draw:fill="solid" draw:fill-color="#7f6000"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9" style:family="graphic" style:parent-style-name="standard">
      <style:graphic-properties draw:stroke="none" svg:stroke-width="0cm" draw:fill="solid" draw:fill-color="#218832"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10" style:family="graphic" style:parent-style-name="standard">
      <style:graphic-properties draw:stroke="none" svg:stroke-width="0cm" draw:fill="solid" draw:fill-color="#4477aa"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11" style:family="graphic" style:parent-style-name="standard">
      <style:graphic-properties draw:stroke="none" svg:stroke-width="0cm" draw:fill="solid" draw:fill-color="#ee6677" draw:textarea-vertical-align="middle" draw:auto-grow-height="false" draw:fit-to-size="false" style:shrink-to-fit="false" fo:min-height="0cm" fo:min-width="0cm" fo:padding-top="0.263cm" fo:padding-bottom="0.263cm" fo:padding-left="0.263cm" fo:padding-right="0.263cm" fo:wrap-option="wrap" loext:decorative="false"/>
    </style:style>
    <style:style style:name="Mgr12" style:family="graphic" style:parent-style-name="standard">
      <style:graphic-properties draw:stroke="none" svg:stroke-width="0cm" draw:fill="solid" draw:fill-color="#a93377" draw:textarea-vertical-align="middle" draw:auto-grow-height="false" draw:fit-to-size="false" style:shrink-to-fit="false" fo:min-height="0cm" fo:min-width="0cm" fo:padding-top="0.263cm" fo:padding-bottom="0.263cm" fo:padding-left="0.263cm" fo:padding-right="0.263cm" fo:wrap-option="wrap" loext:decorative="false"/>
    </style:style>
    <style:style style:name="Mpr1"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2"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CUSTOM-backgroundobjects">
      <style:graphic-properties draw:stroke="none" draw:fill="none" draw:fill-color="#ffffff" draw:auto-grow-height="false" fo:min-height="1.27cm" loext:decorative="false"/>
      <style:paragraph-properties style:writing-mode="lr-tb"/>
    </style:style>
    <style:style style:name="Mpr4" style:family="presentation" style:parent-style-name="CUSTOM-backgroundobjects">
      <style:graphic-properties draw:stroke="none" draw:fill="none" draw:fill-color="#ffffff" draw:textarea-vertical-align="bottom" draw:auto-grow-height="false" fo:min-height="1.27cm" loext:decorative="false"/>
      <style:paragraph-properties style:writing-mode="lr-tb"/>
    </style:style>
    <style:style style:name="Mpr5" style:family="presentation" style:parent-style-name="CUSTOM_5f_4_5f_1_5f_1_5f_1_5f_1_5f_1-backgroundobjects">
      <style:graphic-properties draw:stroke="none" draw:fill="none" draw:fill-color="#ffffff" draw:auto-grow-height="false" fo:min-height="1.27cm" loext:decorative="false"/>
      <style:paragraph-properties style:writing-mode="lr-tb"/>
    </style:style>
    <style:style style:name="Mpr6" style:family="presentation" style:parent-style-name="CUSTOM_5f_4_5f_1_5f_1_5f_1_5f_1_5f_1-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CUSTOM_5f_3-backgroundobjects">
      <style:graphic-properties draw:stroke="none" draw:fill="none" draw:fill-color="#ffffff" draw:auto-grow-height="false" fo:min-height="1.27cm" loext:decorative="false"/>
      <style:paragraph-properties style:writing-mode="lr-tb"/>
    </style:style>
    <style:style style:name="Mpr8" style:family="presentation" style:parent-style-name="CUSTOM_5f_3-backgroundobjects">
      <style:graphic-properties draw:stroke="none" draw:fill="none" draw:fill-color="#ffffff" draw:textarea-vertical-align="bottom" draw:auto-grow-height="false" fo:min-height="1.27cm" loext:decorative="false"/>
      <style:paragraph-properties style:writing-mode="lr-tb"/>
    </style:style>
    <style:style style:name="Mpr9" style:family="presentation" style:parent-style-name="CUSTOM_5f_4_5f_1_5f_1_5f_1_5f_1_5f_1_5f_1-backgroundobjects">
      <style:graphic-properties draw:stroke="none" draw:fill="none" draw:fill-color="#ffffff" draw:auto-grow-height="false" fo:min-height="1.27cm" loext:decorative="false"/>
      <style:paragraph-properties style:writing-mode="lr-tb"/>
    </style:style>
    <style:style style:name="Mpr10" style:family="presentation" style:parent-style-name="CUSTOM_5f_4_5f_1_5f_1_5f_1_5f_1_5f_1_5f_1-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CUSTOM_5f_2-backgroundobjects">
      <style:graphic-properties draw:stroke="none" draw:fill="none" draw:fill-color="#ffffff" draw:auto-grow-height="false" fo:min-height="1.27cm" loext:decorative="false"/>
      <style:paragraph-properties style:writing-mode="lr-tb"/>
    </style:style>
    <style:style style:name="Mpr12" style:family="presentation" style:parent-style-name="CUSTOM_5f_2-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CUSTOM_5f_3_5f_1-backgroundobjects">
      <style:graphic-properties draw:stroke="none" draw:fill="none" draw:fill-color="#ffffff" draw:auto-grow-height="false" fo:min-height="1.27cm" loext:decorative="false"/>
      <style:paragraph-properties style:writing-mode="lr-tb"/>
    </style:style>
    <style:style style:name="Mpr14" style:family="presentation" style:parent-style-name="CUSTOM_5f_3_5f_1-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CUSTOM_5f_3_5f_2-backgroundobjects">
      <style:graphic-properties draw:stroke="none" draw:fill="none" draw:fill-color="#ffffff" draw:auto-grow-height="false" fo:min-height="1.27cm" loext:decorative="false"/>
      <style:paragraph-properties style:writing-mode="lr-tb"/>
    </style:style>
    <style:style style:name="Mpr16" style:family="presentation" style:parent-style-name="CUSTOM_5f_3_5f_2-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solid" draw:fill-color="#430d6b"/>
      <style:paragraph-properties fo:text-align="left" style:font-independent-line-spacing="true"/>
      <style:text-properties fo:font-size="14pt"/>
    </style:style>
    <style:style style:name="MP6" style:family="paragraph">
      <style:paragraph-properties fo:margin-left="0cm" fo:margin-right="0cm" fo:margin-top="0cm" fo:margin-bottom="0cm" fo:line-height="100%" fo:text-align="right" fo:text-indent="0cm" loext:tab-stop-distance="0cm" style:writing-mode="lr-tb">
        <style:tab-stops>
          <style:tab-stop style:position="0cm"/>
        </style:tab-stops>
      </style:paragraph-properties>
      <style:text-properties style:font-name="Noto Sans JP" fo:font-size="14pt"/>
    </style:style>
    <style:style style:name="MP7" style:family="paragraph">
      <loext:graphic-properties draw:fill="none"/>
      <style:paragraph-properties fo:text-align="left" style:writing-mode="lr-tb" style:font-independent-line-spacing="true"/>
      <style:text-properties style:font-name="Noto Sans JP" fo:font-size="14pt"/>
    </style:style>
    <style:style style:name="MP8" style:family="paragraph">
      <loext:graphic-properties draw:fill="none"/>
      <style:paragraph-properties fo:text-align="left"/>
      <style:text-properties fo:font-size="18pt"/>
    </style:style>
    <style:style style:name="MP9" style:family="paragraph">
      <loext:graphic-properties draw:fill="solid" draw:fill-color="#595959"/>
      <style:paragraph-properties fo:text-align="left" style:font-independent-line-spacing="true"/>
      <style:text-properties fo:font-size="14pt"/>
    </style:style>
    <style:style style:name="MP10" style:family="paragraph">
      <style:paragraph-properties fo:margin-left="0cm" fo:margin-right="0cm" fo:margin-top="0cm" fo:margin-bottom="0cm" fo:line-height="100%" fo:text-align="right" fo:text-indent="0cm" loext:tab-stop-distance="0cm" style:writing-mode="lr-tb">
        <style:tab-stops>
          <style:tab-stop style:position="0cm"/>
        </style:tab-stops>
      </style:paragraph-properties>
      <style:text-properties fo:font-size="14pt"/>
    </style:style>
    <style:style style:name="MP11" style:family="paragraph">
      <loext:graphic-properties draw:fill="none"/>
      <style:paragraph-properties fo:text-align="left" style:writing-mode="lr-tb" style:font-independent-line-spacing="true"/>
      <style:text-properties fo:font-size="14pt"/>
    </style:style>
    <style:style style:name="MP12" style:family="paragraph">
      <loext:graphic-properties draw:fill="solid" draw:fill-color="#7f6000"/>
      <style:paragraph-properties fo:text-align="left" style:font-independent-line-spacing="true"/>
      <style:text-properties fo:font-size="14pt"/>
    </style:style>
    <style:style style:name="MP13" style:family="paragraph">
      <loext:graphic-properties draw:fill="solid" draw:fill-color="#218832"/>
      <style:paragraph-properties fo:text-align="left" style:font-independent-line-spacing="true"/>
      <style:text-properties fo:font-size="14pt"/>
    </style:style>
    <style:style style:name="MP14" style:family="paragraph">
      <loext:graphic-properties draw:fill="solid" draw:fill-color="#4477aa"/>
      <style:paragraph-properties fo:text-align="left" style:font-independent-line-spacing="true"/>
      <style:text-properties fo:font-size="14pt"/>
    </style:style>
    <style:style style:name="MP15" style:family="paragraph">
      <loext:graphic-properties draw:fill="solid" draw:fill-color="#ee6677"/>
      <style:paragraph-properties fo:text-align="left" style:font-independent-line-spacing="true"/>
      <style:text-properties fo:font-size="14pt"/>
    </style:style>
    <style:style style:name="MP16" style:family="paragraph">
      <loext:graphic-properties draw:fill="solid" draw:fill-color="#a93377"/>
      <style:paragraph-properties fo:text-align="lef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Noto Sans JP" fo:font-size="17pt" fo:letter-spacing="normal" fo:font-style="normal" style:text-underline-style="none" fo:font-weight="normal" style:font-name-asian="Figtree SemiBold" style:font-size-asian="17pt" style:font-style-asian="normal" style:font-weight-asian="normal" style:font-name-complex="Figtree SemiBold" style:font-size-complex="17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Figtree SemiBold" fo:font-size="17pt" fo:letter-spacing="normal" fo:font-style="normal" style:text-underline-style="none" fo:font-weight="normal" style:font-name-asian="Figtree SemiBold" style:font-size-asian="17pt" style:font-style-asian="normal" style:font-weight-asian="normal" style:font-name-complex="Figtree SemiBold"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_5f_5" style:display-name="CUSTOM_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USTOM_5f_5-title" draw:layer="backgroundobjects" svg:width="8.549cm" svg:height="1.151cm" svg:x="0.475cm" svg:y="0.275cm" presentation:class="title" presentation:placeholder="true">
        <draw:text-box/>
      </draw:frame>
      <draw:frame presentation:style-name="CUSTOM_5f_5-outline1" draw:layer="backgroundobjects" svg:width="8.549cm" svg:height="4cm" svg:x="0.475cm" svg:y="1.614cm" presentation:class="outline" presentation:placeholder="true">
        <draw:text-box/>
      </draw:frame>
      <presentation:notes style:page-layout-name="PM2">
        <draw:page-thumbnail presentation:style-name="CUSTOM_5f_5-title" draw:layer="backgroundobjects" svg:width="19.798cm" svg:height="11.136cm" svg:x="0.6cm" svg:y="2.257cm" presentation:class="page"/>
        <draw:frame presentation:style-name="CUSTOM_5f_5-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8;p2" draw:style-name="Mgr3" draw:text-style-name="MP5"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2" draw:style-name="Mgr4" draw:text-style-name="MP7" draw:layer="backgroundobjects" svg:width="5.342cm" svg:height="0.542cm" svg:x="3.744cm" svg:y="0.639cm">
        <text:p text:style-name="MP6"><text:span text:style-name="MT2">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p2" draw:style-name="Mgr5" draw:text-style-name="MP8" draw:layer="backgroundobjects" svg:width="0.8cm" svg:height="0.814cm" svg:x="0.426cm" svg:y="0.503cm">
        <draw:image xlink:href="Pictures/1000000100000800000000971AFCD363.png" xlink:type="simple" xlink:show="embed" xlink:actuate="onLoad" draw:mime-type="image/png">
          <text:p/>
        </draw:image>
      </draw:frame>
      <draw:frame draw:name="Google Shape;11;p2" presentation:style-name="CUSTOM-title" draw:layer="backgroundobjects" svg:width="8.548cm" svg:height="0.813cm" svg:x="0.427cm" svg:y="1.31cm" presentation:class="title" presentation:placeholder="true" presentation:user-transformed="true">
        <draw:text-box/>
      </draw:frame>
      <draw:frame presentation:style-name="CUSTOM-outline1" draw:layer="backgroundobjects" svg:width="8.549cm" svg:height="4cm" svg:x="0.475cm" svg:y="1.614cm" presentation:class="outline" presentation:placeholder="true">
        <draw:text-box/>
      </draw:frame>
      <presentation:notes style:page-layout-name="PM2">
        <draw:page-thumbnail presentation:style-name="CUSTOM-title" draw:layer="backgroundobjects" svg:width="13.113cm" svg:height="9.524cm" svg:x="2.968cm" svg:y="1.93cm" presentation:class="page"/>
        <draw:frame presentation:style-name="CUSTOM-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_5f_1_5f_1" style:display-name="CUSTOM_4_1_1_1_1_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4;p3" draw:style-name="Mgr6" draw:text-style-name="MP9"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draw:style-name="Mgr7" draw:text-style-name="MP8" draw:layer="backgroundobjects" svg:width="0.841cm" svg:height="0.841cm" svg:x="0.399cm" svg:y="0.42cm">
        <draw:image xlink:href="Pictures/10000001000004B0000004B07085C759.png" xlink:type="simple" xlink:show="embed" xlink:actuate="onLoad" draw:mime-type="image/png">
          <text:p/>
        </draw:image>
      </draw:frame>
      <draw:frame draw:name="Google Shape;16;p3" presentation:style-name="CUSTOM_5f_4_5f_1_5f_1_5f_1_5f_1_5f_1-title" draw:layer="backgroundobjects" svg:width="8.548cm" svg:height="0.813cm" svg:x="0.427cm" svg:y="1.31cm" presentation:class="title" presentation:placeholder="true" presentation:user-transformed="true">
        <draw:text-box/>
      </draw:frame>
      <draw:custom-shape draw:name="Google Shape;18;p3" draw:style-name="Mgr4" draw:text-style-name="MP11" draw:layer="backgroundobjects" svg:width="5.342cm" svg:height="0.542cm" svg:x="3.744cm" svg:y="0.639cm">
        <text:p text:style-name="MP10"><text:span text:style-name="MT2">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_5f_1_5f_1_5f_1_5f_1-outline1" draw:layer="backgroundobjects" svg:width="8.549cm" svg:height="4cm" svg:x="0.475cm" svg:y="1.614cm" presentation:class="outline" presentation:placeholder="true">
        <draw:text-box/>
      </draw:frame>
      <presentation:notes style:page-layout-name="PM2">
        <draw:page-thumbnail presentation:style-name="CUSTOM_5f_4_5f_1_5f_1_5f_1_5f_1_5f_1-title" draw:layer="backgroundobjects" svg:width="13.113cm" svg:height="9.524cm" svg:x="2.968cm" svg:y="1.93cm" presentation:class="page"/>
        <draw:frame presentation:style-name="CUSTOM_5f_4_5f_1_5f_1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2;p6" draw:style-name="Mgr8" draw:text-style-name="MP12"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draw:style-name="Mgr7" draw:text-style-name="MP8" draw:layer="backgroundobjects" svg:width="0.771cm" svg:height="0.771cm" svg:x="0.465cm" svg:y="0.548cm">
        <draw:image xlink:href="Pictures/10000001000004B0000004B05B434052.png" xlink:type="simple" xlink:show="embed" xlink:actuate="onLoad" draw:mime-type="image/png">
          <text:p/>
        </draw:image>
      </draw:frame>
      <draw:custom-shape draw:name="Google Shape;34;p6" draw:style-name="Mgr4" draw:text-style-name="MP11" draw:layer="backgroundobjects" svg:width="5.342cm" svg:height="0.542cm" svg:x="3.821cm" svg:y="0.657cm">
        <text:p text:style-name="MP10"><text:span text:style-name="MT2">Dest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p6" presentation:style-name="CUSTOM_5f_3-title" draw:layer="backgroundobjects" svg:width="8.548cm" svg:height="0.813cm" svg:x="0.427cm" svg:y="1.31cm" presentation:class="title" presentation:placeholder="true" presentation:user-transformed="true">
        <draw:text-box/>
      </draw:frame>
      <draw:frame presentation:style-name="CUSTOM_5f_3-outline1" draw:layer="backgroundobjects" svg:width="8.549cm" svg:height="4cm" svg:x="0.475cm" svg:y="1.614cm" presentation:class="outline" presentation:placeholder="true">
        <draw:text-box/>
      </draw:frame>
      <presentation:notes style:page-layout-name="PM2">
        <draw:page-thumbnail presentation:style-name="CUSTOM_5f_3-title" draw:layer="backgroundobjects" svg:width="13.113cm" svg:height="9.524cm" svg:x="2.968cm" svg:y="1.93cm" presentation:class="page"/>
        <draw:frame presentation:style-name="CUSTOM_5f_3-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_5f_1_5f_1_5f_1" style:display-name="CUSTOM_4_1_1_1_1_1_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0;p4" draw:style-name="Mgr9" draw:text-style-name="MP13"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CUSTOM_5f_4_5f_1_5f_1_5f_1_5f_1_5f_1_5f_1-title" draw:layer="backgroundobjects" svg:width="8.548cm" svg:height="0.813cm" svg:x="0.427cm" svg:y="1.31cm" presentation:class="title" presentation:placeholder="true" presentation:user-transformed="true">
        <draw:text-box/>
      </draw:frame>
      <draw:custom-shape draw:name="Google Shape;23;p4" draw:style-name="Mgr4" draw:text-style-name="MP11" draw:layer="backgroundobjects" svg:width="5.342cm" svg:height="0.542cm" svg:x="3.744cm" svg:y="0.639cm">
        <text:p text:style-name="MP10"><text:span text:style-name="MT2">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4" draw:style-name="Mgr7" draw:text-style-name="MP8" draw:layer="backgroundobjects" svg:width="0.67cm" svg:height="0.67cm" svg:x="0.463cm" svg:y="0.548cm">
        <draw:image xlink:href="Pictures/10000001000004B0000004B0B5B1C782.png" xlink:type="simple" xlink:show="embed" xlink:actuate="onLoad" draw:mime-type="image/png">
          <text:p/>
        </draw:image>
      </draw:frame>
      <draw:frame presentation:style-name="CUSTOM_5f_4_5f_1_5f_1_5f_1_5f_1_5f_1_5f_1-outline1" draw:layer="backgroundobjects" svg:width="8.549cm" svg:height="4cm" svg:x="0.475cm" svg:y="1.614cm" presentation:class="outline" presentation:placeholder="true">
        <draw:text-box/>
      </draw:frame>
      <presentation:notes style:page-layout-name="PM2">
        <draw:page-thumbnail presentation:style-name="CUSTOM_5f_4_5f_1_5f_1_5f_1_5f_1_5f_1_5f_1-title" draw:layer="backgroundobjects" svg:width="13.113cm" svg:height="9.524cm" svg:x="2.968cm" svg:y="1.93cm" presentation:class="page"/>
        <draw:frame presentation:style-name="CUSTOM_5f_4_5f_1_5f_1_5f_1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6;p5" draw:style-name="Mgr10" draw:text-style-name="MP14"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5" draw:style-name="Mgr7" draw:text-style-name="MP8" draw:layer="backgroundobjects" svg:width="0.771cm" svg:height="0.771cm" svg:x="0.465cm" svg:y="0.548cm">
        <draw:image xlink:href="Pictures/10000001000004B0000004B0738827B0.png" xlink:type="simple" xlink:show="embed" xlink:actuate="onLoad" draw:mime-type="image/png">
          <text:p/>
        </draw:image>
      </draw:frame>
      <draw:custom-shape draw:name="Google Shape;28;p5" draw:style-name="Mgr4" draw:text-style-name="MP11" draw:layer="backgroundobjects" svg:width="5.342cm" svg:height="0.542cm" svg:x="3.821cm" svg:y="0.657cm">
        <text:p text:style-name="MP10"><text:span text:style-name="MT2">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p5" presentation:style-name="CUSTOM_5f_2-title" draw:layer="backgroundobjects" svg:width="8.548cm" svg:height="0.813cm" svg:x="0.427cm" svg:y="1.31cm" presentation:class="title" presentation:placeholder="true" presentation:user-transformed="true">
        <draw:text-box/>
      </draw:frame>
      <draw:frame presentation:style-name="CUSTOM_5f_2-outline1" draw:layer="backgroundobjects" svg:width="8.549cm" svg:height="4cm" svg:x="0.475cm" svg:y="1.614cm" presentation:class="outline" presentation:placeholder="true">
        <draw:text-box/>
      </draw:frame>
      <presentation:notes style:page-layout-name="PM2">
        <draw:page-thumbnail presentation:style-name="CUSTOM_5f_2-title" draw:layer="backgroundobjects" svg:width="13.113cm" svg:height="9.524cm" svg:x="2.968cm" svg:y="1.93cm" presentation:class="page"/>
        <draw:frame presentation:style-name="CUSTOM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8;p7" draw:style-name="Mgr11" draw:text-style-name="MP15"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p7" draw:style-name="Mgr7" draw:text-style-name="MP8" draw:layer="backgroundobjects" svg:width="0.722cm" svg:height="0.722cm" svg:x="0.465cm" svg:y="0.548cm">
        <draw:image xlink:href="Pictures/10000001000004B0000004B07872F65E.png" xlink:type="simple" xlink:show="embed" xlink:actuate="onLoad" draw:mime-type="image/png">
          <text:p/>
        </draw:image>
      </draw:frame>
      <draw:custom-shape draw:name="Google Shape;40;p7" draw:style-name="Mgr4" draw:text-style-name="MP11" draw:layer="backgroundobjects" svg:width="5.342cm" svg:height="0.542cm" svg:x="3.821cm" svg:y="0.657cm">
        <text:p text:style-name="MP10"><text:span text:style-name="MT2">Process</text:span><text:span text:style-name="MT3"> </text:span><text:span text:style-name="MT2">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p7" presentation:style-name="CUSTOM_5f_3_5f_1-title" draw:layer="backgroundobjects" svg:width="8.548cm" svg:height="0.813cm" svg:x="0.427cm" svg:y="1.31cm" presentation:class="title" presentation:placeholder="true" presentation:user-transformed="true">
        <draw:text-box/>
      </draw:frame>
      <draw:frame presentation:style-name="CUSTOM_5f_3_5f_1-outline1" draw:layer="backgroundobjects" svg:width="8.549cm" svg:height="4cm" svg:x="0.475cm" svg:y="1.614cm" presentation:class="outline" presentation:placeholder="true">
        <draw:text-box/>
      </draw:frame>
      <presentation:notes style:page-layout-name="PM2">
        <draw:page-thumbnail presentation:style-name="CUSTOM_5f_3_5f_1-title" draw:layer="backgroundobjects" svg:width="13.113cm" svg:height="9.524cm" svg:x="2.968cm" svg:y="1.93cm" presentation:class="page"/>
        <draw:frame presentation:style-name="CUSTOM_5f_3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_5f_2" style:display-name="CUSTOM_3_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44;p8" draw:style-name="Mgr12" draw:text-style-name="MP16" draw:layer="backgroundobjects" svg:width="9.499cm" svg:height="1.30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p8" draw:style-name="Mgr7" draw:text-style-name="MP8" draw:layer="backgroundobjects" svg:width="0.67cm" svg:height="0.67cm" svg:x="0.465cm" svg:y="0.548cm">
        <draw:image xlink:href="Pictures/10000001000004B0000004B0234D5FB2.png" xlink:type="simple" xlink:show="embed" xlink:actuate="onLoad" draw:mime-type="image/png">
          <text:p/>
        </draw:image>
      </draw:frame>
      <draw:custom-shape draw:name="Google Shape;46;p8" draw:style-name="Mgr4" draw:text-style-name="MP7" draw:layer="backgroundobjects" svg:width="6.087cm" svg:height="0.542cm" svg:x="3.088cm" svg:y="0.657cm">
        <text:p text:style-name="MP6"><text:span text:style-name="MT2">Provisioning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p8" presentation:style-name="CUSTOM_5f_3_5f_2-title" draw:layer="backgroundobjects" svg:width="8.548cm" svg:height="0.813cm" svg:x="0.427cm" svg:y="1.31cm" presentation:class="title" presentation:placeholder="true" presentation:user-transformed="true">
        <draw:text-box/>
      </draw:frame>
      <draw:frame presentation:style-name="CUSTOM_5f_3_5f_2-outline1" draw:layer="backgroundobjects" svg:width="8.549cm" svg:height="4cm" svg:x="0.475cm" svg:y="1.614cm" presentation:class="outline" presentation:placeholder="true">
        <draw:text-box/>
      </draw:frame>
      <presentation:notes style:page-layout-name="PM2">
        <draw:page-thumbnail presentation:style-name="CUSTOM_5f_3_5f_2-title" draw:layer="backgroundobjects" svg:width="13.113cm" svg:height="9.524cm" svg:x="2.968cm" svg:y="1.93cm" presentation:class="page"/>
        <draw:frame presentation:style-name="CUSTOM_5f_3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dc:date>2026-06-22T12:32:29.056507000</dc:date>
    <meta:editing-duration>PT14M59S</meta:editing-duration>
    <meta:editing-cycles>2</meta:editing-cycles>
    <meta:document-statistic meta:object-count="322"/>
  </office:meta>
</office:document-meta>
</file>