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4B00E4700FE73C7A505.png" manifest:media-type="image/png"/>
  <manifest:file-entry manifest:full-path="Pictures/10000201000002D80000011101BE154204C37B47.png" manifest:media-type="image/png"/>
  <manifest:file-entry manifest:full-path="Pictures/10000201000004B0000004B0A4A906D4213AD285.png" manifest:media-type="image/png"/>
  <manifest:file-entry manifest:full-path="Pictures/10000201000004B0000004B0065A810737EA14E4.png" manifest:media-type="image/png"/>
  <manifest:file-entry manifest:full-path="Pictures/10000201000004B0000004B0EBE811DF46451FA1.png" manifest:media-type="image/png"/>
  <manifest:file-entry manifest:full-path="Pictures/10000201000004B0000004B03CA94145FE328DA1.png" manifest:media-type="image/png"/>
  <manifest:file-entry manifest:full-path="Pictures/100002010000080000000097D4B01496EFDA0F2E.png" manifest:media-type="image/png"/>
  <manifest:file-entry manifest:full-path="Pictures/100002010000019B0000001F1DCCE535B1899D98.png" manifest:media-type="image/png"/>
  <manifest:file-entry manifest:full-path="Pictures/10000201000004B0000004B028E76994B8CE062E.png" manifest:media-type="image/png"/>
  <manifest:file-entry manifest:full-path="Pictures/10000201000004B0000004B0AEBDA0E45697A13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gtree" svg:font-family="Figtree"/>
    <style:font-face style:name="Figtree Medium" svg:font-family="'Figtree Medium'"/>
    <style:font-face style:name="Figtree SemiBold" svg:font-family="'Figtree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430c6b"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595959"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7f60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218832"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4477aa"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ee6677"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a93377"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386cm, 5.57cm, 0cm, 5.341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313cm, 5.847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CUSTOM_5f_5-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CUSTOM-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3" style:family="presentation" style:parent-style-name="CUSTOM-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4" style:family="presentation" style:parent-style-name="CUSTOM-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_5f_1_5f_1_5f_1_5f_1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6" style:family="presentation" style:parent-style-name="CUSTOM_5f_4_5f_1_5f_1_5f_1_5f_1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7"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4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3-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14" style:family="presentation" style:parent-style-name="CUSTOM_5f_3-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15" style:family="presentation" style:parent-style-name="CUSTOM_5f_3-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3-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3-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3-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3-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4_5f_1_5f_1_5f_1_5f_1_5f_1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21" style:family="presentation" style:parent-style-name="CUSTOM_5f_4_5f_1_5f_1_5f_1_5f_1_5f_1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22"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CUSTOM_5f_4_5f_1_5f_1_5f_1_5f_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CUSTOM_5f_2-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36" style:family="presentation" style:parent-style-name="CUSTOM_5f_2-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37"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CUSTOM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CUSTOM_5f_3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44" style:family="presentation" style:parent-style-name="CUSTOM_5f_3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45"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CUSTOM_5f_3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CUSTOM_5f_3_5f_2-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style:style>
    <style:style style:name="pr58" style:family="presentation" style:parent-style-name="CUSTOM_5f_3_5f_2-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style:style>
    <style:style style:name="pr59"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CUSTOM_5f_3_5f_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5pt"/>
    </style:style>
    <style:style style:name="P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6" style:family="paragraph">
      <style:paragraph-properties fo:margin-left="0.706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0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Figtree Medium" fo:font-size="15pt" fo:letter-spacing="normal" fo:font-style="normal" style:text-underline-style="none" fo:font-weight="normal" style:font-name-asian="Figtree Medium" style:font-size-asian="15pt" style:font-style-asian="normal" style:font-weight-asian="normal" style:font-name-complex="Figtree Medium" style:font-size-complex="1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Figtree" fo:font-size="7pt" fo:letter-spacing="normal" fo:font-style="normal" style:text-underline-style="none" fo:font-weight="bold" style:font-name-asian="Figtree" style:font-size-asian="7pt" style:font-style-asian="normal" style:font-weight-asian="bold" style:font-name-complex="Figtree" style:font-size-complex="7pt" style:font-style-complex="normal" style:font-weight-complex="bold"/>
    </style:style>
    <style:style style:name="T3" style:family="text">
      <style:text-properties fo:font-variant="normal" fo:text-transform="none" fo:color="#ffffff" style:text-line-through-style="none" style:text-line-through-type="none" style:text-position="0% 100%" style:font-name="Figtree" fo:font-size="7pt" fo:letter-spacing="normal" fo:font-style="normal" style:text-underline-style="none" fo:font-weight="normal" style:font-name-asian="Figtree" style:font-size-asian="7pt" style:font-style-asian="normal" style:font-weight-asian="normal" style:font-name-complex="Figtree" style:font-size-complex="7pt" style:font-style-complex="normal" style:font-weight-complex="normal"/>
    </style:style>
    <style:style style:name="T4" style:family="text">
      <style:text-properties fo:font-variant="normal" fo:text-transform="none" fo:color="#ffffff" style:text-line-through-style="none" style:text-line-through-type="none" style:text-position="0% 100%" style:font-name="Figtree" fo:font-size="10pt" fo:letter-spacing="normal" fo:font-style="normal" style:text-underline-style="none" fo:font-weight="bold" style:font-name-asian="Figtree" style:font-size-asian="10pt" style:font-style-asian="normal" style:font-weight-asian="bold" style:font-name-complex="Figtree" style:font-size-complex="10pt" style:font-style-complex="normal" style:font-weight-complex="bold"/>
    </style:style>
    <style:style style:name="T5" style:family="text">
      <style:text-properties fo:font-variant="normal" fo:text-transform="none" fo:color="#ffffff" style:text-line-through-style="none" style:text-line-through-type="none" style:text-position="0% 100%" style:font-name="Figtree" fo:font-size="10pt" fo:letter-spacing="normal" fo:font-style="normal" style:text-underline-style="none" fo:font-weight="normal" style:font-name-asian="Figtree" style:font-size-asian="10pt" style:font-style-asian="normal" style:font-weight-asian="normal" style:font-name-complex="Figtree"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Figtree Medium" fo:font-size="15pt" fo:letter-spacing="normal" fo:font-style="normal" style:text-underline-style="none" fo:font-weight="normal" style:font-name-asian="Figtree Medium" style:font-size-asian="15pt" style:font-style-asian="normal" style:font-weight-asian="normal" style:font-name-complex="Figtree Medium"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Figtree Medium" fo:font-size="7pt" fo:letter-spacing="normal" fo:font-style="italic" style:text-underline-style="none" fo:font-weight="normal" style:font-name-asian="Figtree Medium" style:font-size-asian="7pt" style:font-style-asian="italic" style:font-weight-asian="normal" style:font-name-complex="Figtree Medium" style:font-size-complex="7pt" style:font-style-complex="italic" style:font-weight-complex="normal"/>
    </style:style>
    <style:style style:name="T8" style:family="text">
      <style:text-properties fo:font-variant="normal" fo:text-transform="none" style:text-line-through-style="none" style:text-line-through-type="none" style:text-position="0% 100%" style:font-name="Figtree" fo:font-size="10pt" fo:letter-spacing="normal" fo:font-style="normal" style:text-underline-style="none" fo:font-weight="normal" style:font-name-asian="Figtree" style:font-size-asian="10pt" style:font-style-asian="normal" style:font-weight-asian="normal" style:font-name-complex="Figtree"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Figtree" fo:font-size="10pt" fo:letter-spacing="normal" fo:font-style="normal" style:text-underline-style="none" fo:font-weight="normal" style:font-name-asian="Figtree" style:font-size-asian="10pt" style:font-style-asian="normal" style:font-weight-asian="normal" style:font-name-complex="Figtree" style:font-size-complex="10pt" style:font-style-complex="normal" style:font-weight-complex="normal"/>
    </style:style>
    <style:style style:name="T10" style:family="text">
      <style:text-properties fo:font-variant="normal" fo:text-transform="none" style:text-line-through-style="none" style:text-line-through-type="none" style:text-position="0% 100%" style:font-name="Figtree" fo:font-size="10pt" fo:letter-spacing="normal" fo:font-style="italic" style:text-underline-style="none" fo:font-weight="normal" style:font-name-asian="Figtree" style:font-size-asian="10pt" style:font-style-asian="italic" style:font-weight-asian="normal" style:font-name-complex="Figtree" style:font-size-complex="10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5f_5">
        <draw:g draw:name="Google Shape;54;p10">
          <draw:frame draw:name="Google Shape;55;p10" draw:style-name="gr1" draw:text-style-name="P1" draw:layer="layout" svg:width="4.27cm" svg:height="1.484cm" svg:x="3.427cm" svg:y="4.408cm">
            <draw:image xlink:href="Pictures/10000201000002D80000011101BE154204C37B47.png" xlink:type="simple" xlink:show="embed" xlink:actuate="onLoad">
              <text:p/>
            </draw:image>
          </draw:frame>
          <draw:frame draw:name="Google Shape;56;p10" draw:style-name="gr2" draw:text-style-name="P1" draw:layer="layout" svg:width="1.529cm" svg:height="1.297cm" svg:x="1.802cm" svg:y="4.501cm">
            <draw:image xlink:href="Pictures/10000201000002D80000011101BE154204C37B47.png" xlink:type="simple" xlink:show="embed" xlink:actuate="onLoad">
              <text:p/>
            </draw:image>
          </draw:frame>
        </draw:g>
        <draw:frame draw:name="Google Shape;57;p10" draw:style-name="gr3" draw:text-style-name="P1" draw:layer="layout" svg:width="3.417cm" svg:height="3.417cm" svg:x="3.041cm" svg:y="0.897cm">
          <draw:image xlink:href="Pictures/10000201000004B0000004B00E4700FE73C7A505.png" xlink:type="simple" xlink:show="embed" xlink:actuate="onLoad">
            <text:p/>
          </draw:image>
        </draw:frame>
        <presentation:notes draw:style-name="dp2">
          <draw:page-thumbnail draw:name="Google Shape;51;g33a83a7ceef_1_3:notes" draw:style-name="gr4" draw:layer="layout" svg:width="13.112cm" svg:height="9.524cm" svg:x="2.969cm" svg:y="1.905cm" draw:page-number="1" presentation:class="page"/>
          <draw:frame draw:name="Google Shape;52;g33a83a7ceef_1_3:notes" presentation:style-name="pr1" draw:text-style-name="P2" draw:layer="layout" svg:width="15.239cm" svg:height="11.429cm" svg:x="1.905cm" svg:y="12.065cm" presentation:class="notes" presentation:placeholder="true" presentation:user-transformed="true">
            <draw:text-box/>
          </draw:frame>
        </presentation:notes>
      </draw:page>
      <draw:page draw:name="Background" draw:style-name="dp1" draw:master-page-name="CUSTOM">
        <draw:frame draw:name="Google Shape;62;p11" presentation:style-name="pr2" draw:text-style-name="P4" draw:layer="layout" svg:width="8.548cm" svg:height="0.813cm" svg:x="0.427cm" svg:y="1.31cm" presentation:class="title" presentation:user-transformed="true">
          <draw:text-box>
            <text:p text:style-name="P3"><text:span text:style-name="T1">Background</text:span></text:p>
          </draw:text-box>
        </draw:frame>
        <draw:frame draw:name="Google Shape;63;p11" presentation:style-name="pr3" draw:text-style-name="P7" draw:layer="layout" svg:width="8.548cm" svg:height="4.346cm" svg:x="0.427cm" svg:y="2.173cm" presentation:class="subtitle" presentation:user-transformed="true">
          <draw:text-box>
            <text:p text:style-name="P3"><text:span text:style-name="T2">Effective internal platforms help you go faster, be safer, and increase efficiency as you scale.</text:span></text:p>
            <text:p text:style-name="P5"><text:span text:style-name="T3">To create an effective platform, you must incorporate three essential principles:</text:span></text:p>
            <text:p text:style-name="P6"><text:span text:style-name="T3">1. Self-service and on-demand access</text:span></text:p>
            <text:p text:style-name="P6"><text:span text:style-name="T3">2. Consistently applied business processes</text:span></text:p>
            <text:p text:style-name="P6"><text:span text:style-name="T3">3. Fleet-manage services at scale</text:span></text:p>
            <text:p text:style-name="P6"><text:span text:style-name="T3"/></text:p>
            <text:p text:style-name="P3"><text:span text:style-name="T3">Syntasso Kratix Enterprise (SKE) does this and more by providing the Promise API. Use this card deck to design your own services that comply to all the platform principles.</text:span></text:p>
          </draw:text-box>
        </draw:frame>
        <draw:custom-shape draw:name="Google Shape;64;p11"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draw:frame draw:name="Google Shape;65;p11" draw:style-name="gr3" draw:text-style-name="P1" draw:layer="layout" svg:width="3.015cm" svg:height="0.227cm" svg:x="5.774cm" svg:y="6.292cm">
          <draw:image xlink:href="Pictures/100002010000019B0000001F1DCCE535B1899D98.png" xlink:type="simple" xlink:show="embed" xlink:actuate="onLoad">
            <text:p/>
          </draw:image>
        </draw:frame>
        <presentation:notes draw:style-name="dp2">
          <draw:page-thumbnail draw:name="Google Shape;59;g2af853010e1_0_711:notes" draw:style-name="gr4" draw:layer="layout" svg:width="13.112cm" svg:height="9.524cm" svg:x="2.969cm" svg:y="1.905cm" draw:page-number="2" presentation:class="page"/>
          <draw:frame draw:name="Google Shape;60;g2af853010e1_0_711:notes" presentation:style-name="pr4" draw:text-style-name="P2" draw:layer="layout" svg:width="15.239cm" svg:height="11.429cm" svg:x="1.905cm" svg:y="12.065cm" presentation:class="notes" presentation:placeholder="true" presentation:user-transformed="true">
            <draw:text-box/>
          </draw:frame>
        </presentation:notes>
      </draw:page>
      <draw:page draw:name="Interfaces explained" draw:style-name="dp3" draw:master-page-name="CUSTOM_5f_4_5f_1_5f_1_5f_1_5f_1_5f_1">
        <draw:frame draw:name="Google Shape;70;p12" presentation:style-name="pr5" draw:text-style-name="P4" draw:layer="layout" svg:width="8.548cm" svg:height="0.813cm" svg:x="0.427cm" svg:y="1.31cm" presentation:class="title" presentation:user-transformed="true">
          <draw:text-box>
            <text:p text:style-name="P3"><text:span text:style-name="T1">Interfaces explained</text:span></text:p>
          </draw:text-box>
        </draw:frame>
        <draw:frame draw:name="Google Shape;71;p12" presentation:style-name="pr6" draw:text-style-name="P7" draw:layer="layout" svg:width="8.548cm" svg:height="4.346cm" svg:x="0.427cm" svg:y="2.173cm" presentation:class="subtitle" presentation:user-transformed="true">
          <draw:text-box>
            <text:p text:style-name="P3"><text:span text:style-name="T4">Interfaces enable users to create, update, delete, maintain, and review platform capabilities.</text:span></text:p>
            <text:p text:style-name="P8"><text:span text:style-name="T5">There’s no single right way to access a platform– some tasks require scripting, while others rely on visualisation, each needing different interfaces.</text:span></text:p>
            <text:p text:style-name="P9"><text:span text:style-name="T5">The key is ensuring your platform supports all interface types with minimal maintenance.</text:span></text:p>
          </draw:text-box>
        </draw:frame>
        <draw:custom-shape draw:name="Google Shape;72;p12"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67;g33a37bdba7f_0_83:notes" draw:style-name="gr4" draw:layer="layout" svg:width="13.112cm" svg:height="9.524cm" svg:x="2.969cm" svg:y="1.905cm" draw:page-number="3" presentation:class="page"/>
          <draw:frame draw:name="Google Shape;68;g33a37bdba7f_0_83:notes" presentation:style-name="pr7" draw:text-style-name="P2" draw:layer="layout" svg:width="15.239cm" svg:height="11.429cm" svg:x="1.905cm" svg:y="12.065cm" presentation:class="notes" presentation:placeholder="true" presentation:user-transformed="true">
            <draw:text-box/>
          </draw:frame>
        </presentation:notes>
      </draw:page>
      <draw:page draw:name="API (default)" draw:style-name="dp4" draw:master-page-name="CUSTOM_5f_4_5f_1_5f_1_5f_1_5f_1_5f_1">
        <draw:frame draw:name="Google Shape;77;p13" presentation:style-name="pr5" draw:text-style-name="P4" draw:layer="layout" svg:width="8.548cm" svg:height="0.813cm" svg:x="0.427cm" svg:y="1.31cm" presentation:class="title" presentation:user-transformed="true">
          <draw:text-box>
            <text:p text:style-name="P3"><text:span text:style-name="T6">API </text:span><text:span text:style-name="T7">(default)</text:span></text:p>
          </draw:text-box>
        </draw:frame>
        <draw:frame draw:name="Google Shape;78;p13" presentation:style-name="pr6" draw:text-style-name="P7" draw:layer="layout" svg:width="8.548cm" svg:height="4.346cm" svg:x="0.427cm" svg:y="2.173cm" presentation:class="subtitle" presentation:user-transformed="true">
          <draw:text-box>
            <text:p text:style-name="P3"><text:span text:style-name="T8">All modern platforms today start with a powerful API and layer in additional interfaces on top. For example, cloud providers start with the API and then extend to a CLI and GUI for different use cases.</text:span></text:p>
            <text:p text:style-name="P9"><text:span text:style-name="T8">Therefore, this interface is labeled as "default" and should always be included in the interfaces section.</text:span></text:p>
          </draw:text-box>
        </draw:frame>
        <presentation:notes draw:style-name="dp2">
          <draw:page-thumbnail draw:name="Google Shape;74;g33bb146551b_0_8:notes" draw:style-name="gr4" draw:layer="layout" svg:width="13.112cm" svg:height="9.524cm" svg:x="2.969cm" svg:y="1.905cm" draw:page-number="4" presentation:class="page"/>
          <draw:frame draw:name="Google Shape;75;g33bb146551b_0_8:notes" presentation:style-name="pr8" draw:text-style-name="P2" draw:layer="layout" svg:width="15.239cm" svg:height="11.429cm" svg:x="1.905cm" svg:y="12.065cm" presentation:class="notes" presentation:placeholder="true" presentation:user-transformed="true">
            <draw:text-box/>
          </draw:frame>
        </presentation:notes>
      </draw:page>
      <draw:page draw:name="Portal" draw:style-name="dp4" draw:master-page-name="CUSTOM_5f_4_5f_1_5f_1_5f_1_5f_1_5f_1">
        <draw:frame draw:name="Google Shape;83;p14" presentation:style-name="pr5" draw:text-style-name="P4" draw:layer="layout" svg:width="8.548cm" svg:height="0.813cm" svg:x="0.427cm" svg:y="1.31cm" presentation:class="title" presentation:user-transformed="true">
          <draw:text-box>
            <text:p text:style-name="P3"><text:span text:style-name="T6">Portal</text:span></text:p>
          </draw:text-box>
        </draw:frame>
        <draw:frame draw:name="Google Shape;84;p14" presentation:style-name="pr6" draw:text-style-name="P7" draw:layer="layout" svg:width="8.548cm" svg:height="4.346cm" svg:x="0.427cm" svg:y="2.173cm" presentation:class="subtitle" presentation:user-transformed="true">
          <draw:text-box>
            <text:p text:style-name="P3"><text:span text:style-name="T8">Often browser-based (GUI) interfaces that show a catalog of platform services and resources.</text:span></text:p>
            <text:p text:style-name="P8"><text:span text:style-name="T8">Portals can be custom built, self-hosted projects (e.g. the popular CNCF project Backstage) or SaaS products (e.g. Port, Cortex, and Roadie).</text:span></text:p>
            <text:p text:style-name="P9"><text:span text:style-name="T8">Portal configuration and data is directly dependent on the platform and therefore should be managed by the platform itself to reduce overhead.</text:span></text:p>
          </draw:text-box>
        </draw:frame>
        <presentation:notes draw:style-name="dp2">
          <draw:page-thumbnail draw:name="Google Shape;80;g2af853010e1_0_696:notes" draw:style-name="gr4" draw:layer="layout" svg:width="13.112cm" svg:height="9.524cm" svg:x="2.969cm" svg:y="1.905cm" draw:page-number="5" presentation:class="page"/>
          <draw:frame draw:name="Google Shape;81;g2af853010e1_0_696:notes" presentation:style-name="pr9" draw:text-style-name="P2" draw:layer="layout" svg:width="15.239cm" svg:height="11.429cm" svg:x="1.905cm" svg:y="12.065cm" presentation:class="notes" presentation:placeholder="true" presentation:user-transformed="true">
            <draw:text-box/>
          </draw:frame>
        </presentation:notes>
      </draw:page>
      <draw:page draw:name="Ticketing System" draw:style-name="dp4" draw:master-page-name="CUSTOM_5f_4_5f_1_5f_1_5f_1_5f_1_5f_1">
        <draw:frame draw:name="Google Shape;89;p15" presentation:style-name="pr5" draw:text-style-name="P4" draw:layer="layout" svg:width="8.548cm" svg:height="0.813cm" svg:x="0.427cm" svg:y="1.31cm" presentation:class="title" presentation:user-transformed="true">
          <draw:text-box>
            <text:p text:style-name="P3"><text:span text:style-name="T6">Ticketing System</text:span></text:p>
          </draw:text-box>
        </draw:frame>
        <draw:frame draw:name="Google Shape;90;p15" presentation:style-name="pr6" draw:text-style-name="P7" draw:layer="layout" svg:width="8.548cm" svg:height="4.346cm" svg:x="0.427cm" svg:y="2.173cm" presentation:class="subtitle" presentation:user-transformed="true">
          <draw:text-box>
            <text:p text:style-name="P3"><text:span text:style-name="T8">Ticketing systems are commonly associated with long wait times and manual processes but are also often core to an organisation's user experience and tracking mechanisms.</text:span></text:p>
            <text:p text:style-name="P9"><text:span text:style-name="T8">Platforms can be exposed via the existing tools </text:span><text:span text:style-name="T9">such as Jira and ServiceNow to maintain experience and tracking but replace manual processes with on-demand offerings.</text:span></text:p>
          </draw:text-box>
        </draw:frame>
        <presentation:notes draw:style-name="dp2">
          <draw:page-thumbnail draw:name="Google Shape;86;g33a83a7ceef_0_0:notes" draw:style-name="gr4" draw:layer="layout" svg:width="13.112cm" svg:height="9.524cm" svg:x="2.969cm" svg:y="1.905cm" draw:page-number="6" presentation:class="page"/>
          <draw:frame draw:name="Google Shape;87;g33a83a7ceef_0_0:notes" presentation:style-name="pr10" draw:text-style-name="P2" draw:layer="layout" svg:width="15.239cm" svg:height="11.429cm" svg:x="1.905cm" svg:y="12.065cm" presentation:class="notes" presentation:placeholder="true" presentation:user-transformed="true">
            <draw:text-box/>
          </draw:frame>
        </presentation:notes>
      </draw:page>
      <draw:page draw:name="Command Line Interface (CLI)" draw:style-name="dp4" draw:master-page-name="CUSTOM_5f_4_5f_1_5f_1_5f_1_5f_1_5f_1">
        <draw:frame draw:name="Google Shape;95;p16" presentation:style-name="pr5" draw:text-style-name="P4" draw:layer="layout" svg:width="8.548cm" svg:height="0.813cm" svg:x="0.427cm" svg:y="1.31cm" presentation:class="title" presentation:user-transformed="true">
          <draw:text-box>
            <text:p text:style-name="P3"><text:span text:style-name="T6">Command Line Interface (CLI)</text:span></text:p>
          </draw:text-box>
        </draw:frame>
        <draw:frame draw:name="Google Shape;96;p16" presentation:style-name="pr6" draw:text-style-name="P7" draw:layer="layout" svg:width="8.548cm" svg:height="4.346cm" svg:x="0.427cm" svg:y="2.173cm" presentation:class="subtitle" presentation:user-transformed="true">
          <draw:text-box>
            <text:p text:style-name="P3"><text:span text:style-name="T8">A CLI enables terminal-based platform engagement which is often a preference for engineers and even a requirement for some tasks such as CI/CD scripts which do not have browser access.</text:span></text:p>
            <text:p text:style-name="P9"><text:span text:style-name="T9">CLI configuration and data is directly dependent on the platform and therefore should be managed by the platform itself to reduce overhead.</text:span></text:p>
          </draw:text-box>
        </draw:frame>
        <presentation:notes draw:style-name="dp2">
          <draw:page-thumbnail draw:name="Google Shape;92;g33a83a7ceef_0_10:notes" draw:style-name="gr4" draw:layer="layout" svg:width="13.112cm" svg:height="9.524cm" svg:x="2.969cm" svg:y="1.905cm" draw:page-number="7" presentation:class="page"/>
          <draw:frame draw:name="Google Shape;93;g33a83a7ceef_0_10:notes" presentation:style-name="pr11" draw:text-style-name="P2" draw:layer="layout" svg:width="15.239cm" svg:height="11.429cm" svg:x="1.905cm" svg:y="12.065cm" presentation:class="notes" presentation:placeholder="true" presentation:user-transformed="true">
            <draw:text-box/>
          </draw:frame>
        </presentation:notes>
      </draw:page>
      <draw:page draw:name="Integrated Developer Env (IDE)" draw:style-name="dp4" draw:master-page-name="CUSTOM_5f_4_5f_1_5f_1_5f_1_5f_1_5f_1">
        <draw:frame draw:name="Google Shape;101;p17" presentation:style-name="pr5" draw:text-style-name="P4" draw:layer="layout" svg:width="8.548cm" svg:height="0.813cm" svg:x="0.427cm" svg:y="1.31cm" presentation:class="title" presentation:user-transformed="true">
          <draw:text-box>
            <text:p text:style-name="P3"><text:span text:style-name="T6">Integrated Developer Env (IDE)</text:span></text:p>
          </draw:text-box>
        </draw:frame>
        <draw:frame draw:name="Google Shape;102;p17" presentation:style-name="pr6" draw:text-style-name="P7" draw:layer="layout" svg:width="8.548cm" svg:height="4.346cm" svg:x="0.427cm" svg:y="2.173cm" presentation:class="subtitle" presentation:user-transformed="true">
          <draw:text-box>
            <text:p text:style-name="P3"><text:span text:style-name="T8">Developers are often working with AI and code in an IDE, whether it be more graphical (e.g. JetBrains or VSCode) or in the terminal (e.g. VIM or Neo).</text:span></text:p>
            <text:p text:style-name="P9"><text:span text:style-name="T8">Platforms can provide MCP servers and plugins to any IDE to provide faster feedback and easier access to tools and developer environments.</text:span></text:p>
          </draw:text-box>
        </draw:frame>
        <presentation:notes draw:style-name="dp2">
          <draw:page-thumbnail draw:name="Google Shape;98;g33bb146551b_0_3:notes" draw:style-name="gr4" draw:layer="layout" svg:width="13.112cm" svg:height="9.524cm" svg:x="2.969cm" svg:y="1.905cm" draw:page-number="8" presentation:class="page"/>
          <draw:frame draw:name="Google Shape;99;g33bb146551b_0_3:notes" presentation:style-name="pr12" draw:text-style-name="P2" draw:layer="layout" svg:width="15.239cm" svg:height="11.429cm" svg:x="1.905cm" svg:y="12.065cm" presentation:class="notes" presentation:placeholder="true" presentation:user-transformed="true">
            <draw:text-box/>
          </draw:frame>
        </presentation:notes>
      </draw:page>
      <draw:page draw:name="Destinations explained" draw:style-name="dp5" draw:master-page-name="CUSTOM_5f_3">
        <draw:frame draw:name="Google Shape;107;p18" presentation:style-name="pr13" draw:text-style-name="P4" draw:layer="layout" svg:width="8.548cm" svg:height="0.813cm" svg:x="0.427cm" svg:y="1.31cm" presentation:class="title" presentation:user-transformed="true">
          <draw:text-box>
            <text:p text:style-name="P3"><text:span text:style-name="T1">Destinations explained</text:span></text:p>
          </draw:text-box>
        </draw:frame>
        <draw:frame draw:name="Google Shape;108;p18" presentation:style-name="pr14" draw:text-style-name="P7" draw:layer="layout" svg:width="8.548cm" svg:height="4.346cm" svg:x="0.427cm" svg:y="2.173cm" presentation:class="subtitle" presentation:user-transformed="true">
          <draw:text-box>
            <text:p text:style-name="P3"><text:span text:style-name="T4">Destinations are the locations declarative code can be scheduled to.</text:span></text:p>
            <text:p text:style-name="P8"><text:span text:style-name="T5">A platform has many destinations. Each one refers to a target location that can have declarative code applied via GitOps or other deployment process.</text:span></text:p>
            <text:p text:style-name="P9"><text:span text:style-name="T5">There are countless types of destinations as they can be scoped by type of technology, environment, or ownership model.</text:span></text:p>
          </draw:text-box>
        </draw:frame>
        <draw:custom-shape draw:name="Google Shape;109;p18"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104;g2af853010e1_0_137:notes" draw:style-name="gr4" draw:layer="layout" svg:width="13.112cm" svg:height="9.524cm" svg:x="2.969cm" svg:y="1.905cm" draw:page-number="9" presentation:class="page"/>
          <draw:frame draw:name="Google Shape;105;g2af853010e1_0_137:notes" presentation:style-name="pr15" draw:text-style-name="P2" draw:layer="layout" svg:width="15.239cm" svg:height="11.429cm" svg:x="1.905cm" svg:y="12.065cm" presentation:class="notes" presentation:placeholder="true" presentation:user-transformed="true">
            <draw:text-box/>
          </draw:frame>
        </presentation:notes>
      </draw:page>
      <draw:page draw:name="Kubernetes cluster" draw:style-name="dp4" draw:master-page-name="CUSTOM_5f_3">
        <draw:frame draw:name="Google Shape;114;p19" presentation:style-name="pr13" draw:text-style-name="P4" draw:layer="layout" svg:width="8.774cm" svg:height="0.813cm" svg:x="0.427cm" svg:y="1.31cm" presentation:class="title" presentation:user-transformed="true">
          <draw:text-box>
            <text:p text:style-name="P3"><text:span text:style-name="T6">Kubernetes cluster</text:span></text:p>
          </draw:text-box>
        </draw:frame>
        <draw:frame draw:name="Google Shape;115;p19" presentation:style-name="pr14" draw:text-style-name="P7" draw:layer="layout" svg:width="8.548cm" svg:height="4.346cm" svg:x="0.427cm" svg:y="2.173cm" presentation:class="subtitle" presentation:user-transformed="true">
          <draw:text-box>
            <text:p text:style-name="P3"><text:span text:style-name="T8">There can be as many destinations as you have clusters. Each one configured to the right level of security and scale for its use case.</text:span></text:p>
            <text:p text:style-name="P9"><text:span text:style-name="T8">Each destination can refer to environments (dev/prod), type (GPU, PCI compliant), or any other domain model you divide clusters by within your organisation.</text:span></text:p>
          </draw:text-box>
        </draw:frame>
        <presentation:notes draw:style-name="dp2">
          <draw:page-thumbnail draw:name="Google Shape;111;g2af853010e1_0_681:notes" draw:style-name="gr4" draw:layer="layout" svg:width="13.112cm" svg:height="9.524cm" svg:x="2.969cm" svg:y="1.905cm" draw:page-number="10" presentation:class="page"/>
          <draw:frame draw:name="Google Shape;112;g2af853010e1_0_681:notes" presentation:style-name="pr16" draw:text-style-name="P2" draw:layer="layout" svg:width="15.239cm" svg:height="11.429cm" svg:x="1.905cm" svg:y="12.065cm" presentation:class="notes" presentation:placeholder="true" presentation:user-transformed="true">
            <draw:text-box/>
          </draw:frame>
        </presentation:notes>
      </draw:page>
      <draw:page draw:name="Cloud Provider" draw:style-name="dp4" draw:master-page-name="CUSTOM_5f_3">
        <draw:frame draw:name="Google Shape;120;p20" presentation:style-name="pr13" draw:text-style-name="P4" draw:layer="layout" svg:width="8.774cm" svg:height="0.813cm" svg:x="0.427cm" svg:y="1.31cm" presentation:class="title" presentation:user-transformed="true">
          <draw:text-box>
            <text:p text:style-name="P3"><text:span text:style-name="T6">Cloud Provider</text:span></text:p>
          </draw:text-box>
        </draw:frame>
        <draw:frame draw:name="Google Shape;121;p20" presentation:style-name="pr14" draw:text-style-name="P7" draw:layer="layout" svg:width="8.548cm" svg:height="4.346cm" svg:x="0.427cm" svg:y="2.173cm" presentation:class="subtitle" presentation:user-transformed="true">
          <draw:text-box>
            <text:p text:style-name="P3"><text:span text:style-name="T8">You may require multiple cloud destinations to cover different providers, accounts, even regions.</text:span></text:p>
            <text:p text:style-name="P9"><text:span text:style-name="T8">Each destination represents a unique domain and can be configured using proprietary tools (e.g. CloudFormation or Bicep) or general Infrastructure as Code tools such as Crossplane or Terraform</text:span></text:p>
          </draw:text-box>
        </draw:frame>
        <presentation:notes draw:style-name="dp2">
          <draw:page-thumbnail draw:name="Google Shape;117;g37ac36654bc_0_18:notes" draw:style-name="gr4" draw:layer="layout" svg:width="13.112cm" svg:height="9.524cm" svg:x="2.969cm" svg:y="1.905cm" draw:page-number="11" presentation:class="page"/>
          <draw:frame draw:name="Google Shape;118;g37ac36654bc_0_18:notes" presentation:style-name="pr17" draw:text-style-name="P2" draw:layer="layout" svg:width="15.239cm" svg:height="11.429cm" svg:x="1.905cm" svg:y="12.065cm" presentation:class="notes" presentation:placeholder="true" presentation:user-transformed="true">
            <draw:text-box/>
          </draw:frame>
        </presentation:notes>
      </draw:page>
      <draw:page draw:name="Software as a Service (SaaS)" draw:style-name="dp4" draw:master-page-name="CUSTOM_5f_3">
        <draw:frame draw:name="Google Shape;126;p21" presentation:style-name="pr13" draw:text-style-name="P4" draw:layer="layout" svg:width="8.548cm" svg:height="0.813cm" svg:x="0.427cm" svg:y="1.31cm" presentation:class="title" presentation:user-transformed="true">
          <draw:text-box>
            <text:p text:style-name="P3"><text:span text:style-name="T6">Software as a Service (SaaS)</text:span></text:p>
          </draw:text-box>
        </draw:frame>
        <draw:frame draw:name="Google Shape;127;p21" presentation:style-name="pr14" draw:text-style-name="P7" draw:layer="layout" svg:width="8.548cm" svg:height="4.346cm" svg:x="0.427cm" svg:y="2.173cm" presentation:class="subtitle" presentation:user-transformed="true">
          <draw:text-box>
            <text:p text:style-name="P3"><text:span text:style-name="T8">This can represent any number of vendors where the software you depend on is run by the vendor and accessed over the internet.</text:span></text:p>
            <text:p text:style-name="P9"><text:span text:style-name="T8">You can use this destination to manage what vendor features are available as well as to provide access or features for a specific tenant.</text:span></text:p>
          </draw:text-box>
        </draw:frame>
        <presentation:notes draw:style-name="dp2">
          <draw:page-thumbnail draw:name="Google Shape;123;g2af853010e1_0_691:notes" draw:style-name="gr4" draw:layer="layout" svg:width="13.112cm" svg:height="9.524cm" svg:x="2.969cm" svg:y="1.905cm" draw:page-number="12" presentation:class="page"/>
          <draw:frame draw:name="Google Shape;124;g2af853010e1_0_691:notes" presentation:style-name="pr18" draw:text-style-name="P2" draw:layer="layout" svg:width="15.239cm" svg:height="11.429cm" svg:x="1.905cm" svg:y="12.065cm" presentation:class="notes" presentation:placeholder="true" presentation:user-transformed="true">
            <draw:text-box/>
          </draw:frame>
        </presentation:notes>
      </draw:page>
      <draw:page draw:name="On-premise / hardware" draw:style-name="dp4" draw:master-page-name="CUSTOM_5f_3">
        <draw:frame draw:name="Google Shape;132;p22" presentation:style-name="pr13" draw:text-style-name="P4" draw:layer="layout" svg:width="8.548cm" svg:height="0.813cm" svg:x="0.427cm" svg:y="1.31cm" presentation:class="title" presentation:user-transformed="true">
          <draw:text-box>
            <text:p text:style-name="P3"><text:span text:style-name="T6">On-premise / hardware</text:span></text:p>
          </draw:text-box>
        </draw:frame>
        <draw:frame draw:name="Google Shape;133;p22" presentation:style-name="pr14" draw:text-style-name="P7" draw:layer="layout" svg:width="8.548cm" svg:height="4.346cm" svg:x="0.427cm" svg:y="2.173cm" presentation:class="subtitle" presentation:user-transformed="true">
          <draw:text-box>
            <text:p text:style-name="P3"><text:span text:style-name="T8">Not all resources are in the cloud.</text:span></text:p>
            <text:p text:style-name="P9"><text:span text:style-name="T8">If you need to manage on-premise infrastructure you can use something as simple as a cronjob to refer to the declared state in a Destination to maintain and update the configuration of anything from a network device to a server to a mainframe.</text:span></text:p>
          </draw:text-box>
        </draw:frame>
        <presentation:notes draw:style-name="dp2">
          <draw:page-thumbnail draw:name="Google Shape;129;g2af853010e1_0_701:notes" draw:style-name="gr4" draw:layer="layout" svg:width="13.112cm" svg:height="9.524cm" svg:x="2.969cm" svg:y="1.905cm" draw:page-number="13" presentation:class="page"/>
          <draw:frame draw:name="Google Shape;130;g2af853010e1_0_701:notes" presentation:style-name="pr19" draw:text-style-name="P2" draw:layer="layout" svg:width="15.239cm" svg:height="11.429cm" svg:x="1.905cm" svg:y="12.065cm" presentation:class="notes" presentation:placeholder="true" presentation:user-transformed="true">
            <draw:text-box/>
          </draw:frame>
        </presentation:notes>
      </draw:page>
      <draw:page draw:name="Inputs explained" draw:style-name="dp6" draw:master-page-name="CUSTOM_5f_4_5f_1_5f_1_5f_1_5f_1_5f_1_5f_1">
        <draw:frame draw:name="Google Shape;138;p23" presentation:style-name="pr20" draw:text-style-name="P4" draw:layer="layout" svg:width="8.548cm" svg:height="0.813cm" svg:x="0.427cm" svg:y="1.31cm" presentation:class="title" presentation:user-transformed="true">
          <draw:text-box>
            <text:p text:style-name="P3"><text:span text:style-name="T1">Inputs explained</text:span></text:p>
          </draw:text-box>
        </draw:frame>
        <draw:frame draw:name="Google Shape;139;p23" presentation:style-name="pr21" draw:text-style-name="P7" draw:layer="layout" svg:width="8.548cm" svg:height="4.346cm" svg:x="0.427cm" svg:y="2.173cm" presentation:class="subtitle" presentation:user-transformed="true">
          <draw:text-box>
            <text:p text:style-name="P3"><text:span text:style-name="T4">Inputs are the pieces of information that the platform users can configure.</text:span></text:p>
            <text:p text:style-name="P8"><text:span text:style-name="T5">Input fields can be in many different formats, such as enums, strings, numbers, and booleans.</text:span></text:p>
            <text:p text:style-name="P9"><text:span text:style-name="T5">Keep in mind, inputs are how users interact with the platform, so they should be viewed as a collaborative effort.</text:span></text:p>
          </draw:text-box>
        </draw:frame>
        <draw:custom-shape draw:name="Google Shape;140;p23"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135;g2af853010e1_0_121:notes" draw:style-name="gr4" draw:layer="layout" svg:width="13.112cm" svg:height="9.524cm" svg:x="2.969cm" svg:y="1.905cm" draw:page-number="14" presentation:class="page"/>
          <draw:frame draw:name="Google Shape;136;g2af853010e1_0_121:notes" presentation:style-name="pr22" draw:text-style-name="P2" draw:layer="layout" svg:width="15.239cm" svg:height="11.429cm" svg:x="1.905cm" svg:y="12.065cm" presentation:class="notes" presentation:placeholder="true" presentation:user-transformed="true">
            <draw:text-box/>
          </draw:frame>
        </presentation:notes>
      </draw:page>
      <draw:page draw:name="Name" draw:style-name="dp4" draw:master-page-name="CUSTOM_5f_4_5f_1_5f_1_5f_1_5f_1_5f_1_5f_1">
        <draw:frame draw:name="Google Shape;145;p24" presentation:style-name="pr20" draw:text-style-name="P4" draw:layer="layout" svg:width="8.548cm" svg:height="0.813cm" svg:x="0.427cm" svg:y="1.31cm" presentation:class="title" presentation:user-transformed="true">
          <draw:text-box>
            <text:p text:style-name="P3"><text:span text:style-name="T6">Name</text:span></text:p>
          </draw:text-box>
        </draw:frame>
        <draw:frame draw:name="Google Shape;146;p24" presentation:style-name="pr21" draw:text-style-name="P7" draw:layer="layout" svg:width="8.548cm" svg:height="4.346cm" svg:x="0.427cm" svg:y="2.173cm" presentation:class="subtitle" presentation:user-transformed="true">
          <draw:text-box>
            <text:p text:style-name="P3"><text:span text:style-name="T8">This is both the most common, and often the least necessary input, so think twice before using. Do you require a name from the user? Or is this something you can generate?</text:span></text:p>
            <text:p text:style-name="P9"><text:span text:style-name="T8">Name inputs are most important when the name is frequently referenced off-platform.</text:span></text:p>
          </draw:text-box>
        </draw:frame>
        <presentation:notes draw:style-name="dp2">
          <draw:page-thumbnail draw:name="Google Shape;142;g2af853010e1_0_476:notes" draw:style-name="gr4" draw:layer="layout" svg:width="13.112cm" svg:height="9.524cm" svg:x="2.969cm" svg:y="1.905cm" draw:page-number="15" presentation:class="page"/>
          <draw:frame draw:name="Google Shape;143;g2af853010e1_0_476:notes" presentation:style-name="pr23" draw:text-style-name="P2" draw:layer="layout" svg:width="15.239cm" svg:height="11.429cm" svg:x="1.905cm" svg:y="12.065cm" presentation:class="notes" presentation:placeholder="true" presentation:user-transformed="true">
            <draw:text-box/>
          </draw:frame>
        </presentation:notes>
      </draw:page>
      <draw:page draw:name="Size" draw:style-name="dp4" draw:master-page-name="CUSTOM_5f_4_5f_1_5f_1_5f_1_5f_1_5f_1_5f_1">
        <draw:frame draw:name="Google Shape;151;p25" presentation:style-name="pr20" draw:text-style-name="P4" draw:layer="layout" svg:width="8.548cm" svg:height="0.813cm" svg:x="0.427cm" svg:y="1.31cm" presentation:class="title" presentation:user-transformed="true">
          <draw:text-box>
            <text:p text:style-name="P3"><text:span text:style-name="T6">Size</text:span></text:p>
          </draw:text-box>
        </draw:frame>
        <draw:frame draw:name="Google Shape;152;p25" presentation:style-name="pr21" draw:text-style-name="P7" draw:layer="layout" svg:width="8.548cm" svg:height="4.346cm" svg:x="0.427cm" svg:y="2.173cm" presentation:class="subtitle" presentation:user-transformed="true">
          <draw:text-box>
            <text:p text:style-name="P3"><text:span text:style-name="T8">How big a resource is can affect its cost and efficiency. Users may be able to indicate their requirements in bucket sizing (e.g. small, medium or large) or need to provide specific bytes.</text:span></text:p>
            <text:p text:style-name="P9"><text:span text:style-name="T8">Keep in mind that if size is provided, and it is either too big or too small, it will be the user who needs to update their request to match the actual need.</text:span></text:p>
          </draw:text-box>
        </draw:frame>
        <presentation:notes draw:style-name="dp2">
          <draw:page-thumbnail draw:name="Google Shape;148;g2af853010e1_0_481:notes" draw:style-name="gr4" draw:layer="layout" svg:width="13.112cm" svg:height="9.524cm" svg:x="2.969cm" svg:y="1.905cm" draw:page-number="16" presentation:class="page"/>
          <draw:frame draw:name="Google Shape;149;g2af853010e1_0_481:notes" presentation:style-name="pr24" draw:text-style-name="P2" draw:layer="layout" svg:width="15.239cm" svg:height="11.429cm" svg:x="1.905cm" svg:y="12.065cm" presentation:class="notes" presentation:placeholder="true" presentation:user-transformed="true">
            <draw:text-box/>
          </draw:frame>
        </presentation:notes>
      </draw:page>
      <draw:page draw:name="Physical location" draw:style-name="dp4" draw:master-page-name="CUSTOM_5f_4_5f_1_5f_1_5f_1_5f_1_5f_1_5f_1">
        <draw:frame draw:name="Google Shape;157;p26" presentation:style-name="pr20" draw:text-style-name="P4" draw:layer="layout" svg:width="8.548cm" svg:height="0.813cm" svg:x="0.427cm" svg:y="1.31cm" presentation:class="title" presentation:user-transformed="true">
          <draw:text-box>
            <text:p text:style-name="P3"><text:span text:style-name="T6">Physical location</text:span></text:p>
          </draw:text-box>
        </draw:frame>
        <draw:frame draw:name="Google Shape;158;p26" presentation:style-name="pr21" draw:text-style-name="P7" draw:layer="layout" svg:width="8.548cm" svg:height="4.346cm" svg:x="0.427cm" svg:y="2.173cm" presentation:class="subtitle" presentation:user-transformed="true">
          <draw:text-box>
            <text:p text:style-name="P3"><text:span text:style-name="T8">Most of the time a user doesn't care </text:span><text:span text:style-name="T10">where</text:span><text:span text:style-name="T8"> a resource is deployed, just that it is available through networking.</text:span></text:p>
            <text:p text:style-name="P9"><text:span text:style-name="T8">In some cases though a user must meet data residency requirements and/or latency requirements which demand a specific physical location for their resources.</text:span></text:p>
          </draw:text-box>
        </draw:frame>
        <presentation:notes draw:style-name="dp2">
          <draw:page-thumbnail draw:name="Google Shape;154;g2af853010e1_0_486:notes" draw:style-name="gr4" draw:layer="layout" svg:width="13.112cm" svg:height="9.524cm" svg:x="2.969cm" svg:y="1.905cm" draw:page-number="17" presentation:class="page"/>
          <draw:frame draw:name="Google Shape;155;g2af853010e1_0_486:notes" presentation:style-name="pr25" draw:text-style-name="P2" draw:layer="layout" svg:width="15.239cm" svg:height="11.429cm" svg:x="1.905cm" svg:y="12.065cm" presentation:class="notes" presentation:placeholder="true" presentation:user-transformed="true">
            <draw:text-box/>
          </draw:frame>
        </presentation:notes>
      </draw:page>
      <draw:page draw:name="Container image" draw:style-name="dp4" draw:master-page-name="CUSTOM_5f_4_5f_1_5f_1_5f_1_5f_1_5f_1_5f_1">
        <draw:frame draw:name="Google Shape;163;p27" presentation:style-name="pr20" draw:text-style-name="P4" draw:layer="layout" svg:width="8.548cm" svg:height="0.813cm" svg:x="0.427cm" svg:y="1.31cm" presentation:class="title" presentation:user-transformed="true">
          <draw:text-box>
            <text:p text:style-name="P3"><text:span text:style-name="T6">Container image</text:span></text:p>
          </draw:text-box>
        </draw:frame>
        <draw:frame draw:name="Google Shape;164;p27" presentation:style-name="pr21" draw:text-style-name="P7" draw:layer="layout" svg:width="8.548cm" svg:height="4.346cm" svg:x="0.427cm" svg:y="2.173cm" presentation:class="subtitle" presentation:user-transformed="true">
          <draw:text-box>
            <text:p text:style-name="P10"><text:span text:style-name="T8">If a user is asking the platform to deploy software, it likely needs to provide the software to deploy. One option is to provide a previously built image via its registry or other indicators.</text:span></text:p>
          </draw:text-box>
        </draw:frame>
        <presentation:notes draw:style-name="dp2">
          <draw:page-thumbnail draw:name="Google Shape;160;g2af853010e1_0_491:notes" draw:style-name="gr4" draw:layer="layout" svg:width="13.112cm" svg:height="9.524cm" svg:x="2.969cm" svg:y="1.905cm" draw:page-number="18" presentation:class="page"/>
          <draw:frame draw:name="Google Shape;161;g2af853010e1_0_491:notes" presentation:style-name="pr26" draw:text-style-name="P2" draw:layer="layout" svg:width="15.239cm" svg:height="11.429cm" svg:x="1.905cm" svg:y="12.065cm" presentation:class="notes" presentation:placeholder="true" presentation:user-transformed="true">
            <draw:text-box/>
          </draw:frame>
        </presentation:notes>
      </draw:page>
      <draw:page draw:name="Security level" draw:style-name="dp4" draw:master-page-name="CUSTOM_5f_4_5f_1_5f_1_5f_1_5f_1_5f_1_5f_1">
        <draw:frame draw:name="Google Shape;169;p28" presentation:style-name="pr20" draw:text-style-name="P4" draw:layer="layout" svg:width="8.548cm" svg:height="0.813cm" svg:x="0.427cm" svg:y="1.31cm" presentation:class="title" presentation:user-transformed="true">
          <draw:text-box>
            <text:p text:style-name="P3"><text:span text:style-name="T6">Security level</text:span></text:p>
          </draw:text-box>
        </draw:frame>
        <draw:frame draw:name="Google Shape;170;p28" presentation:style-name="pr21" draw:text-style-name="P7" draw:layer="layout" svg:width="8.548cm" svg:height="4.346cm" svg:x="0.427cm" svg:y="2.173cm" presentation:class="subtitle" presentation:user-transformed="true">
          <draw:text-box>
            <text:p text:style-name="P3"><text:span text:style-name="T8">Not all resources require the same level of security. For example, some resources may never touch customer data, others may contain not only customer information, but data that can be used for financial or other personal attacks.</text:span></text:p>
            <text:p text:style-name="P9"><text:span text:style-name="T8">If the platform can not derive the required security level a user can provide this information.</text:span></text:p>
          </draw:text-box>
        </draw:frame>
        <presentation:notes draw:style-name="dp2">
          <draw:page-thumbnail draw:name="Google Shape;166;g2af853010e1_0_496:notes" draw:style-name="gr4" draw:layer="layout" svg:width="13.112cm" svg:height="9.524cm" svg:x="2.969cm" svg:y="1.905cm" draw:page-number="19" presentation:class="page"/>
          <draw:frame draw:name="Google Shape;167;g2af853010e1_0_496:notes" presentation:style-name="pr27" draw:text-style-name="P2" draw:layer="layout" svg:width="15.239cm" svg:height="11.429cm" svg:x="1.905cm" svg:y="12.065cm" presentation:class="notes" presentation:placeholder="true" presentation:user-transformed="true">
            <draw:text-box/>
          </draw:frame>
        </presentation:notes>
      </draw:page>
      <draw:page draw:name="Dependencies" draw:style-name="dp4" draw:master-page-name="CUSTOM_5f_4_5f_1_5f_1_5f_1_5f_1_5f_1_5f_1">
        <draw:frame draw:name="Google Shape;175;p29" presentation:style-name="pr20" draw:text-style-name="P4" draw:layer="layout" svg:width="8.548cm" svg:height="0.813cm" svg:x="0.427cm" svg:y="1.31cm" presentation:class="title" presentation:user-transformed="true">
          <draw:text-box>
            <text:p text:style-name="P3"><text:span text:style-name="T6">Dependencies</text:span></text:p>
          </draw:text-box>
        </draw:frame>
        <draw:frame draw:name="Google Shape;176;p29" presentation:style-name="pr21" draw:text-style-name="P7" draw:layer="layout" svg:width="8.548cm" svg:height="4.346cm" svg:x="0.427cm" svg:y="2.173cm" presentation:class="subtitle" presentation:user-transformed="true">
          <draw:text-box>
            <text:p text:style-name="P3"><text:span text:style-name="T8">A resource may have one or more optional dependencies. For example, a software application can opt into feature flagging services or a database.</text:span></text:p>
            <text:p text:style-name="P9"><text:span text:style-name="T8">Users can provide a list of dependencies that the platform can access existing dependencies of create and then manage new instances in relation to the requested resource.</text:span></text:p>
          </draw:text-box>
        </draw:frame>
        <presentation:notes draw:style-name="dp2">
          <draw:page-thumbnail draw:name="Google Shape;172;g2af853010e1_0_747:notes" draw:style-name="gr4" draw:layer="layout" svg:width="13.112cm" svg:height="9.524cm" svg:x="2.969cm" svg:y="1.905cm" draw:page-number="20" presentation:class="page"/>
          <draw:frame draw:name="Google Shape;173;g2af853010e1_0_747:notes" presentation:style-name="pr28" draw:text-style-name="P2" draw:layer="layout" svg:width="15.239cm" svg:height="11.429cm" svg:x="1.905cm" svg:y="12.065cm" presentation:class="notes" presentation:placeholder="true" presentation:user-transformed="true">
            <draw:text-box/>
          </draw:frame>
        </presentation:notes>
      </draw:page>
      <draw:page draw:name="Upgrade rules" draw:style-name="dp4" draw:master-page-name="CUSTOM_5f_4_5f_1_5f_1_5f_1_5f_1_5f_1_5f_1">
        <draw:frame draw:name="Google Shape;181;p30" presentation:style-name="pr20" draw:text-style-name="P4" draw:layer="layout" svg:width="8.548cm" svg:height="0.813cm" svg:x="0.427cm" svg:y="1.31cm" presentation:class="title" presentation:user-transformed="true">
          <draw:text-box>
            <text:p text:style-name="P3"><text:span text:style-name="T6">Upgrade rules</text:span></text:p>
          </draw:text-box>
        </draw:frame>
        <draw:frame draw:name="Google Shape;182;p30" presentation:style-name="pr21" draw:text-style-name="P7" draw:layer="layout" svg:width="8.548cm" svg:height="4.346cm" svg:x="0.427cm" svg:y="2.173cm" presentation:class="subtitle" presentation:user-transformed="true">
          <draw:text-box>
            <text:p text:style-name="P3"><text:span text:style-name="T8">The power of a platform is that it can manage upgrades as an entire fleet. But just because the whole platform can be updated at the same time doesn't mean it should be.</text:span></text:p>
            <text:p text:style-name="P9"><text:span text:style-name="T8">Some users may want to opt into a slower or later stage upgrade schedule while others may want the cutting edge releases.</text:span></text:p>
          </draw:text-box>
        </draw:frame>
        <presentation:notes draw:style-name="dp2">
          <draw:page-thumbnail draw:name="Google Shape;178;g2af853010e1_0_506:notes" draw:style-name="gr4" draw:layer="layout" svg:width="13.112cm" svg:height="9.524cm" svg:x="2.969cm" svg:y="1.905cm" draw:page-number="21" presentation:class="page"/>
          <draw:frame draw:name="Google Shape;179;g2af853010e1_0_506:notes" presentation:style-name="pr29" draw:text-style-name="P2" draw:layer="layout" svg:width="15.239cm" svg:height="11.429cm" svg:x="1.905cm" svg:y="12.065cm" presentation:class="notes" presentation:placeholder="true" presentation:user-transformed="true">
            <draw:text-box/>
          </draw:frame>
        </presentation:notes>
      </draw:page>
      <draw:page draw:name="Repository" draw:style-name="dp4" draw:master-page-name="CUSTOM_5f_4_5f_1_5f_1_5f_1_5f_1_5f_1_5f_1">
        <draw:frame draw:name="Google Shape;187;p31" presentation:style-name="pr20" draw:text-style-name="P4" draw:layer="layout" svg:width="8.548cm" svg:height="0.813cm" svg:x="0.427cm" svg:y="1.31cm" presentation:class="title" presentation:user-transformed="true">
          <draw:text-box>
            <text:p text:style-name="P3"><text:span text:style-name="T6">Repository</text:span></text:p>
          </draw:text-box>
        </draw:frame>
        <draw:frame draw:name="Google Shape;188;p31" presentation:style-name="pr21" draw:text-style-name="P7" draw:layer="layout" svg:width="8.548cm" svg:height="4.346cm" svg:x="0.427cm" svg:y="2.173cm" presentation:class="subtitle" presentation:user-transformed="true">
          <draw:text-box>
            <text:p text:style-name="P10"><text:span text:style-name="T9">If a user is asking the platform to deploy software, it likely needs to provide the software to deploy. One option is to provide a repository where the software lives and allow the platform to derive the deployment from there.</text:span></text:p>
          </draw:text-box>
        </draw:frame>
        <presentation:notes draw:style-name="dp2">
          <draw:page-thumbnail draw:name="Google Shape;184;g2af853010e1_0_511:notes" draw:style-name="gr4" draw:layer="layout" svg:width="13.112cm" svg:height="9.524cm" svg:x="2.969cm" svg:y="1.905cm" draw:page-number="22" presentation:class="page"/>
          <draw:frame draw:name="Google Shape;185;g2af853010e1_0_511:notes" presentation:style-name="pr30" draw:text-style-name="P2" draw:layer="layout" svg:width="15.239cm" svg:height="11.429cm" svg:x="1.905cm" svg:y="12.065cm" presentation:class="notes" presentation:placeholder="true" presentation:user-transformed="true">
            <draw:text-box/>
          </draw:frame>
        </presentation:notes>
      </draw:page>
      <draw:page draw:name="Ownership" draw:style-name="dp4" draw:master-page-name="CUSTOM_5f_4_5f_1_5f_1_5f_1_5f_1_5f_1_5f_1">
        <draw:frame draw:name="Google Shape;193;p32" presentation:style-name="pr20" draw:text-style-name="P4" draw:layer="layout" svg:width="8.548cm" svg:height="0.813cm" svg:x="0.427cm" svg:y="1.31cm" presentation:class="title" presentation:user-transformed="true">
          <draw:text-box>
            <text:p text:style-name="P3"><text:span text:style-name="T6">Ownership</text:span></text:p>
          </draw:text-box>
        </draw:frame>
        <draw:frame draw:name="Google Shape;194;p32" presentation:style-name="pr21" draw:text-style-name="P7" draw:layer="layout" svg:width="8.548cm" svg:height="4.346cm" svg:x="0.427cm" svg:y="2.173cm" presentation:class="subtitle" presentation:user-transformed="true">
          <draw:text-box>
            <text:p text:style-name="P3"><text:span text:style-name="T8">Ownership can be used for a lot of different things including tagging and access permissions.</text:span></text:p>
            <text:p text:style-name="P9"><text:span text:style-name="T8">In the event that the platform can not determine ownership from the requesting user, it may need to be explicitly told in order to adhere to business processes.</text:span></text:p>
          </draw:text-box>
        </draw:frame>
        <presentation:notes draw:style-name="dp2">
          <draw:page-thumbnail draw:name="Google Shape;190;g2af853010e1_0_516:notes" draw:style-name="gr4" draw:layer="layout" svg:width="13.112cm" svg:height="9.524cm" svg:x="2.969cm" svg:y="1.905cm" draw:page-number="23" presentation:class="page"/>
          <draw:frame draw:name="Google Shape;191;g2af853010e1_0_516:notes" presentation:style-name="pr31" draw:text-style-name="P2" draw:layer="layout" svg:width="15.239cm" svg:height="11.429cm" svg:x="1.905cm" svg:y="12.065cm" presentation:class="notes" presentation:placeholder="true" presentation:user-transformed="true">
            <draw:text-box/>
          </draw:frame>
        </presentation:notes>
      </draw:page>
      <draw:page draw:name="Version" draw:style-name="dp4" draw:master-page-name="CUSTOM_5f_4_5f_1_5f_1_5f_1_5f_1_5f_1_5f_1">
        <draw:frame draw:name="Google Shape;199;p33" presentation:style-name="pr20" draw:text-style-name="P4" draw:layer="layout" svg:width="8.548cm" svg:height="0.813cm" svg:x="0.427cm" svg:y="1.31cm" presentation:class="title" presentation:user-transformed="true">
          <draw:text-box>
            <text:p text:style-name="P3"><text:span text:style-name="T6">Version</text:span></text:p>
          </draw:text-box>
        </draw:frame>
        <draw:frame draw:name="Google Shape;200;p33" presentation:style-name="pr21" draw:text-style-name="P7" draw:layer="layout" svg:width="8.548cm" svg:height="4.346cm" svg:x="0.427cm" svg:y="2.173cm" presentation:class="subtitle" presentation:user-transformed="true">
          <draw:text-box>
            <text:p text:style-name="P3"><text:span text:style-name="T8">Ownership over the version of a resource implicitly determines ownership of upgrades and maintenance.</text:span></text:p>
            <text:p text:style-name="P9"><text:span text:style-name="T8">For example, if a platform exposes version as an input, the users are then required to engage with any upgrades of the resource. But if the platform only exposes the major version it would implicitly be owning the management of both minor and patch version updates.</text:span></text:p>
          </draw:text-box>
        </draw:frame>
        <presentation:notes draw:style-name="dp2">
          <draw:page-thumbnail draw:name="Google Shape;196;g2af853010e1_0_521:notes" draw:style-name="gr4" draw:layer="layout" svg:width="13.112cm" svg:height="9.524cm" svg:x="2.969cm" svg:y="1.905cm" draw:page-number="24" presentation:class="page"/>
          <draw:frame draw:name="Google Shape;197;g2af853010e1_0_521:notes" presentation:style-name="pr32" draw:text-style-name="P2" draw:layer="layout" svg:width="15.239cm" svg:height="11.429cm" svg:x="1.905cm" svg:y="12.065cm" presentation:class="notes" presentation:placeholder="true" presentation:user-transformed="true">
            <draw:text-box/>
          </draw:frame>
        </presentation:notes>
      </draw:page>
      <draw:page draw:name="Configuration" draw:style-name="dp4" draw:master-page-name="CUSTOM_5f_4_5f_1_5f_1_5f_1_5f_1_5f_1_5f_1">
        <draw:frame draw:name="Google Shape;205;p34" presentation:style-name="pr20" draw:text-style-name="P4" draw:layer="layout" svg:width="8.548cm" svg:height="0.813cm" svg:x="0.427cm" svg:y="1.31cm" presentation:class="title" presentation:user-transformed="true">
          <draw:text-box>
            <text:p text:style-name="P3"><text:span text:style-name="T6">Configuration</text:span></text:p>
          </draw:text-box>
        </draw:frame>
        <draw:frame draw:name="Google Shape;206;p34" presentation:style-name="pr21" draw:text-style-name="P7" draw:layer="layout" svg:width="8.548cm" svg:height="4.346cm" svg:x="0.427cm" svg:y="2.173cm" presentation:class="subtitle" presentation:user-transformed="true">
          <draw:text-box>
            <text:p text:style-name="P3"><text:span text:style-name="T8">Configuration is a generic reference to any fields which alter the behaviour of a resource within the defined boundaries.</text:span></text:p>
            <text:p text:style-name="P9"><text:span text:style-name="T8">If you choose to use this input, think about adding notes about what specific configuration you would expose.</text:span></text:p>
          </draw:text-box>
        </draw:frame>
        <presentation:notes draw:style-name="dp2">
          <draw:page-thumbnail draw:name="Google Shape;202;g2af853010e1_0_526:notes" draw:style-name="gr4" draw:layer="layout" svg:width="13.112cm" svg:height="9.524cm" svg:x="2.969cm" svg:y="1.905cm" draw:page-number="25" presentation:class="page"/>
          <draw:frame draw:name="Google Shape;203;g2af853010e1_0_526:notes" presentation:style-name="pr33" draw:text-style-name="P2" draw:layer="layout" svg:width="15.239cm" svg:height="11.429cm" svg:x="1.905cm" svg:y="12.065cm" presentation:class="notes" presentation:placeholder="true" presentation:user-transformed="true">
            <draw:text-box/>
          </draw:frame>
        </presentation:notes>
      </draw:page>
      <draw:page draw:name="Environment" draw:style-name="dp4" draw:master-page-name="CUSTOM_5f_4_5f_1_5f_1_5f_1_5f_1_5f_1_5f_1">
        <draw:frame draw:name="Google Shape;211;p35" presentation:style-name="pr20" draw:text-style-name="P4" draw:layer="layout" svg:width="8.548cm" svg:height="0.813cm" svg:x="0.427cm" svg:y="1.31cm" presentation:class="title" presentation:user-transformed="true">
          <draw:text-box>
            <text:p text:style-name="P3"><text:span text:style-name="T6">Environment</text:span></text:p>
          </draw:text-box>
        </draw:frame>
        <draw:frame draw:name="Google Shape;212;p35" presentation:style-name="pr21" draw:text-style-name="P7" draw:layer="layout" svg:width="8.548cm" svg:height="4.346cm" svg:x="0.427cm" svg:y="2.173cm" presentation:class="subtitle" presentation:user-transformed="true">
          <draw:text-box>
            <text:p text:style-name="P3"><text:span text:style-name="T9">It is common to have a number of distinct setups or configurations where software is built, tested, and deployed.</text:span></text:p>
            <text:p text:style-name="P9"><text:span text:style-name="T9">While environments can require the same infrastructure and tooling building blocks, they often implement them in different ways. Provided this input, the platform can determine these configurations for the user.</text:span></text:p>
          </draw:text-box>
        </draw:frame>
        <presentation:notes draw:style-name="dp2">
          <draw:page-thumbnail draw:name="Google Shape;208;g2af853010e1_0_185:notes" draw:style-name="gr4" draw:layer="layout" svg:width="13.112cm" svg:height="9.524cm" svg:x="2.969cm" svg:y="1.905cm" draw:page-number="26" presentation:class="page"/>
          <draw:frame draw:name="Google Shape;209;g2af853010e1_0_185:notes" presentation:style-name="pr34" draw:text-style-name="P2" draw:layer="layout" svg:width="15.239cm" svg:height="11.429cm" svg:x="1.905cm" svg:y="12.065cm" presentation:class="notes" presentation:placeholder="true" presentation:user-transformed="true">
            <draw:text-box/>
          </draw:frame>
        </presentation:notes>
      </draw:page>
      <draw:page draw:name="Outputs explained" draw:style-name="dp7" draw:master-page-name="CUSTOM_5f_2">
        <draw:frame draw:name="Google Shape;217;p36" presentation:style-name="pr35" draw:text-style-name="P4" draw:layer="layout" svg:width="8.548cm" svg:height="0.813cm" svg:x="0.427cm" svg:y="1.31cm" presentation:class="title" presentation:user-transformed="true">
          <draw:text-box>
            <text:p text:style-name="P3"><text:span text:style-name="T1">Outputs explained</text:span></text:p>
          </draw:text-box>
        </draw:frame>
        <draw:frame draw:name="Google Shape;218;p36" presentation:style-name="pr36" draw:text-style-name="P7" draw:layer="layout" svg:width="8.548cm" svg:height="4.346cm" svg:x="0.427cm" svg:y="2.173cm" presentation:class="subtitle" presentation:user-transformed="true">
          <draw:text-box>
            <text:p text:style-name="P3"><text:span text:style-name="T4">Outputs are the information that the platform reports back to users both on creation and over time.</text:span></text:p>
            <text:p text:style-name="P8"><text:span text:style-name="T5">It is common to include some data that is designed for humans to read and other data that is designed for machines to parse.</text:span></text:p>
            <text:p text:style-name="P9"><text:span text:style-name="T5">These outputs should be sufficient for users to both use and debug the resources.</text:span></text:p>
          </draw:text-box>
        </draw:frame>
        <draw:custom-shape draw:name="Google Shape;219;p36"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214;g2af853010e1_0_132:notes" draw:style-name="gr4" draw:layer="layout" svg:width="13.112cm" svg:height="9.524cm" svg:x="2.969cm" svg:y="1.905cm" draw:page-number="27" presentation:class="page"/>
          <draw:frame draw:name="Google Shape;215;g2af853010e1_0_132:notes" presentation:style-name="pr37" draw:text-style-name="P2" draw:layer="layout" svg:width="15.239cm" svg:height="11.429cm" svg:x="1.905cm" svg:y="12.065cm" presentation:class="notes" presentation:placeholder="true" presentation:user-transformed="true">
            <draw:text-box/>
          </draw:frame>
        </presentation:notes>
      </draw:page>
      <draw:page draw:name="Secrets" draw:style-name="dp4" draw:master-page-name="CUSTOM_5f_2">
        <draw:frame draw:name="Google Shape;224;p37" presentation:style-name="pr35" draw:text-style-name="P4" draw:layer="layout" svg:width="8.548cm" svg:height="0.813cm" svg:x="0.427cm" svg:y="1.31cm" presentation:class="title" presentation:user-transformed="true">
          <draw:text-box>
            <text:p text:style-name="P3"><text:span text:style-name="T6">Secrets</text:span></text:p>
          </draw:text-box>
        </draw:frame>
        <draw:frame draw:name="Google Shape;225;p37" presentation:style-name="pr36" draw:text-style-name="P7" draw:layer="layout" svg:width="8.548cm" svg:height="4.346cm" svg:x="0.427cm" svg:y="2.173cm" presentation:class="subtitle" presentation:user-transformed="true">
          <draw:text-box>
            <text:p text:style-name="P3"><text:span text:style-name="T8">When a resource requires a secret for access (e.g.</text:span><text:span text:style-name="T9"> a password or a database connection string), the users will need to know what that secret is.</text:span></text:p>
            <text:p text:style-name="P9"><text:span text:style-name="T9">API responses are not secured transit, however you can return back a location where the secret is available. E.g. a HashiCorp Vault or cloud secret manager URL.</text:span></text:p>
          </draw:text-box>
        </draw:frame>
        <presentation:notes draw:style-name="dp2">
          <draw:page-thumbnail draw:name="Google Shape;221;g2af853010e1_0_536:notes" draw:style-name="gr4" draw:layer="layout" svg:width="13.112cm" svg:height="9.524cm" svg:x="2.969cm" svg:y="1.905cm" draw:page-number="28" presentation:class="page"/>
          <draw:frame draw:name="Google Shape;222;g2af853010e1_0_536:notes" presentation:style-name="pr38" draw:text-style-name="P2" draw:layer="layout" svg:width="15.239cm" svg:height="11.429cm" svg:x="1.905cm" svg:y="12.065cm" presentation:class="notes" presentation:placeholder="true" presentation:user-transformed="true">
            <draw:text-box/>
          </draw:frame>
        </presentation:notes>
      </draw:page>
      <draw:page draw:name="Observability details" draw:style-name="dp4" draw:master-page-name="CUSTOM_5f_2">
        <draw:frame draw:name="Google Shape;230;p38" presentation:style-name="pr35" draw:text-style-name="P4" draw:layer="layout" svg:width="8.548cm" svg:height="0.813cm" svg:x="0.427cm" svg:y="1.31cm" presentation:class="title" presentation:user-transformed="true">
          <draw:text-box>
            <text:p text:style-name="P3"><text:span text:style-name="T6">Observability details</text:span></text:p>
          </draw:text-box>
        </draw:frame>
        <draw:frame draw:name="Google Shape;231;p38" presentation:style-name="pr36" draw:text-style-name="P7" draw:layer="layout" svg:width="8.548cm" svg:height="4.346cm" svg:x="0.427cm" svg:y="2.173cm" presentation:class="subtitle" presentation:user-transformed="true">
          <draw:text-box>
            <text:p text:style-name="P3"><text:span text:style-name="T8">Platforms create a shared responsibility between the users and the platform providers. Users must track their resources and make sure they have requested the right configuration (e.g. size or security level).</text:span></text:p>
            <text:p text:style-name="P9"><text:span text:style-name="T8">To manage these requirements, the platform may provide necessary observability data and tooling access.</text:span></text:p>
          </draw:text-box>
        </draw:frame>
        <presentation:notes draw:style-name="dp2">
          <draw:page-thumbnail draw:name="Google Shape;227;g2af853010e1_0_551:notes" draw:style-name="gr4" draw:layer="layout" svg:width="13.112cm" svg:height="9.524cm" svg:x="2.969cm" svg:y="1.905cm" draw:page-number="29" presentation:class="page"/>
          <draw:frame draw:name="Google Shape;228;g2af853010e1_0_551:notes" presentation:style-name="pr39" draw:text-style-name="P2" draw:layer="layout" svg:width="15.239cm" svg:height="11.429cm" svg:x="1.905cm" svg:y="12.065cm" presentation:class="notes" presentation:placeholder="true" presentation:user-transformed="true">
            <draw:text-box/>
          </draw:frame>
        </presentation:notes>
      </draw:page>
      <draw:page draw:name="Access information" draw:style-name="dp4" draw:master-page-name="CUSTOM_5f_2">
        <draw:frame draw:name="Google Shape;236;p39" presentation:style-name="pr35" draw:text-style-name="P4" draw:layer="layout" svg:width="8.548cm" svg:height="0.813cm" svg:x="0.427cm" svg:y="1.31cm" presentation:class="title" presentation:user-transformed="true">
          <draw:text-box>
            <text:p text:style-name="P3"><text:span text:style-name="T6">Access information</text:span></text:p>
          </draw:text-box>
        </draw:frame>
        <draw:frame draw:name="Google Shape;237;p39" presentation:style-name="pr36" draw:text-style-name="P7" draw:layer="layout" svg:width="8.548cm" svg:height="4.346cm" svg:x="0.427cm" svg:y="2.173cm" presentation:class="subtitle" presentation:user-transformed="true">
          <draw:text-box>
            <text:p text:style-name="P3"><text:span text:style-name="T8">Resources are often physically depended on by a user or other system and outputs can provide the details for downstream dependencies.</text:span></text:p>
            <text:p text:style-name="P9"><text:span text:style-name="T8">Users may need to know a URL or endpoint to run manual tests. Or another resource may need to know an IP address or other identifying information to connect and create a higher level system before it is useful to the user.</text:span></text:p>
          </draw:text-box>
        </draw:frame>
        <presentation:notes draw:style-name="dp2">
          <draw:page-thumbnail draw:name="Google Shape;233;g2af853010e1_0_556:notes" draw:style-name="gr4" draw:layer="layout" svg:width="13.112cm" svg:height="9.524cm" svg:x="2.969cm" svg:y="1.905cm" draw:page-number="30" presentation:class="page"/>
          <draw:frame draw:name="Google Shape;234;g2af853010e1_0_556:notes" presentation:style-name="pr40" draw:text-style-name="P2" draw:layer="layout" svg:width="15.239cm" svg:height="11.429cm" svg:x="1.905cm" svg:y="12.065cm" presentation:class="notes" presentation:placeholder="true" presentation:user-transformed="true">
            <draw:text-box/>
          </draw:frame>
        </presentation:notes>
      </draw:page>
      <draw:page draw:name="Health and status" draw:style-name="dp4" draw:master-page-name="CUSTOM_5f_2">
        <draw:frame draw:name="Google Shape;242;p40" presentation:style-name="pr35" draw:text-style-name="P4" draw:layer="layout" svg:width="8.548cm" svg:height="0.813cm" svg:x="0.427cm" svg:y="1.31cm" presentation:class="title" presentation:user-transformed="true">
          <draw:text-box>
            <text:p text:style-name="P3"><text:span text:style-name="T6">Health and status</text:span></text:p>
          </draw:text-box>
        </draw:frame>
        <draw:frame draw:name="Google Shape;243;p40" presentation:style-name="pr36" draw:text-style-name="P7" draw:layer="layout" svg:width="8.548cm" svg:height="4.346cm" svg:x="0.427cm" svg:y="2.173cm" presentation:class="subtitle" presentation:user-transformed="true">
          <draw:text-box>
            <text:p text:style-name="P3"><text:span text:style-name="T8">"Are we there yet?" isn't just a question for long drives. One of the most common questions of a platform is if a resource is available to be used for the first time and over its lifespan.</text:span></text:p>
            <text:p text:style-name="P9"><text:span text:style-name="T9">Health updates can alert users to over or under-provisioning, security alerts, and other available operational improvements including debugging support when an issue occurs.</text:span></text:p>
          </draw:text-box>
        </draw:frame>
        <presentation:notes draw:style-name="dp2">
          <draw:page-thumbnail draw:name="Google Shape;239;g2af853010e1_0_561:notes" draw:style-name="gr4" draw:layer="layout" svg:width="13.112cm" svg:height="9.524cm" svg:x="2.969cm" svg:y="1.905cm" draw:page-number="31" presentation:class="page"/>
          <draw:frame draw:name="Google Shape;240;g2af853010e1_0_561:notes" presentation:style-name="pr41" draw:text-style-name="P2" draw:layer="layout" svg:width="15.239cm" svg:height="11.429cm" svg:x="1.905cm" svg:y="12.065cm" presentation:class="notes" presentation:placeholder="true" presentation:user-transformed="true">
            <draw:text-box/>
          </draw:frame>
        </presentation:notes>
      </draw:page>
      <draw:page draw:name="Deprecations" draw:style-name="dp4" draw:master-page-name="CUSTOM_5f_2">
        <draw:frame draw:name="Google Shape;248;p41" presentation:style-name="pr35" draw:text-style-name="P4" draw:layer="layout" svg:width="8.548cm" svg:height="0.813cm" svg:x="0.427cm" svg:y="1.31cm" presentation:class="title" presentation:user-transformed="true">
          <draw:text-box>
            <text:p text:style-name="P3"><text:span text:style-name="T6">Deprecations</text:span></text:p>
          </draw:text-box>
        </draw:frame>
        <draw:frame draw:name="Google Shape;249;p41" presentation:style-name="pr36" draw:text-style-name="P7" draw:layer="layout" svg:width="8.548cm" svg:height="4.346cm" svg:x="0.427cm" svg:y="2.173cm" presentation:class="subtitle" presentation:user-transformed="true">
          <draw:text-box>
            <text:p text:style-name="P3"><text:span text:style-name="T9">Services need support over time. Sometimes updates require user action, other times they can be done completely by the platform but a user may want to be informed.</text:span></text:p>
            <text:p text:style-name="P9"><text:span text:style-name="T9">Outputs can alert users to known deprecated versions and be clear about when and how an upgrade will occur.</text:span></text:p>
          </draw:text-box>
        </draw:frame>
        <presentation:notes draw:style-name="dp2">
          <draw:page-thumbnail draw:name="Google Shape;245;g2af853010e1_0_195:notes" draw:style-name="gr4" draw:layer="layout" svg:width="13.112cm" svg:height="9.524cm" svg:x="2.969cm" svg:y="1.905cm" draw:page-number="32" presentation:class="page"/>
          <draw:frame draw:name="Google Shape;246;g2af853010e1_0_195:notes" presentation:style-name="pr42" draw:text-style-name="P2" draw:layer="layout" svg:width="15.239cm" svg:height="11.429cm" svg:x="1.905cm" svg:y="12.065cm" presentation:class="notes" presentation:placeholder="true" presentation:user-transformed="true">
            <draw:text-box/>
          </draw:frame>
        </presentation:notes>
      </draw:page>
      <draw:page draw:name="Process rules explained" draw:style-name="dp8" draw:master-page-name="CUSTOM_5f_3_5f_1">
        <draw:frame draw:name="Google Shape;254;p42" presentation:style-name="pr43" draw:text-style-name="P4" draw:layer="layout" svg:width="8.548cm" svg:height="0.813cm" svg:x="0.427cm" svg:y="1.31cm" presentation:class="title" presentation:user-transformed="true">
          <draw:text-box>
            <text:p text:style-name="P3"><text:span text:style-name="T1">Process rules explained</text:span></text:p>
          </draw:text-box>
        </draw:frame>
        <draw:frame draw:name="Google Shape;255;p42" presentation:style-name="pr44" draw:text-style-name="P7" draw:layer="layout" svg:width="8.548cm" svg:height="4.346cm" svg:x="0.427cm" svg:y="2.173cm" presentation:class="subtitle" presentation:user-transformed="true">
          <draw:text-box>
            <text:p text:style-name="P3"><text:span text:style-name="T4">Process rules are business tasks executed alongside resource provisioning.</text:span></text:p>
            <text:p text:style-name="P8"><text:span text:style-name="T5">Processes rules can be thought of as part of a todo list if someone had to respond manually to a request via a request ticket or could be codified in a delivery pipeline.</text:span></text:p>
            <text:p text:style-name="P9"><text:span text:style-name="T5">These can be used in either the dependency setup or per resource configuration (or both!).</text:span></text:p>
          </draw:text-box>
        </draw:frame>
        <draw:custom-shape draw:name="Google Shape;256;p42"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251;g2af853010e1_0_142:notes" draw:style-name="gr4" draw:layer="layout" svg:width="13.112cm" svg:height="9.524cm" svg:x="2.969cm" svg:y="1.905cm" draw:page-number="33" presentation:class="page"/>
          <draw:frame draw:name="Google Shape;252;g2af853010e1_0_142:notes" presentation:style-name="pr45" draw:text-style-name="P2" draw:layer="layout" svg:width="15.239cm" svg:height="11.429cm" svg:x="1.905cm" svg:y="12.065cm" presentation:class="notes" presentation:placeholder="true" presentation:user-transformed="true">
            <draw:text-box/>
          </draw:frame>
        </presentation:notes>
      </draw:page>
      <draw:page draw:name="Security scan" draw:style-name="dp4" draw:master-page-name="CUSTOM_5f_3_5f_1">
        <draw:frame draw:name="Google Shape;261;p43" presentation:style-name="pr43" draw:text-style-name="P4" draw:layer="layout" svg:width="8.548cm" svg:height="0.813cm" svg:x="0.427cm" svg:y="1.31cm" presentation:class="title" presentation:user-transformed="true">
          <draw:text-box>
            <text:p text:style-name="P3"><text:span text:style-name="T6">Security scan</text:span></text:p>
          </draw:text-box>
        </draw:frame>
        <draw:frame draw:name="Google Shape;262;p43" presentation:style-name="pr44" draw:text-style-name="P7" draw:layer="layout" svg:width="8.548cm" svg:height="4.346cm" svg:x="0.427cm" svg:y="2.173cm" presentation:class="subtitle" presentation:user-transformed="true">
          <draw:text-box>
            <text:p text:style-name="P3"><text:span text:style-name="T8">Resources often need static scanning before deployment and regular dynamic scanning during use.</text:span></text:p>
            <text:p text:style-name="P8"><text:span text:style-name="T8">This scan can be used for either, or both, of these scans as it can be run on lifecycle events as well as on a regular schedule.</text:span></text:p>
            <text:p text:style-name="P9"><text:span text:style-name="T8">The platform can also execute different actions based on the results of a scan.</text:span></text:p>
          </draw:text-box>
        </draw:frame>
        <presentation:notes draw:style-name="dp2">
          <draw:page-thumbnail draw:name="Google Shape;258;g2af853010e1_0_566:notes" draw:style-name="gr4" draw:layer="layout" svg:width="13.112cm" svg:height="9.524cm" svg:x="2.969cm" svg:y="1.905cm" draw:page-number="34" presentation:class="page"/>
          <draw:frame draw:name="Google Shape;259;g2af853010e1_0_566:notes" presentation:style-name="pr46" draw:text-style-name="P2" draw:layer="layout" svg:width="15.239cm" svg:height="11.429cm" svg:x="1.905cm" svg:y="12.065cm" presentation:class="notes" presentation:placeholder="true" presentation:user-transformed="true">
            <draw:text-box/>
          </draw:frame>
        </presentation:notes>
      </draw:page>
      <draw:page draw:name="Status check" draw:style-name="dp4" draw:master-page-name="CUSTOM_5f_3_5f_1">
        <draw:frame draw:name="Google Shape;267;p44" presentation:style-name="pr43" draw:text-style-name="P4" draw:layer="layout" svg:width="8.548cm" svg:height="0.813cm" svg:x="0.427cm" svg:y="1.31cm" presentation:class="title" presentation:user-transformed="true">
          <draw:text-box>
            <text:p text:style-name="P3"><text:span text:style-name="T6">Status check</text:span></text:p>
          </draw:text-box>
        </draw:frame>
        <draw:frame draw:name="Google Shape;268;p44" presentation:style-name="pr44" draw:text-style-name="P7" draw:layer="layout" svg:width="8.548cm" svg:height="4.346cm" svg:x="0.427cm" svg:y="2.173cm" presentation:class="subtitle" presentation:user-transformed="true">
          <draw:text-box>
            <text:p text:style-name="P3"><text:span text:style-name="T8">Sometimes in the process of a resource creation, update, or delete the platform may need to know the status of either that resource or others.</text:span></text:p>
            <text:p text:style-name="P9"><text:span text:style-name="T8">For example, the platform may have a rule to not do deployments during an open priority zero incident, or to only run one upgrade at a time.</text:span></text:p>
          </draw:text-box>
        </draw:frame>
        <presentation:notes draw:style-name="dp2">
          <draw:page-thumbnail draw:name="Google Shape;264;g2af853010e1_0_571:notes" draw:style-name="gr4" draw:layer="layout" svg:width="13.112cm" svg:height="9.524cm" svg:x="2.969cm" svg:y="1.905cm" draw:page-number="35" presentation:class="page"/>
          <draw:frame draw:name="Google Shape;265;g2af853010e1_0_571:notes" presentation:style-name="pr47" draw:text-style-name="P2" draw:layer="layout" svg:width="15.239cm" svg:height="11.429cm" svg:x="1.905cm" svg:y="12.065cm" presentation:class="notes" presentation:placeholder="true" presentation:user-transformed="true">
            <draw:text-box/>
          </draw:frame>
        </presentation:notes>
      </draw:page>
      <draw:page draw:name="Fetch available options" draw:style-name="dp4" draw:master-page-name="CUSTOM_5f_3_5f_1">
        <draw:frame draw:name="Google Shape;273;p45" presentation:style-name="pr43" draw:text-style-name="P4" draw:layer="layout" svg:width="8.548cm" svg:height="0.813cm" svg:x="0.427cm" svg:y="1.31cm" presentation:class="title" presentation:user-transformed="true">
          <draw:text-box>
            <text:p text:style-name="P3"><text:span text:style-name="T6">Fetch available options</text:span></text:p>
          </draw:text-box>
        </draw:frame>
        <draw:frame draw:name="Google Shape;274;p45" presentation:style-name="pr44" draw:text-style-name="P7" draw:layer="layout" svg:width="8.548cm" svg:height="4.346cm" svg:x="0.427cm" svg:y="2.173cm" presentation:class="subtitle" presentation:user-transformed="true">
          <draw:text-box>
            <text:p text:style-name="P3"><text:span text:style-name="T8">Options may be dynamic and need to be validated on provisioning.</text:span></text:p>
            <text:p text:style-name="P9"><text:span text:style-name="T8">For example, a platform load balances ephemeral test environments and the platform can fetch current test environment state to determine where the new application should be deployed. Or a platform may need to use an external LDAP service to manage authorisation.</text:span></text:p>
          </draw:text-box>
        </draw:frame>
        <presentation:notes draw:style-name="dp2">
          <draw:page-thumbnail draw:name="Google Shape;270;g2af853010e1_0_576:notes" draw:style-name="gr4" draw:layer="layout" svg:width="13.112cm" svg:height="9.524cm" svg:x="2.969cm" svg:y="1.905cm" draw:page-number="36" presentation:class="page"/>
          <draw:frame draw:name="Google Shape;271;g2af853010e1_0_576:notes" presentation:style-name="pr48" draw:text-style-name="P2" draw:layer="layout" svg:width="15.239cm" svg:height="11.429cm" svg:x="1.905cm" svg:y="12.065cm" presentation:class="notes" presentation:placeholder="true" presentation:user-transformed="true">
            <draw:text-box/>
          </draw:frame>
        </presentation:notes>
      </draw:page>
      <draw:page draw:name="Notification" draw:style-name="dp4" draw:master-page-name="CUSTOM_5f_3_5f_1">
        <draw:frame draw:name="Google Shape;279;p46" presentation:style-name="pr43" draw:text-style-name="P4" draw:layer="layout" svg:width="8.548cm" svg:height="0.813cm" svg:x="0.427cm" svg:y="1.31cm" presentation:class="title" presentation:user-transformed="true">
          <draw:text-box>
            <text:p text:style-name="P3"><text:span text:style-name="T6">Notification</text:span></text:p>
          </draw:text-box>
        </draw:frame>
        <draw:frame draw:name="Google Shape;280;p46" presentation:style-name="pr44" draw:text-style-name="P7" draw:layer="layout" svg:width="8.548cm" svg:height="4.346cm" svg:x="0.427cm" svg:y="2.173cm" presentation:class="subtitle" presentation:user-transformed="true">
          <draw:text-box>
            <text:p text:style-name="P3"><text:span text:style-name="T8">Chatbot, SMS, email or other notifications can be sent to both the user who requested a resource as well as other interested parties. </text:span></text:p>
            <text:p text:style-name="P9"><text:span text:style-name="T8">Notifications can be used to inform and alert users. If the resource requires auditing, look to use the </text:span><text:span text:style-name="T10">reporting</text:span><text:span text:style-name="T8"> process action.</text:span></text:p>
          </draw:text-box>
        </draw:frame>
        <presentation:notes draw:style-name="dp2">
          <draw:page-thumbnail draw:name="Google Shape;276;g2af853010e1_0_581:notes" draw:style-name="gr4" draw:layer="layout" svg:width="13.112cm" svg:height="9.524cm" svg:x="2.969cm" svg:y="1.905cm" draw:page-number="37" presentation:class="page"/>
          <draw:frame draw:name="Google Shape;277;g2af853010e1_0_581:notes" presentation:style-name="pr49" draw:text-style-name="P2" draw:layer="layout" svg:width="15.239cm" svg:height="11.429cm" svg:x="1.905cm" svg:y="12.065cm" presentation:class="notes" presentation:placeholder="true" presentation:user-transformed="true">
            <draw:text-box/>
          </draw:frame>
        </presentation:notes>
      </draw:page>
      <draw:page draw:name="Budget check" draw:style-name="dp4" draw:master-page-name="CUSTOM_5f_3_5f_1">
        <draw:frame draw:name="Google Shape;285;p47" presentation:style-name="pr43" draw:text-style-name="P4" draw:layer="layout" svg:width="8.548cm" svg:height="0.813cm" svg:x="0.427cm" svg:y="1.31cm" presentation:class="title" presentation:user-transformed="true">
          <draw:text-box>
            <text:p text:style-name="P3"><text:span text:style-name="T6">Budget check</text:span></text:p>
          </draw:text-box>
        </draw:frame>
        <draw:frame draw:name="Google Shape;286;p47" presentation:style-name="pr44" draw:text-style-name="P7" draw:layer="layout" svg:width="8.548cm" svg:height="4.346cm" svg:x="0.427cm" svg:y="2.173cm" presentation:class="subtitle" presentation:user-transformed="true">
          <draw:text-box>
            <text:p text:style-name="P10"><text:span text:style-name="T8">Organisations may exercise FinOps where they track user, team, or organisational costs over time. The platform can check for compliance with FinOps requirements and choose to either allow, disallow, or alert for approval on resources based on their compliance.</text:span></text:p>
          </draw:text-box>
        </draw:frame>
        <presentation:notes draw:style-name="dp2">
          <draw:page-thumbnail draw:name="Google Shape;282;g2af853010e1_0_586:notes" draw:style-name="gr4" draw:layer="layout" svg:width="13.112cm" svg:height="9.524cm" svg:x="2.969cm" svg:y="1.905cm" draw:page-number="38" presentation:class="page"/>
          <draw:frame draw:name="Google Shape;283;g2af853010e1_0_586:notes" presentation:style-name="pr50" draw:text-style-name="P2" draw:layer="layout" svg:width="15.239cm" svg:height="11.429cm" svg:x="1.905cm" svg:y="12.065cm" presentation:class="notes" presentation:placeholder="true" presentation:user-transformed="true">
            <draw:text-box/>
          </draw:frame>
        </presentation:notes>
      </draw:page>
      <draw:page draw:name="Status update" draw:style-name="dp4" draw:master-page-name="CUSTOM_5f_3_5f_1">
        <draw:frame draw:name="Google Shape;291;p48" presentation:style-name="pr43" draw:text-style-name="P4" draw:layer="layout" svg:width="8.548cm" svg:height="0.813cm" svg:x="0.427cm" svg:y="1.31cm" presentation:class="title" presentation:user-transformed="true">
          <draw:text-box>
            <text:p text:style-name="P3"><text:span text:style-name="T6">Status update</text:span></text:p>
          </draw:text-box>
        </draw:frame>
        <draw:frame draw:name="Google Shape;292;p48" presentation:style-name="pr44" draw:text-style-name="P7" draw:layer="layout" svg:width="8.548cm" svg:height="4.346cm" svg:x="0.427cm" svg:y="2.173cm" presentation:class="subtitle" presentation:user-transformed="true">
          <draw:text-box>
            <text:p text:style-name="P3"><text:span text:style-name="T8">It is common to update status at the end of provisioning, but sometimes the platform may want to also update status throughout the process to indicate progress.</text:span></text:p>
            <text:p text:style-name="P9"><text:span text:style-name="T8">Status can be informational or indicate required action.</text:span></text:p>
          </draw:text-box>
        </draw:frame>
        <presentation:notes draw:style-name="dp2">
          <draw:page-thumbnail draw:name="Google Shape;288;g2af853010e1_0_591:notes" draw:style-name="gr4" draw:layer="layout" svg:width="13.112cm" svg:height="9.524cm" svg:x="2.969cm" svg:y="1.905cm" draw:page-number="39" presentation:class="page"/>
          <draw:frame draw:name="Google Shape;289;g2af853010e1_0_591:notes" presentation:style-name="pr51" draw:text-style-name="P2" draw:layer="layout" svg:width="15.239cm" svg:height="11.429cm" svg:x="1.905cm" svg:y="12.065cm" presentation:class="notes" presentation:placeholder="true" presentation:user-transformed="true">
            <draw:text-box/>
          </draw:frame>
        </presentation:notes>
      </draw:page>
      <draw:page draw:name="Manual approval" draw:style-name="dp4" draw:master-page-name="CUSTOM_5f_3_5f_1">
        <draw:frame draw:name="Google Shape;297;p49" presentation:style-name="pr43" draw:text-style-name="P4" draw:layer="layout" svg:width="8.548cm" svg:height="0.813cm" svg:x="0.427cm" svg:y="1.31cm" presentation:class="title" presentation:user-transformed="true">
          <draw:text-box>
            <text:p text:style-name="P3"><text:span text:style-name="T6">Manual approval</text:span></text:p>
          </draw:text-box>
        </draw:frame>
        <draw:frame draw:name="Google Shape;298;p49" presentation:style-name="pr44" draw:text-style-name="P7" draw:layer="layout" svg:width="8.548cm" svg:height="4.346cm" svg:x="0.427cm" svg:y="2.173cm" presentation:class="subtitle" presentation:user-transformed="true">
          <draw:text-box>
            <text:p text:style-name="P3"><text:span text:style-name="T8">While we may all aspire to complete automation, there are many compliance and historic reasons why manual approval is, and should, still be applied.</text:span></text:p>
            <text:p text:style-name="P9"><text:span text:style-name="T8">This process can pause and wait until an authorised person approves the request.</text:span></text:p>
          </draw:text-box>
        </draw:frame>
        <presentation:notes draw:style-name="dp2">
          <draw:page-thumbnail draw:name="Google Shape;294;g2af853010e1_0_596:notes" draw:style-name="gr4" draw:layer="layout" svg:width="13.112cm" svg:height="9.524cm" svg:x="2.969cm" svg:y="1.905cm" draw:page-number="40" presentation:class="page"/>
          <draw:frame draw:name="Google Shape;295;g2af853010e1_0_596:notes" presentation:style-name="pr52" draw:text-style-name="P2" draw:layer="layout" svg:width="15.239cm" svg:height="11.429cm" svg:x="1.905cm" svg:y="12.065cm" presentation:class="notes" presentation:placeholder="true" presentation:user-transformed="true">
            <draw:text-box/>
          </draw:frame>
        </presentation:notes>
      </draw:page>
      <draw:page draw:name="Resource tagging" draw:style-name="dp4" draw:master-page-name="CUSTOM_5f_3_5f_1">
        <draw:frame draw:name="Google Shape;303;p50" presentation:style-name="pr43" draw:text-style-name="P4" draw:layer="layout" svg:width="8.548cm" svg:height="0.813cm" svg:x="0.427cm" svg:y="1.31cm" presentation:class="title" presentation:user-transformed="true">
          <draw:text-box>
            <text:p text:style-name="P3"><text:span text:style-name="T6">Resource tagging</text:span></text:p>
          </draw:text-box>
        </draw:frame>
        <draw:frame draw:name="Google Shape;304;p50" presentation:style-name="pr44" draw:text-style-name="P7" draw:layer="layout" svg:width="8.548cm" svg:height="4.346cm" svg:x="0.427cm" svg:y="2.173cm" presentation:class="subtitle" presentation:user-transformed="true">
          <draw:text-box>
            <text:p text:style-name="P3"><text:span text:style-name="T8">Tags or labels on resources help to identify their ownership and more.</text:span></text:p>
            <text:p text:style-name="P9"><text:span text:style-name="T8">These labels not only help operations in supporting the resources, but also finance, security, and other departments when running audits on the organisation wide resources.</text:span></text:p>
          </draw:text-box>
        </draw:frame>
        <presentation:notes draw:style-name="dp2">
          <draw:page-thumbnail draw:name="Google Shape;300;g2af853010e1_0_601:notes" draw:style-name="gr4" draw:layer="layout" svg:width="13.112cm" svg:height="9.524cm" svg:x="2.969cm" svg:y="1.905cm" draw:page-number="41" presentation:class="page"/>
          <draw:frame draw:name="Google Shape;301;g2af853010e1_0_601:notes" presentation:style-name="pr53" draw:text-style-name="P2" draw:layer="layout" svg:width="15.239cm" svg:height="11.429cm" svg:x="1.905cm" svg:y="12.065cm" presentation:class="notes" presentation:placeholder="true" presentation:user-transformed="true">
            <draw:text-box/>
          </draw:frame>
        </presentation:notes>
      </draw:page>
      <draw:page draw:name="Scheduling rules" draw:style-name="dp4" draw:master-page-name="CUSTOM_5f_3_5f_1">
        <draw:frame draw:name="Google Shape;309;p51" presentation:style-name="pr43" draw:text-style-name="P4" draw:layer="layout" svg:width="8.548cm" svg:height="0.813cm" svg:x="0.427cm" svg:y="1.31cm" presentation:class="title" presentation:user-transformed="true">
          <draw:text-box>
            <text:p text:style-name="P3"><text:span text:style-name="T6">Scheduling rules</text:span></text:p>
          </draw:text-box>
        </draw:frame>
        <draw:frame draw:name="Google Shape;310;p51" presentation:style-name="pr44" draw:text-style-name="P7" draw:layer="layout" svg:width="8.548cm" svg:height="4.346cm" svg:x="0.427cm" svg:y="2.173cm" presentation:class="subtitle" presentation:user-transformed="true">
          <draw:text-box>
            <text:p text:style-name="P3"><text:span text:style-name="T8">When using declarative provisioning, the resources need to be scheduled to the right Destinations.</text:span></text:p>
            <text:p text:style-name="P9"><text:span text:style-name="T8">By default, a resource will be scheduled to one of the available Destinations, but in some cases the platform will apply more specific rules to control the specific Destination it is scheduled to.</text:span></text:p>
          </draw:text-box>
        </draw:frame>
        <presentation:notes draw:style-name="dp2">
          <draw:page-thumbnail draw:name="Google Shape;306;g2af853010e1_0_606:notes" draw:style-name="gr4" draw:layer="layout" svg:width="13.112cm" svg:height="9.524cm" svg:x="2.969cm" svg:y="1.905cm" draw:page-number="42" presentation:class="page"/>
          <draw:frame draw:name="Google Shape;307;g2af853010e1_0_606:notes" presentation:style-name="pr54" draw:text-style-name="P2" draw:layer="layout" svg:width="15.239cm" svg:height="11.429cm" svg:x="1.905cm" svg:y="12.065cm" presentation:class="notes" presentation:placeholder="true" presentation:user-transformed="true">
            <draw:text-box/>
          </draw:frame>
        </presentation:notes>
      </draw:page>
      <draw:page draw:name="Deprecation management" draw:style-name="dp4" draw:master-page-name="CUSTOM_5f_3_5f_1">
        <draw:frame draw:name="Google Shape;315;p52" presentation:style-name="pr43" draw:text-style-name="P4" draw:layer="layout" svg:width="8.548cm" svg:height="0.813cm" svg:x="0.427cm" svg:y="1.31cm" presentation:class="title" presentation:user-transformed="true">
          <draw:text-box>
            <text:p text:style-name="P3"><text:span text:style-name="T6">Deprecation management</text:span></text:p>
          </draw:text-box>
        </draw:frame>
        <draw:frame draw:name="Google Shape;316;p52" presentation:style-name="pr44" draw:text-style-name="P7" draw:layer="layout" svg:width="8.548cm" svg:height="4.346cm" svg:x="0.427cm" svg:y="2.173cm" presentation:class="subtitle" presentation:user-transformed="true">
          <draw:text-box>
            <text:p text:style-name="P3"><text:span text:style-name="T9">Platforms need to manage the identification of out of date dependencies and then follow a process to determine urgency, notify affected parties, and manage a safe upgrade.</text:span></text:p>
            <text:p text:style-name="P9"><text:span text:style-name="T9">The platform will need to adhere to compliance requirements for all new and existing resources on the platform.</text:span></text:p>
          </draw:text-box>
        </draw:frame>
        <presentation:notes draw:style-name="dp2">
          <draw:page-thumbnail draw:name="Google Shape;312;g2af853010e1_0_200:notes" draw:style-name="gr4" draw:layer="layout" svg:width="13.112cm" svg:height="9.524cm" svg:x="2.969cm" svg:y="1.905cm" draw:page-number="43" presentation:class="page"/>
          <draw:frame draw:name="Google Shape;313;g2af853010e1_0_200:notes" presentation:style-name="pr55" draw:text-style-name="P2" draw:layer="layout" svg:width="15.239cm" svg:height="11.429cm" svg:x="1.905cm" svg:y="12.065cm" presentation:class="notes" presentation:placeholder="true" presentation:user-transformed="true">
            <draw:text-box/>
          </draw:frame>
        </presentation:notes>
      </draw:page>
      <draw:page draw:name="Reporting" draw:style-name="dp4" draw:master-page-name="CUSTOM_5f_3_5f_1">
        <draw:frame draw:name="Google Shape;321;p53" presentation:style-name="pr43" draw:text-style-name="P4" draw:layer="layout" svg:width="8.548cm" svg:height="0.813cm" svg:x="0.427cm" svg:y="1.31cm" presentation:class="title" presentation:user-transformed="true">
          <draw:text-box>
            <text:p text:style-name="P3"><text:span text:style-name="T6">Reporting</text:span></text:p>
          </draw:text-box>
        </draw:frame>
        <draw:frame draw:name="Google Shape;322;p53" presentation:style-name="pr44" draw:text-style-name="P7" draw:layer="layout" svg:width="8.548cm" svg:height="4.346cm" svg:x="0.427cm" svg:y="2.173cm" presentation:class="subtitle" presentation:user-transformed="true">
          <draw:text-box>
            <text:p text:style-name="P3"><text:span text:style-name="T8">If you need to track user requests due to compliance regulations or other requirements, you can choose to send audit events on requests and changes within the platform. In addition, the platform can self-report on a regular basis about the state of its resources.</text:span></text:p>
            <text:p text:style-name="P9"><text:span text:style-name="T8">If you are just looking for user awareness, check </text:span><text:span text:style-name="T10">notifications</text:span><text:span text:style-name="T8"> for another option.</text:span></text:p>
          </draw:text-box>
        </draw:frame>
        <presentation:notes draw:style-name="dp2">
          <draw:page-thumbnail draw:name="Google Shape;318;g2af853010e1_0_762:notes" draw:style-name="gr4" draw:layer="layout" svg:width="13.112cm" svg:height="9.524cm" svg:x="2.969cm" svg:y="1.905cm" draw:page-number="44" presentation:class="page"/>
          <draw:frame draw:name="Google Shape;319;g2af853010e1_0_762:notes" presentation:style-name="pr56" draw:text-style-name="P2" draw:layer="layout" svg:width="15.239cm" svg:height="11.429cm" svg:x="1.905cm" svg:y="12.065cm" presentation:class="notes" presentation:placeholder="true" presentation:user-transformed="true">
            <draw:text-box/>
          </draw:frame>
        </presentation:notes>
      </draw:page>
      <draw:page draw:name="Provisioning actions explained" draw:style-name="dp9" draw:master-page-name="CUSTOM_5f_3_5f_2">
        <draw:frame draw:name="Google Shape;327;p54" presentation:style-name="pr57" draw:text-style-name="P4" draw:layer="layout" svg:width="8.548cm" svg:height="0.813cm" svg:x="0.427cm" svg:y="1.31cm" presentation:class="title" presentation:user-transformed="true">
          <draw:text-box>
            <text:p text:style-name="P3"><text:span text:style-name="T1">Provisioning actions explained</text:span></text:p>
          </draw:text-box>
        </draw:frame>
        <draw:frame draw:name="Google Shape;328;p54" presentation:style-name="pr58" draw:text-style-name="P7" draw:layer="layout" svg:width="8.548cm" svg:height="4.346cm" svg:x="0.427cm" svg:y="2.173cm" presentation:class="subtitle" presentation:user-transformed="true">
          <draw:text-box>
            <text:p text:style-name="P3"><text:span text:style-name="T4">Provisioning actions produce a tangible, useable platform service.</text:span></text:p>
            <text:p text:style-name="P8"><text:span text:style-name="T5">Provisioning can be imperative or declarative. Imperative executes step-by-step instructions. Declarative defines desired state. Destinations are required for declarative provisioning.</text:span></text:p>
            <text:p text:style-name="P9"><text:span text:style-name="T5">These can be used in either the dependency setup or per resource configuration (or both!).</text:span></text:p>
          </draw:text-box>
        </draw:frame>
        <draw:custom-shape draw:name="Google Shape;329;p54" draw:style-name="gr5"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324;g2af853010e1_0_149:notes" draw:style-name="gr4" draw:layer="layout" svg:width="13.112cm" svg:height="9.524cm" svg:x="2.969cm" svg:y="1.905cm" draw:page-number="45" presentation:class="page"/>
          <draw:frame draw:name="Google Shape;325;g2af853010e1_0_149:notes" presentation:style-name="pr59" draw:text-style-name="P2" draw:layer="layout" svg:width="15.239cm" svg:height="11.429cm" svg:x="1.905cm" svg:y="12.065cm" presentation:class="notes" presentation:placeholder="true" presentation:user-transformed="true">
            <draw:text-box/>
          </draw:frame>
        </presentation:notes>
      </draw:page>
      <draw:page draw:name="Infrastructure" draw:style-name="dp4" draw:master-page-name="CUSTOM_5f_3_5f_2">
        <draw:frame draw:name="Google Shape;334;p55" presentation:style-name="pr57" draw:text-style-name="P4" draw:layer="layout" svg:width="8.548cm" svg:height="0.813cm" svg:x="0.427cm" svg:y="1.31cm" presentation:class="title" presentation:user-transformed="true">
          <draw:text-box>
            <text:p text:style-name="P3"><text:span text:style-name="T6">Infrastructure</text:span></text:p>
          </draw:text-box>
        </draw:frame>
        <draw:frame draw:name="Google Shape;335;p55" presentation:style-name="pr58" draw:text-style-name="P7" draw:layer="layout" svg:width="8.548cm" svg:height="4.346cm" svg:x="0.427cm" svg:y="2.173cm" presentation:class="subtitle" presentation:user-transformed="true">
          <draw:text-box>
            <text:p text:style-name="P3"><text:span text:style-name="T9">Infrastructure is the cloud or physical hardware that can run compute, data storage, networking, and other resources.</text:span></text:p>
            <text:p text:style-name="P9"><text:span text:style-name="T9">Infrastructure can provided as a complete unit (think a whole apple pie), or as a part of a shared unit (think a slice of pie). In either case, you are allocating the defined infrastructure. Examples could be servers, databases, or Kubernetes Clusters.</text:span></text:p>
          </draw:text-box>
        </draw:frame>
        <presentation:notes draw:style-name="dp2">
          <draw:page-thumbnail draw:name="Google Shape;331;g2af853010e1_0_616:notes" draw:style-name="gr4" draw:layer="layout" svg:width="13.112cm" svg:height="9.524cm" svg:x="2.969cm" svg:y="1.905cm" draw:page-number="46" presentation:class="page"/>
          <draw:frame draw:name="Google Shape;332;g2af853010e1_0_616:notes" presentation:style-name="pr60" draw:text-style-name="P2" draw:layer="layout" svg:width="15.239cm" svg:height="11.429cm" svg:x="1.905cm" svg:y="12.065cm" presentation:class="notes" presentation:placeholder="true" presentation:user-transformed="true">
            <draw:text-box/>
          </draw:frame>
        </presentation:notes>
      </draw:page>
      <draw:page draw:name="Software as a Service (SaaS)" draw:style-name="dp4" draw:master-page-name="CUSTOM_5f_3_5f_2">
        <draw:frame draw:name="Google Shape;340;p56" presentation:style-name="pr57" draw:text-style-name="P4" draw:layer="layout" svg:width="8.548cm" svg:height="0.813cm" svg:x="0.427cm" svg:y="1.31cm" presentation:class="title" presentation:user-transformed="true">
          <draw:text-box>
            <text:p text:style-name="P3"><text:span text:style-name="T6">Software as a Service (SaaS)</text:span></text:p>
          </draw:text-box>
        </draw:frame>
        <draw:frame draw:name="Google Shape;341;p56" presentation:style-name="pr58" draw:text-style-name="P7" draw:layer="layout" svg:width="8.548cm" svg:height="4.346cm" svg:x="0.427cm" svg:y="2.173cm" presentation:class="subtitle" presentation:user-transformed="true">
          <draw:text-box>
            <text:p text:style-name="P10"><text:span text:style-name="T8">Manage a SaaS product configuration. For example, adding user accounts, creating resources, or updating settings.</text:span></text:p>
          </draw:text-box>
        </draw:frame>
        <presentation:notes draw:style-name="dp2">
          <draw:page-thumbnail draw:name="Google Shape;337;g2af853010e1_0_621:notes" draw:style-name="gr4" draw:layer="layout" svg:width="13.112cm" svg:height="9.524cm" svg:x="2.969cm" svg:y="1.905cm" draw:page-number="47" presentation:class="page"/>
          <draw:frame draw:name="Google Shape;338;g2af853010e1_0_621:notes" presentation:style-name="pr61" draw:text-style-name="P2" draw:layer="layout" svg:width="15.239cm" svg:height="11.429cm" svg:x="1.905cm" svg:y="12.065cm" presentation:class="notes" presentation:placeholder="true" presentation:user-transformed="true">
            <draw:text-box/>
          </draw:frame>
        </presentation:notes>
      </draw:page>
      <draw:page draw:name="Kubernetes cluster" draw:style-name="dp4" draw:master-page-name="CUSTOM_5f_3_5f_2">
        <draw:frame draw:name="Google Shape;346;p57" presentation:style-name="pr57" draw:text-style-name="P4" draw:layer="layout" svg:width="8.548cm" svg:height="0.813cm" svg:x="0.427cm" svg:y="1.31cm" presentation:class="title" presentation:user-transformed="true">
          <draw:text-box>
            <text:p text:style-name="P3"><text:span text:style-name="T6">Kubernetes cluster</text:span></text:p>
          </draw:text-box>
        </draw:frame>
        <draw:frame draw:name="Google Shape;347;p57" presentation:style-name="pr58" draw:text-style-name="P7" draw:layer="layout" svg:width="8.548cm" svg:height="4.346cm" svg:x="0.427cm" svg:y="2.173cm" presentation:class="subtitle" presentation:user-transformed="true">
          <draw:text-box>
            <text:p text:style-name="P10"><text:span text:style-name="T9">Resources can be deployed to Kubernetes and may require creating the Kubernetes cluster to be used for additional provisioning.</text:span></text:p>
          </draw:text-box>
        </draw:frame>
        <presentation:notes draw:style-name="dp2">
          <draw:page-thumbnail draw:name="Google Shape;343;g2af853010e1_0_626:notes" draw:style-name="gr4" draw:layer="layout" svg:width="13.112cm" svg:height="9.524cm" svg:x="2.969cm" svg:y="1.905cm" draw:page-number="48" presentation:class="page"/>
          <draw:frame draw:name="Google Shape;344;g2af853010e1_0_626:notes" presentation:style-name="pr62" draw:text-style-name="P2" draw:layer="layout" svg:width="15.239cm" svg:height="11.429cm" svg:x="1.905cm" svg:y="12.065cm" presentation:class="notes" presentation:placeholder="true" presentation:user-transformed="true">
            <draw:text-box/>
          </draw:frame>
        </presentation:notes>
      </draw:page>
      <draw:page draw:name="Credentials" draw:style-name="dp4" draw:master-page-name="CUSTOM_5f_3_5f_2">
        <draw:frame draw:name="Google Shape;352;p58" presentation:style-name="pr57" draw:text-style-name="P4" draw:layer="layout" svg:width="8.548cm" svg:height="0.813cm" svg:x="0.427cm" svg:y="1.31cm" presentation:class="title" presentation:user-transformed="true">
          <draw:text-box>
            <text:p text:style-name="P3"><text:span text:style-name="T6">Credentials</text:span></text:p>
          </draw:text-box>
        </draw:frame>
        <draw:frame draw:name="Google Shape;353;p58" presentation:style-name="pr58" draw:text-style-name="P7" draw:layer="layout" svg:width="8.548cm" svg:height="4.346cm" svg:x="0.427cm" svg:y="2.173cm" presentation:class="subtitle" presentation:user-transformed="true">
          <draw:text-box>
            <text:p text:style-name="P3"><text:span text:style-name="T8">Create or access credentials to be used to create and then access the requested resource.</text:span></text:p>
            <text:p text:style-name="P9"><text:span text:style-name="T8">Credentials can be </text:span><text:span text:style-name="T9">used by one or more users for one or more use cases. Therefore, the credentials may need to be accessed from a number of locations or be referenced by a number of requests.</text:span></text:p>
          </draw:text-box>
        </draw:frame>
        <presentation:notes draw:style-name="dp2">
          <draw:page-thumbnail draw:name="Google Shape;349;g2af853010e1_0_631:notes" draw:style-name="gr4" draw:layer="layout" svg:width="13.112cm" svg:height="9.524cm" svg:x="2.969cm" svg:y="1.905cm" draw:page-number="49" presentation:class="page"/>
          <draw:frame draw:name="Google Shape;350;g2af853010e1_0_631:notes" presentation:style-name="pr63" draw:text-style-name="P2" draw:layer="layout" svg:width="15.239cm" svg:height="11.429cm" svg:x="1.905cm" svg:y="12.065cm" presentation:class="notes" presentation:placeholder="true" presentation:user-transformed="true">
            <draw:text-box/>
          </draw:frame>
        </presentation:notes>
      </draw:page>
      <draw:page draw:name="Cloud account" draw:style-name="dp4" draw:master-page-name="CUSTOM_5f_3_5f_2">
        <draw:frame draw:name="Google Shape;358;p59" presentation:style-name="pr57" draw:text-style-name="P4" draw:layer="layout" svg:width="8.548cm" svg:height="0.813cm" svg:x="0.427cm" svg:y="1.31cm" presentation:class="title" presentation:user-transformed="true">
          <draw:text-box>
            <text:p text:style-name="P3"><text:span text:style-name="T6">Cloud account</text:span></text:p>
          </draw:text-box>
        </draw:frame>
        <draw:frame draw:name="Google Shape;359;p59" presentation:style-name="pr58" draw:text-style-name="P7" draw:layer="layout" svg:width="8.548cm" svg:height="4.346cm" svg:x="0.427cm" svg:y="2.173cm" presentation:class="subtitle" presentation:user-transformed="true">
          <draw:text-box>
            <text:p text:style-name="P10"><text:span text:style-name="T9">Resources can be deployed to a cloud provider and may require creating the account to be used for additional provisioning.</text:span></text:p>
          </draw:text-box>
        </draw:frame>
        <presentation:notes draw:style-name="dp2">
          <draw:page-thumbnail draw:name="Google Shape;355;g2af853010e1_0_641:notes" draw:style-name="gr4" draw:layer="layout" svg:width="13.112cm" svg:height="9.524cm" svg:x="2.969cm" svg:y="1.905cm" draw:page-number="50" presentation:class="page"/>
          <draw:frame draw:name="Google Shape;356;g2af853010e1_0_641:notes" presentation:style-name="pr64" draw:text-style-name="P2" draw:layer="layout" svg:width="15.239cm" svg:height="11.429cm" svg:x="1.905cm" svg:y="12.065cm" presentation:class="notes" presentation:placeholder="true" presentation:user-transformed="true">
            <draw:text-box/>
          </draw:frame>
        </presentation:notes>
      </draw:page>
      <draw:page draw:name="Kubernetes namespace" draw:style-name="dp4" draw:master-page-name="CUSTOM_5f_3_5f_2">
        <draw:frame draw:name="Google Shape;364;p60" presentation:style-name="pr57" draw:text-style-name="P4" draw:layer="layout" svg:width="8.548cm" svg:height="0.813cm" svg:x="0.427cm" svg:y="1.31cm" presentation:class="title" presentation:user-transformed="true">
          <draw:text-box>
            <text:p text:style-name="P3"><text:span text:style-name="T6">Kubernetes namespace</text:span></text:p>
          </draw:text-box>
        </draw:frame>
        <draw:frame draw:name="Google Shape;365;p60" presentation:style-name="pr58" draw:text-style-name="P7" draw:layer="layout" svg:width="8.548cm" svg:height="4.346cm" svg:x="0.427cm" svg:y="2.173cm" presentation:class="subtitle" presentation:user-transformed="true">
          <draw:text-box>
            <text:p text:style-name="P10"><text:span text:style-name="T8">Resources can be deployed to Kubernetes and may require creating the Kubernetes namespace to</text:span><text:span text:style-name="T9"> be used for additional provisioning.</text:span></text:p>
          </draw:text-box>
        </draw:frame>
        <presentation:notes draw:style-name="dp2">
          <draw:page-thumbnail draw:name="Google Shape;361;g2af853010e1_0_646:notes" draw:style-name="gr4" draw:layer="layout" svg:width="13.112cm" svg:height="9.524cm" svg:x="2.969cm" svg:y="1.905cm" draw:page-number="51" presentation:class="page"/>
          <draw:frame draw:name="Google Shape;362;g2af853010e1_0_646:notes" presentation:style-name="pr65" draw:text-style-name="P2" draw:layer="layout" svg:width="15.239cm" svg:height="11.429cm" svg:x="1.905cm" svg:y="12.065cm" presentation:class="notes" presentation:placeholder="true" presentation:user-transformed="true">
            <draw:text-box/>
          </draw:frame>
        </presentation:notes>
      </draw:page>
      <draw:page draw:name="Configuration" draw:style-name="dp4" draw:master-page-name="CUSTOM_5f_3_5f_2">
        <draw:frame draw:name="Google Shape;370;p61" presentation:style-name="pr57" draw:text-style-name="P4" draw:layer="layout" svg:width="8.548cm" svg:height="0.813cm" svg:x="0.427cm" svg:y="1.31cm" presentation:class="title" presentation:user-transformed="true">
          <draw:text-box>
            <text:p text:style-name="P3"><text:span text:style-name="T6">Configuration</text:span></text:p>
          </draw:text-box>
        </draw:frame>
        <draw:frame draw:name="Google Shape;371;p61" presentation:style-name="pr58" draw:text-style-name="P7" draw:layer="layout" svg:width="8.548cm" svg:height="4.346cm" svg:x="0.427cm" svg:y="2.173cm" presentation:class="subtitle" presentation:user-transformed="true">
          <draw:text-box>
            <text:p text:style-name="P3"><text:span text:style-name="T9">Configuration refers to the unique settings for a resource.</text:span></text:p>
            <text:p text:style-name="P9"><text:span text:style-name="T9">A resource may have global configuration or per user specific configuration. Depending on the use case, configuration may need to be combined with other configuration for other requests.</text:span></text:p>
          </draw:text-box>
        </draw:frame>
        <presentation:notes draw:style-name="dp2">
          <draw:page-thumbnail draw:name="Google Shape;367;g2af853010e1_0_651:notes" draw:style-name="gr4" draw:layer="layout" svg:width="13.112cm" svg:height="9.524cm" svg:x="2.969cm" svg:y="1.905cm" draw:page-number="52" presentation:class="page"/>
          <draw:frame draw:name="Google Shape;368;g2af853010e1_0_651:notes" presentation:style-name="pr66" draw:text-style-name="P2" draw:layer="layout" svg:width="15.239cm" svg:height="11.429cm" svg:x="1.905cm" svg:y="12.065cm" presentation:class="notes" presentation:placeholder="true" presentation:user-transformed="true">
            <draw:text-box/>
          </draw:frame>
        </presentation:notes>
      </draw:page>
      <draw:page draw:name="Git repository" draw:style-name="dp4" draw:master-page-name="CUSTOM_5f_3_5f_2">
        <draw:frame draw:name="Google Shape;376;p62" presentation:style-name="pr57" draw:text-style-name="P4" draw:layer="layout" svg:width="8.548cm" svg:height="0.813cm" svg:x="0.427cm" svg:y="1.31cm" presentation:class="title" presentation:user-transformed="true">
          <draw:text-box>
            <text:p text:style-name="P3"><text:span text:style-name="T6">Git repository</text:span></text:p>
          </draw:text-box>
        </draw:frame>
        <draw:frame draw:name="Google Shape;377;p62" presentation:style-name="pr58" draw:text-style-name="P7" draw:layer="layout" svg:width="8.548cm" svg:height="4.346cm" svg:x="0.427cm" svg:y="2.173cm" presentation:class="subtitle" presentation:user-transformed="true">
          <draw:text-box>
            <text:p text:style-name="P3"><text:span text:style-name="T8">If the platform offers bootstrapping of a new service, it is common to also provide an initial example application and deployment.</text:span></text:p>
            <text:p text:style-name="P9"><text:span text:style-name="T8">This action can be done imperatively, simply creating the repository and handing it over to the user, or it can be done declaratively where the platform maintains awareness and even control over certain configurations which provides ongoing support.</text:span></text:p>
          </draw:text-box>
        </draw:frame>
        <presentation:notes draw:style-name="dp2">
          <draw:page-thumbnail draw:name="Google Shape;373;g2af853010e1_0_671:notes" draw:style-name="gr4" draw:layer="layout" svg:width="13.112cm" svg:height="9.524cm" svg:x="2.969cm" svg:y="1.905cm" draw:page-number="53" presentation:class="page"/>
          <draw:frame draw:name="Google Shape;374;g2af853010e1_0_671:notes" presentation:style-name="pr67" draw:text-style-name="P2" draw:layer="layout" svg:width="15.239cm" svg:height="11.429cm" svg:x="1.905cm" svg:y="12.065cm" presentation:class="notes" presentation:placeholder="true" presentation:user-transformed="true">
            <draw:text-box/>
          </draw:frame>
        </presentation:notes>
      </draw:page>
      <draw:page draw:name="Identity &amp; Access" draw:style-name="dp4" draw:master-page-name="CUSTOM_5f_3_5f_2">
        <draw:frame draw:name="Google Shape;382;p63" presentation:style-name="pr57" draw:text-style-name="P4" draw:layer="layout" svg:width="8.548cm" svg:height="0.813cm" svg:x="0.427cm" svg:y="1.31cm" presentation:class="title" presentation:user-transformed="true">
          <draw:text-box>
            <text:p text:style-name="P3"><text:span text:style-name="T6">Identity &amp; Access</text:span></text:p>
          </draw:text-box>
        </draw:frame>
        <draw:frame draw:name="Google Shape;383;p63" presentation:style-name="pr58" draw:text-style-name="P7" draw:layer="layout" svg:width="8.548cm" svg:height="4.346cm" svg:x="0.427cm" svg:y="2.173cm" presentation:class="subtitle" presentation:user-transformed="true">
          <draw:text-box>
            <text:p text:style-name="P3"><text:span text:style-name="T8">IAM (aka Authz) is a set of rules and permissions that ensure the right people have access to the right resources, and only those resources.</text:span></text:p>
            <text:p text:style-name="P9"><text:span text:style-name="T8">Some rules may apply across a number of users and others may be more specific. For example, requiring 2-factor authentication for all users but accessing a specific instance may be limited to the requesting user.</text:span></text:p>
          </draw:text-box>
        </draw:frame>
        <presentation:notes draw:style-name="dp2">
          <draw:page-thumbnail draw:name="Google Shape;379;g2af853010e1_0_205:notes" draw:style-name="gr4" draw:layer="layout" svg:width="13.112cm" svg:height="9.524cm" svg:x="2.969cm" svg:y="1.905cm" draw:page-number="54" presentation:class="page"/>
          <draw:frame draw:name="Google Shape;380;g2af853010e1_0_205:notes" presentation:style-name="pr68" draw:text-style-name="P2" draw:layer="layout" svg:width="15.239cm" svg:height="11.429cm" svg:x="1.905cm" svg:y="12.065cm" presentation:class="notes" presentation:placeholder="true" presentation:user-transformed="true">
            <draw:text-box/>
          </draw:frame>
        </presentation:notes>
      </draw:page>
      <draw:page draw:name="Existing resources" draw:style-name="dp4" draw:master-page-name="CUSTOM_5f_3_5f_2">
        <draw:frame draw:name="Google Shape;388;p64" presentation:style-name="pr57" draw:text-style-name="P4" draw:layer="layout" svg:width="8.548cm" svg:height="0.813cm" svg:x="0.427cm" svg:y="1.31cm" presentation:class="title" presentation:user-transformed="true">
          <draw:text-box>
            <text:p text:style-name="P3"><text:span text:style-name="T6">Existing resources</text:span></text:p>
          </draw:text-box>
        </draw:frame>
        <draw:frame draw:name="Google Shape;389;p64" presentation:style-name="pr58" draw:text-style-name="P7" draw:layer="layout" svg:width="8.548cm" svg:height="4.346cm" svg:x="0.427cm" svg:y="2.173cm" presentation:class="subtitle" presentation:user-transformed="true">
          <draw:text-box>
            <text:p text:style-name="P3"><text:span text:style-name="T8">Some resources share a lifecycle with a number of dependencies. For example, an application may always be provisioned and decommissioned along with its database.</text:span></text:p>
            <text:p text:style-name="P9"><text:span text:style-name="T8">In this case the platform may choose to accept a single request for an application and manage database only in relation to that application.</text:span></text:p>
          </draw:text-box>
        </draw:frame>
        <presentation:notes draw:style-name="dp2">
          <draw:page-thumbnail draw:name="Google Shape;385;g2af853010e1_0_757:notes" draw:style-name="gr4" draw:layer="layout" svg:width="13.112cm" svg:height="9.524cm" svg:x="2.969cm" svg:y="1.905cm" draw:page-number="55" presentation:class="page"/>
          <draw:frame draw:name="Google Shape;386;g2af853010e1_0_757:notes" presentation:style-name="pr69" draw:text-style-name="P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gtree" svg:font-family="Figtree"/>
    <style:font-face style:name="Figtree Medium" svg:font-family="'Figtree Medium'"/>
    <style:font-face style:name="Figtree SemiBold" svg:font-family="'Figtree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4B0000004B0AEBDA0E45697A13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5-background" style:display-name="CUSTOM_5-background" style:family="presentation">
      <style:graphic-properties draw:stroke="none" draw:fill="solid" draw:fill-color="#ffffff"/>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background" style:display-name="CUSTOM_4_1_1_1_1_1-background" style:family="presentation">
      <style:graphic-properties draw:stroke="none" draw:fill="bitmap" draw:fill-image-name="msFillBitmap_20_1" style:repeat="stretch"/>
      <style:text-properties style:letter-kerning="true"/>
    </style:style>
    <style:style style:name="CUSTOM_5f_4_5f_1_5f_1_5f_1_5f_1_5f_1-backgroundobjects" style:display-name="CUSTOM_4_1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_5f_1_5f_1-notes" style:display-name="CUSTOM_4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_5f_1_5f_1-outline1" style:display-name="CUSTOM_4_1_1_1_1_1-outline1" style:family="presentation">
      <style:graphic-properties draw:stroke="none" draw:fill="none" draw:auto-grow-height="false" draw:fit-to-size="shrink-to-fit" style:shrink-to-fit="true">
        <text:list-style style:name="CUSTOM_5f_4_5f_1_5f_1_5f_1_5f_1_5f_1-outline1" style:display-name="CUSTOM_4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outline2" style:display-name="CUSTOM_4_1_1_1_1_1-outline2" style:family="presentation" style:parent-style-name="CUSTOM_5f_4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3" style:display-name="CUSTOM_4_1_1_1_1_1-outline3" style:family="presentation" style:parent-style-name="CUSTOM_5f_4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4" style:display-name="CUSTOM_4_1_1_1_1_1-outline4" style:family="presentation" style:parent-style-name="CUSTOM_5f_4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5" style:display-name="CUSTOM_4_1_1_1_1_1-outline5" style:family="presentation" style:parent-style-name="CUSTOM_5f_4_5f_1_5f_1_5f_1_5f_1_5f_1-outline4">
      <style:paragraph-properties fo:margin-top="0.1cm" fo:margin-bottom="0cm"/>
      <style:text-properties fo:font-size="20pt" style:font-size-asian="20pt" style:font-size-complex="20pt"/>
    </style:style>
    <style:style style:name="CUSTOM_5f_4_5f_1_5f_1_5f_1_5f_1_5f_1-outline6" style:display-name="CUSTOM_4_1_1_1_1_1-outline6" style:family="presentation" style:parent-style-name="CUSTOM_5f_4_5f_1_5f_1_5f_1_5f_1_5f_1-outline5">
      <style:paragraph-properties fo:margin-top="0.1cm" fo:margin-bottom="0cm"/>
      <style:text-properties fo:font-size="20pt" style:font-size-asian="20pt" style:font-size-complex="20pt"/>
    </style:style>
    <style:style style:name="CUSTOM_5f_4_5f_1_5f_1_5f_1_5f_1_5f_1-outline7" style:display-name="CUSTOM_4_1_1_1_1_1-outline7" style:family="presentation" style:parent-style-name="CUSTOM_5f_4_5f_1_5f_1_5f_1_5f_1_5f_1-outline6">
      <style:paragraph-properties fo:margin-top="0.1cm" fo:margin-bottom="0cm"/>
      <style:text-properties fo:font-size="20pt" style:font-size-asian="20pt" style:font-size-complex="20pt"/>
    </style:style>
    <style:style style:name="CUSTOM_5f_4_5f_1_5f_1_5f_1_5f_1_5f_1-outline8" style:display-name="CUSTOM_4_1_1_1_1_1-outline8" style:family="presentation" style:parent-style-name="CUSTOM_5f_4_5f_1_5f_1_5f_1_5f_1_5f_1-outline7">
      <style:paragraph-properties fo:margin-top="0.1cm" fo:margin-bottom="0cm"/>
      <style:text-properties fo:font-size="20pt" style:font-size-asian="20pt" style:font-size-complex="20pt"/>
    </style:style>
    <style:style style:name="CUSTOM_5f_4_5f_1_5f_1_5f_1_5f_1_5f_1-outline9" style:display-name="CUSTOM_4_1_1_1_1_1-outline9" style:family="presentation" style:parent-style-name="CUSTOM_5f_4_5f_1_5f_1_5f_1_5f_1_5f_1-outline8">
      <style:paragraph-properties fo:margin-top="0.1cm" fo:margin-bottom="0cm"/>
      <style:text-properties fo:font-size="20pt" style:font-size-asian="20pt" style:font-size-complex="20pt"/>
    </style:style>
    <style:style style:name="CUSTOM_5f_4_5f_1_5f_1_5f_1_5f_1_5f_1-subtitle" style:display-name="CUSTOM_4_1_1_1_1_1-subtitle" style:family="presentation">
      <style:graphic-properties draw:stroke="none" draw:fill="none" draw:textarea-vertical-align="middle">
        <text:list-style style:name="CUSTOM_5f_4_5f_1_5f_1_5f_1_5f_1_5f_1-subtitle" style:display-name="CUSTOM_4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_5f_1_5f_1-title" style:display-name="CUSTOM_4_1_1_1_1_1-title" style:family="presentation">
      <style:graphic-properties draw:stroke="none" draw:fill="none" draw:textarea-vertical-align="middle">
        <text:list-style style:name="CUSTOM_5f_4_5f_1_5f_1_5f_1_5f_1_5f_1-title" style:display-name="CUSTOM_4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_5f_1-background" style:display-name="CUSTOM_4_1_1_1_1_1_1-background" style:family="presentation">
      <style:graphic-properties draw:stroke="none" draw:fill="solid" draw:fill-color="#ffffff"/>
      <style:text-properties style:letter-kerning="true"/>
    </style:style>
    <style:style style:name="CUSTOM_5f_4_5f_1_5f_1_5f_1_5f_1_5f_1_5f_1-backgroundobjects" style:display-name="CUSTOM_4_1_1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_5f_1_5f_1_5f_1-notes" style:display-name="CUSTOM_4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_5f_1_5f_1_5f_1-outline1" style:display-name="CUSTOM_4_1_1_1_1_1_1-outline1" style:family="presentation">
      <style:graphic-properties draw:stroke="none" draw:fill="none" draw:auto-grow-height="false" draw:fit-to-size="shrink-to-fit" style:shrink-to-fit="true">
        <text:list-style style:name="CUSTOM_5f_4_5f_1_5f_1_5f_1_5f_1_5f_1_5f_1-outline1" style:display-name="CUSTOM_4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_5f_1-outline2" style:display-name="CUSTOM_4_1_1_1_1_1_1-outline2" style:family="presentation" style:parent-style-name="CUSTOM_5f_4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3" style:display-name="CUSTOM_4_1_1_1_1_1_1-outline3" style:family="presentation" style:parent-style-name="CUSTOM_5f_4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4" style:display-name="CUSTOM_4_1_1_1_1_1_1-outline4" style:family="presentation" style:parent-style-name="CUSTOM_5f_4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5" style:display-name="CUSTOM_4_1_1_1_1_1_1-outline5" style:family="presentation" style:parent-style-name="CUSTOM_5f_4_5f_1_5f_1_5f_1_5f_1_5f_1_5f_1-outline4">
      <style:paragraph-properties fo:margin-top="0.1cm" fo:margin-bottom="0cm"/>
      <style:text-properties fo:font-size="20pt" style:font-size-asian="20pt" style:font-size-complex="20pt"/>
    </style:style>
    <style:style style:name="CUSTOM_5f_4_5f_1_5f_1_5f_1_5f_1_5f_1_5f_1-outline6" style:display-name="CUSTOM_4_1_1_1_1_1_1-outline6" style:family="presentation" style:parent-style-name="CUSTOM_5f_4_5f_1_5f_1_5f_1_5f_1_5f_1_5f_1-outline5">
      <style:paragraph-properties fo:margin-top="0.1cm" fo:margin-bottom="0cm"/>
      <style:text-properties fo:font-size="20pt" style:font-size-asian="20pt" style:font-size-complex="20pt"/>
    </style:style>
    <style:style style:name="CUSTOM_5f_4_5f_1_5f_1_5f_1_5f_1_5f_1_5f_1-outline7" style:display-name="CUSTOM_4_1_1_1_1_1_1-outline7" style:family="presentation" style:parent-style-name="CUSTOM_5f_4_5f_1_5f_1_5f_1_5f_1_5f_1_5f_1-outline6">
      <style:paragraph-properties fo:margin-top="0.1cm" fo:margin-bottom="0cm"/>
      <style:text-properties fo:font-size="20pt" style:font-size-asian="20pt" style:font-size-complex="20pt"/>
    </style:style>
    <style:style style:name="CUSTOM_5f_4_5f_1_5f_1_5f_1_5f_1_5f_1_5f_1-outline8" style:display-name="CUSTOM_4_1_1_1_1_1_1-outline8" style:family="presentation" style:parent-style-name="CUSTOM_5f_4_5f_1_5f_1_5f_1_5f_1_5f_1_5f_1-outline7">
      <style:paragraph-properties fo:margin-top="0.1cm" fo:margin-bottom="0cm"/>
      <style:text-properties fo:font-size="20pt" style:font-size-asian="20pt" style:font-size-complex="20pt"/>
    </style:style>
    <style:style style:name="CUSTOM_5f_4_5f_1_5f_1_5f_1_5f_1_5f_1_5f_1-outline9" style:display-name="CUSTOM_4_1_1_1_1_1_1-outline9" style:family="presentation" style:parent-style-name="CUSTOM_5f_4_5f_1_5f_1_5f_1_5f_1_5f_1_5f_1-outline8">
      <style:paragraph-properties fo:margin-top="0.1cm" fo:margin-bottom="0cm"/>
      <style:text-properties fo:font-size="20pt" style:font-size-asian="20pt" style:font-size-complex="20pt"/>
    </style:style>
    <style:style style:name="CUSTOM_5f_4_5f_1_5f_1_5f_1_5f_1_5f_1_5f_1-subtitle" style:display-name="CUSTOM_4_1_1_1_1_1_1-subtitle" style:family="presentation">
      <style:graphic-properties draw:stroke="none" draw:fill="none" draw:textarea-vertical-align="middle">
        <text:list-style style:name="CUSTOM_5f_4_5f_1_5f_1_5f_1_5f_1_5f_1_5f_1-subtitle" style:display-name="CUSTOM_4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_5f_1_5f_1_5f_1-title" style:display-name="CUSTOM_4_1_1_1_1_1_1-title" style:family="presentation">
      <style:graphic-properties draw:stroke="none" draw:fill="none" draw:textarea-vertical-align="middle">
        <text:list-style style:name="CUSTOM_5f_4_5f_1_5f_1_5f_1_5f_1_5f_1_5f_1-title" style:display-name="CUSTOM_4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fffff"/>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shrink-to-fit" style:shrink-to-fit="true">
        <text:list-style style:name="CUSTOM_5f_3_5f_1-outline1" style:display-name="CUSTOM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2-background" style:display-name="CUSTOM_3_2-background" style:family="presentation">
      <style:graphic-properties draw:stroke="none" draw:fill="solid" draw:fill-color="#ffffff"/>
      <style:text-properties style:letter-kerning="true"/>
    </style:style>
    <style:style style:name="CUSTOM_5f_3_5f_2-backgroundobjects" style:display-name="CUSTOM_3_2-backgroundobjects" style:family="presentation">
      <style:graphic-properties draw:textarea-horizontal-align="justify" draw:shadow="hidden" draw:shadow-offset-x="0.2cm" draw:shadow-offset-y="0.2cm" draw:shadow-color="#808080"/>
      <style:text-properties style:letter-kerning="true"/>
    </style:style>
    <style:style style:name="CUSTOM_5f_3_5f_2-notes" style:display-name="CUSTOM_3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2-outline1" style:display-name="CUSTOM_3_2-outline1" style:family="presentation">
      <style:graphic-properties draw:stroke="none" draw:fill="none" draw:auto-grow-height="false" draw:fit-to-size="shrink-to-fit" style:shrink-to-fit="true">
        <text:list-style style:name="CUSTOM_5f_3_5f_2-outline1" style:display-name="CUSTOM_3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2-outline2" style:display-name="CUSTOM_3_2-outline2" style:family="presentation" style:parent-style-name="CUSTOM_5f_3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3" style:display-name="CUSTOM_3_2-outline3" style:family="presentation" style:parent-style-name="CUSTOM_5f_3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4" style:display-name="CUSTOM_3_2-outline4" style:family="presentation" style:parent-style-name="CUSTOM_5f_3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5" style:display-name="CUSTOM_3_2-outline5" style:family="presentation" style:parent-style-name="CUSTOM_5f_3_5f_2-outline4">
      <style:paragraph-properties fo:margin-top="0.1cm" fo:margin-bottom="0cm"/>
      <style:text-properties fo:font-size="20pt" style:font-size-asian="20pt" style:font-size-complex="20pt"/>
    </style:style>
    <style:style style:name="CUSTOM_5f_3_5f_2-outline6" style:display-name="CUSTOM_3_2-outline6" style:family="presentation" style:parent-style-name="CUSTOM_5f_3_5f_2-outline5">
      <style:paragraph-properties fo:margin-top="0.1cm" fo:margin-bottom="0cm"/>
      <style:text-properties fo:font-size="20pt" style:font-size-asian="20pt" style:font-size-complex="20pt"/>
    </style:style>
    <style:style style:name="CUSTOM_5f_3_5f_2-outline7" style:display-name="CUSTOM_3_2-outline7" style:family="presentation" style:parent-style-name="CUSTOM_5f_3_5f_2-outline6">
      <style:paragraph-properties fo:margin-top="0.1cm" fo:margin-bottom="0cm"/>
      <style:text-properties fo:font-size="20pt" style:font-size-asian="20pt" style:font-size-complex="20pt"/>
    </style:style>
    <style:style style:name="CUSTOM_5f_3_5f_2-outline8" style:display-name="CUSTOM_3_2-outline8" style:family="presentation" style:parent-style-name="CUSTOM_5f_3_5f_2-outline7">
      <style:paragraph-properties fo:margin-top="0.1cm" fo:margin-bottom="0cm"/>
      <style:text-properties fo:font-size="20pt" style:font-size-asian="20pt" style:font-size-complex="20pt"/>
    </style:style>
    <style:style style:name="CUSTOM_5f_3_5f_2-outline9" style:display-name="CUSTOM_3_2-outline9" style:family="presentation" style:parent-style-name="CUSTOM_5f_3_5f_2-outline8">
      <style:paragraph-properties fo:margin-top="0.1cm" fo:margin-bottom="0cm"/>
      <style:text-properties fo:font-size="20pt" style:font-size-asian="20pt" style:font-size-complex="20pt"/>
    </style:style>
    <style:style style:name="CUSTOM_5f_3_5f_2-subtitle" style:display-name="CUSTOM_3_2-subtitle" style:family="presentation">
      <style:graphic-properties draw:stroke="none" draw:fill="none" draw:textarea-vertical-align="middle">
        <text:list-style style:name="CUSTOM_5f_3_5f_2-subtitle" style:display-name="CUSTOM_3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2-title" style:display-name="CUSTOM_3_2-title" style:family="presentation">
      <style:graphic-properties draw:stroke="none" draw:fill="none" draw:textarea-vertical-align="middle">
        <text:list-style style:name="CUSTOM_5f_3_5f_2-title" style:display-name="CUSTOM_3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5cm" fo:page-height="6.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30d6b" draw:textarea-vertical-align="middle" draw:auto-grow-height="false" draw:fit-to-size="false" style:shrink-to-fit="false" fo:min-height="0cm" fo:min-width="0cm" fo:padding-top="0.263cm" fo:padding-bottom="0.263cm" fo:padding-left="0.263cm" fo:padding-right="0.263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63cm" fo:padding-bottom="0.263cm" fo:padding-left="0.263cm" fo:padding-right="0.263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0.528cm, 0.962cm, 0.606cm)" draw:image-opacity="100%" style:mirror="none"/>
    </style:style>
    <style:style style:name="Mgr6" style:family="graphic" style:parent-style-name="standard">
      <style:graphic-properties draw:stroke="none" svg:stroke-width="0cm" draw:fill="solid" draw:fill-color="#595959" draw:textarea-vertical-align="middle" draw:auto-grow-height="false" draw:fit-to-size="false" style:shrink-to-fit="false" fo:min-height="0cm" fo:min-width="0cm" fo:padding-top="0.263cm" fo:padding-bottom="0.263cm" fo:padding-left="0.263cm" fo:padding-right="0.263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7f6000" draw:textarea-vertical-align="middle" draw:auto-grow-height="false" draw:fit-to-size="false" style:shrink-to-fit="false" fo:min-height="0cm" fo:min-width="0cm" fo:padding-top="0.263cm" fo:padding-bottom="0.263cm" fo:padding-left="0.263cm" fo:padding-right="0.263cm" fo:wrap-option="wrap"/>
    </style:style>
    <style:style style:name="Mgr9" style:family="graphic" style:parent-style-name="standard">
      <style:graphic-properties draw:stroke="none" svg:stroke-width="0cm" draw:fill="solid" draw:fill-color="#218832" draw:textarea-vertical-align="middle" draw:auto-grow-height="false" draw:fit-to-size="false" style:shrink-to-fit="false" fo:min-height="0cm" fo:min-width="0cm" fo:padding-top="0.263cm" fo:padding-bottom="0.263cm" fo:padding-left="0.263cm" fo:padding-right="0.263cm" fo:wrap-option="wrap"/>
    </style:style>
    <style:style style:name="Mgr10" style:family="graphic" style:parent-style-name="standard">
      <style:graphic-properties draw:stroke="none" svg:stroke-width="0cm" draw:fill="solid" draw:fill-color="#4477aa" draw:textarea-vertical-align="middle" draw:auto-grow-height="false" draw:fit-to-size="false" style:shrink-to-fit="false" fo:min-height="0cm" fo:min-width="0cm" fo:padding-top="0.263cm" fo:padding-bottom="0.263cm" fo:padding-left="0.263cm" fo:padding-right="0.263cm" fo:wrap-option="wrap"/>
    </style:style>
    <style:style style:name="Mgr11" style:family="graphic" style:parent-style-name="standard">
      <style:graphic-properties draw:stroke="none" svg:stroke-width="0cm" draw:fill="solid" draw:fill-color="#ee6677" draw:textarea-vertical-align="middle" draw:auto-grow-height="false" draw:fit-to-size="false" style:shrink-to-fit="false" fo:min-height="0cm" fo:min-width="0cm" fo:padding-top="0.263cm" fo:padding-bottom="0.263cm" fo:padding-left="0.263cm" fo:padding-right="0.263cm" fo:wrap-option="wrap"/>
    </style:style>
    <style:style style:name="Mgr12" style:family="graphic" style:parent-style-name="standard">
      <style:graphic-properties draw:stroke="none" svg:stroke-width="0cm" draw:fill="solid" draw:fill-color="#a93377" draw:textarea-vertical-align="middle" draw:auto-grow-height="false" draw:fit-to-size="false" style:shrink-to-fit="false" fo:min-height="0cm" fo:min-width="0cm" fo:padding-top="0.263cm" fo:padding-bottom="0.263cm" fo:padding-left="0.263cm" fo:padding-right="0.263cm" fo:wrap-option="wrap"/>
    </style:style>
    <style:style style:name="Mpr1" style:family="presentation" style:parent-style-name="CUSTOM_5f_5-backgroundobjects">
      <style:graphic-properties draw:stroke="none" draw:fill="none" draw:fill-color="#ffffff" draw:auto-grow-height="false" fo:min-height="1.485cm"/>
    </style:style>
    <style:style style:name="Mpr2" style:family="presentation" style:parent-style-name="CUSTOM_5f_5-backgroundobjects">
      <style:graphic-properties draw:stroke="none" draw:fill="none" draw:fill-color="#ffffff" draw:textarea-vertical-align="bottom" draw:auto-grow-height="false" fo:min-height="1.485cm"/>
    </style:style>
    <style:style style:name="Mpr3" style:family="presentation" style:parent-style-name="CUSTOM-backgroundobjects">
      <style:graphic-properties draw:stroke="none" draw:fill="none" draw:fill-color="#ffffff" draw:auto-grow-height="false" fo:min-height="1.27cm"/>
    </style:style>
    <style:style style:name="Mpr4" style:family="presentation" style:parent-style-name="CUSTOM-backgroundobjects">
      <style:graphic-properties draw:stroke="none" draw:fill="none" draw:fill-color="#ffffff" draw:textarea-vertical-align="bottom" draw:auto-grow-height="false" fo:min-height="1.27cm"/>
    </style:style>
    <style:style style:name="Mpr5" style:family="presentation" style:parent-style-name="CUSTOM_5f_4_5f_1_5f_1_5f_1_5f_1_5f_1-backgroundobjects">
      <style:graphic-properties draw:stroke="none" draw:fill="none" draw:fill-color="#ffffff" draw:auto-grow-height="false" fo:min-height="1.27cm"/>
    </style:style>
    <style:style style:name="Mpr6" style:family="presentation" style:parent-style-name="CUSTOM_5f_4_5f_1_5f_1_5f_1_5f_1_5f_1-backgroundobjects">
      <style:graphic-properties draw:stroke="none" draw:fill="none" draw:fill-color="#ffffff" draw:textarea-vertical-align="bottom" draw:auto-grow-height="false" fo:min-height="1.27cm"/>
    </style:style>
    <style:style style:name="Mpr7" style:family="presentation" style:parent-style-name="CUSTOM_5f_3-backgroundobjects">
      <style:graphic-properties draw:stroke="none" draw:fill="none" draw:fill-color="#ffffff" draw:auto-grow-height="false" fo:min-height="1.27cm"/>
    </style:style>
    <style:style style:name="Mpr8" style:family="presentation" style:parent-style-name="CUSTOM_5f_3-backgroundobjects">
      <style:graphic-properties draw:stroke="none" draw:fill="none" draw:fill-color="#ffffff" draw:textarea-vertical-align="bottom" draw:auto-grow-height="false" fo:min-height="1.27cm"/>
    </style:style>
    <style:style style:name="Mpr9" style:family="presentation" style:parent-style-name="CUSTOM_5f_4_5f_1_5f_1_5f_1_5f_1_5f_1_5f_1-backgroundobjects">
      <style:graphic-properties draw:stroke="none" draw:fill="none" draw:fill-color="#ffffff" draw:auto-grow-height="false" fo:min-height="1.27cm"/>
    </style:style>
    <style:style style:name="Mpr10" style:family="presentation" style:parent-style-name="CUSTOM_5f_4_5f_1_5f_1_5f_1_5f_1_5f_1_5f_1-backgroundobjects">
      <style:graphic-properties draw:stroke="none" draw:fill="none" draw:fill-color="#ffffff" draw:textarea-vertical-align="bottom" draw:auto-grow-height="false" fo:min-height="1.27cm"/>
    </style:style>
    <style:style style:name="Mpr11" style:family="presentation" style:parent-style-name="CUSTOM_5f_2-backgroundobjects">
      <style:graphic-properties draw:stroke="none" draw:fill="none" draw:fill-color="#ffffff" draw:auto-grow-height="false" fo:min-height="1.27cm"/>
    </style:style>
    <style:style style:name="Mpr12" style:family="presentation" style:parent-style-name="CUSTOM_5f_2-backgroundobjects">
      <style:graphic-properties draw:stroke="none" draw:fill="none" draw:fill-color="#ffffff" draw:textarea-vertical-align="bottom" draw:auto-grow-height="false" fo:min-height="1.27cm"/>
    </style:style>
    <style:style style:name="Mpr13" style:family="presentation" style:parent-style-name="CUSTOM_5f_3_5f_1-backgroundobjects">
      <style:graphic-properties draw:stroke="none" draw:fill="none" draw:fill-color="#ffffff" draw:auto-grow-height="false" fo:min-height="1.27cm"/>
    </style:style>
    <style:style style:name="Mpr14" style:family="presentation" style:parent-style-name="CUSTOM_5f_3_5f_1-backgroundobjects">
      <style:graphic-properties draw:stroke="none" draw:fill="none" draw:fill-color="#ffffff" draw:textarea-vertical-align="bottom" draw:auto-grow-height="false" fo:min-height="1.27cm"/>
    </style:style>
    <style:style style:name="Mpr15" style:family="presentation" style:parent-style-name="CUSTOM_5f_3_5f_2-backgroundobjects">
      <style:graphic-properties draw:stroke="none" draw:fill="none" draw:fill-color="#ffffff" draw:auto-grow-height="false" fo:min-height="1.27cm"/>
    </style:style>
    <style:style style:name="Mpr16" style:family="presentation" style:parent-style-name="CUSTOM_5f_3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30d6b"/>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595959"/>
      <style:paragraph-properties fo:text-align="start" style:font-independent-line-spacing="true"/>
      <style:text-properties fo:font-size="14pt"/>
    </style:style>
    <style:style style:name="MP10" style:family="paragraph">
      <loext:graphic-properties draw:fill="solid" draw:fill-color="#7f6000"/>
      <style:paragraph-properties fo:text-align="start" style:font-independent-line-spacing="true"/>
      <style:text-properties fo:font-size="14pt"/>
    </style:style>
    <style:style style:name="MP11" style:family="paragraph">
      <loext:graphic-properties draw:fill="solid" draw:fill-color="#218832"/>
      <style:paragraph-properties fo:text-align="start" style:font-independent-line-spacing="true"/>
      <style:text-properties fo:font-size="14pt"/>
    </style:style>
    <style:style style:name="MP12" style:family="paragraph">
      <loext:graphic-properties draw:fill="solid" draw:fill-color="#4477aa"/>
      <style:paragraph-properties fo:text-align="start" style:font-independent-line-spacing="true"/>
      <style:text-properties fo:font-size="14pt"/>
    </style:style>
    <style:style style:name="MP13" style:family="paragraph">
      <loext:graphic-properties draw:fill="solid" draw:fill-color="#ee6677"/>
      <style:paragraph-properties fo:text-align="start" style:font-independent-line-spacing="true"/>
      <style:text-properties fo:font-size="14pt"/>
    </style:style>
    <style:style style:name="MP14" style:family="paragraph">
      <loext:graphic-properties draw:fill="solid" draw:fill-color="#a93377"/>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Figtree SemiBold" fo:font-size="17pt" fo:letter-spacing="normal" fo:font-style="normal" style:text-underline-style="none" fo:font-weight="normal" style:font-name-asian="Figtree SemiBold" style:font-size-asian="17pt" style:font-style-asian="normal" style:font-weight-asian="normal" style:font-name-complex="Figtree SemiBold"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5f_5" style:display-name="CUSTOM_5" style:page-layout-name="PM1" draw:style-name="Mdp1">
      <draw:frame presentation:style-name="CUSTOM_5f_5-title" draw:layer="backgroundobjects" svg:width="8.549cm" svg:height="1.151cm" svg:x="0.475cm" svg:y="0.275cm" presentation:class="title" presentation:placeholder="true">
        <draw:text-box/>
      </draw:frame>
      <draw:frame presentation:style-name="CUSTOM_5f_5-outline1" draw:layer="backgroundobjects" svg:width="8.549cm" svg:height="4cm" svg:x="0.475cm" svg:y="1.614cm" presentation:class="outline" presentation:placeholder="true">
        <draw:text-box/>
      </draw:frame>
      <presentation:notes style:page-layout-name="PM2">
        <draw:page-thumbnail presentation:style-name="CUSTOM_5f_5-title" draw:layer="backgroundobjects" svg:width="19.798cm" svg:height="11.136cm" svg:x="0.6cm" svg:y="2.257cm" presentation:class="page"/>
        <draw:frame presentation:style-name="CUSTOM_5f_5-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draw:custom-shape draw:name="Google Shape;8;p2" draw:style-name="Mgr3" draw:text-style-name="MP5"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2" draw:style-name="Mgr4" draw:text-style-name="MP7" draw:layer="backgroundobjects" svg:width="5.342cm" svg:height="0.542cm" svg:x="3.744cm" svg:y="0.639cm">
        <text:p text:style-name="MP6"><text:span text:style-name="MT1">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p2" draw:style-name="Mgr5" draw:text-style-name="MP8" draw:layer="backgroundobjects" svg:width="0.8cm" svg:height="0.814cm" svg:x="0.426cm" svg:y="0.503cm">
        <draw:image xlink:href="Pictures/100002010000080000000097D4B01496EFDA0F2E.png" xlink:type="simple" xlink:show="embed" xlink:actuate="onLoad">
          <text:p/>
        </draw:image>
      </draw:frame>
      <draw:frame draw:name="Google Shape;11;p2" presentation:style-name="CUSTOM-title" draw:layer="backgroundobjects" svg:width="8.548cm" svg:height="0.813cm" svg:x="0.427cm" svg:y="1.31cm" presentation:class="title" presentation:placeholder="true" presentation:user-transformed="true">
        <draw:text-box/>
      </draw:frame>
      <draw:frame presentation:style-name="CUSTOM-outline1" draw:layer="backgroundobjects" svg:width="8.549cm" svg:height="4cm" svg:x="0.475cm" svg:y="1.614cm" presentation:class="outline" presentation:placeholder="true">
        <draw:text-box/>
      </draw:frame>
      <presentation:notes style:page-layout-name="PM2">
        <draw:page-thumbnail presentation:style-name="CUSTOM-title" draw:layer="backgroundobjects" svg:width="13.113cm" svg:height="9.524cm" svg:x="2.968cm" svg:y="1.93cm" presentation:class="page"/>
        <draw:frame presentation:style-name="CUSTOM-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_5f_1_5f_1_5f_1_5f_1" style:display-name="CUSTOM_4_1_1_1_1_1" style:page-layout-name="PM1" draw:style-name="Mdp2">
      <draw:custom-shape draw:name="Google Shape;14;p3" draw:style-name="Mgr6" draw:text-style-name="MP9"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draw:style-name="Mgr7" draw:text-style-name="MP8" draw:layer="backgroundobjects" svg:width="0.841cm" svg:height="0.841cm" svg:x="0.399cm" svg:y="0.42cm">
        <draw:image xlink:href="Pictures/10000201000004B0000004B0AEBDA0E45697A13B.png" xlink:type="simple" xlink:show="embed" xlink:actuate="onLoad">
          <text:p/>
        </draw:image>
      </draw:frame>
      <draw:frame draw:name="Google Shape;16;p3" presentation:style-name="CUSTOM_5f_4_5f_1_5f_1_5f_1_5f_1_5f_1-title" draw:layer="backgroundobjects" svg:width="8.548cm" svg:height="0.813cm" svg:x="0.427cm" svg:y="1.31cm" presentation:class="title" presentation:placeholder="true" presentation:user-transformed="true">
        <draw:text-box/>
      </draw:frame>
      <draw:custom-shape draw:name="Google Shape;18;p3" draw:style-name="Mgr4" draw:text-style-name="MP7" draw:layer="backgroundobjects" svg:width="5.342cm" svg:height="0.542cm" svg:x="3.744cm" svg:y="0.639cm">
        <text:p text:style-name="MP6"><text:span text:style-name="MT1">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_5f_1_5f_1_5f_1_5f_1-outline1" draw:layer="backgroundobjects" svg:width="8.549cm" svg:height="4cm" svg:x="0.475cm" svg:y="1.614cm" presentation:class="outline" presentation:placeholder="true">
        <draw:text-box/>
      </draw:frame>
      <presentation:notes style:page-layout-name="PM2">
        <draw:page-thumbnail presentation:style-name="CUSTOM_5f_4_5f_1_5f_1_5f_1_5f_1_5f_1-title" draw:layer="backgroundobjects" svg:width="13.113cm" svg:height="9.524cm" svg:x="2.968cm" svg:y="1.93cm" presentation:class="page"/>
        <draw:frame presentation:style-name="CUSTOM_5f_4_5f_1_5f_1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custom-shape draw:name="Google Shape;32;p6" draw:style-name="Mgr8" draw:text-style-name="MP10"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draw:style-name="Mgr7" draw:text-style-name="MP8" draw:layer="backgroundobjects" svg:width="0.771cm" svg:height="0.771cm" svg:x="0.465cm" svg:y="0.548cm">
        <draw:image xlink:href="Pictures/10000201000004B0000004B028E76994B8CE062E.png" xlink:type="simple" xlink:show="embed" xlink:actuate="onLoad">
          <text:p/>
        </draw:image>
      </draw:frame>
      <draw:custom-shape draw:name="Google Shape;34;p6" draw:style-name="Mgr4" draw:text-style-name="MP7" draw:layer="backgroundobjects" svg:width="5.342cm" svg:height="0.542cm" svg:x="3.821cm" svg:y="0.657cm">
        <text:p text:style-name="MP6"><text:span text:style-name="MT1">Dest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p6" presentation:style-name="CUSTOM_5f_3-title" draw:layer="backgroundobjects" svg:width="8.548cm" svg:height="0.813cm" svg:x="0.427cm" svg:y="1.31cm" presentation:class="title" presentation:placeholder="true" presentation:user-transformed="true">
        <draw:text-box/>
      </draw:frame>
      <draw:frame presentation:style-name="CUSTOM_5f_3-outline1" draw:layer="backgroundobjects" svg:width="8.549cm" svg:height="4cm" svg:x="0.475cm" svg:y="1.614cm" presentation:class="outline" presentation:placeholder="true">
        <draw:text-box/>
      </draw:frame>
      <presentation:notes style:page-layout-name="PM2">
        <draw:page-thumbnail presentation:style-name="CUSTOM_5f_3-title" draw:layer="backgroundobjects" svg:width="13.113cm" svg:height="9.524cm" svg:x="2.968cm" svg:y="1.93cm" presentation:class="page"/>
        <draw:frame presentation:style-name="CUSTOM_5f_3-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_5f_1_5f_1_5f_1_5f_1_5f_1" style:display-name="CUSTOM_4_1_1_1_1_1_1" style:page-layout-name="PM1" draw:style-name="Mdp1">
      <draw:custom-shape draw:name="Google Shape;20;p4" draw:style-name="Mgr9" draw:text-style-name="MP11"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CUSTOM_5f_4_5f_1_5f_1_5f_1_5f_1_5f_1_5f_1-title" draw:layer="backgroundobjects" svg:width="8.548cm" svg:height="0.813cm" svg:x="0.427cm" svg:y="1.31cm" presentation:class="title" presentation:placeholder="true" presentation:user-transformed="true">
        <draw:text-box/>
      </draw:frame>
      <draw:custom-shape draw:name="Google Shape;23;p4" draw:style-name="Mgr4" draw:text-style-name="MP7" draw:layer="backgroundobjects" svg:width="5.342cm" svg:height="0.542cm" svg:x="3.744cm" svg:y="0.639cm">
        <text:p text:style-name="MP6"><text:span text:style-name="MT1">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4" draw:style-name="Mgr7" draw:text-style-name="MP8" draw:layer="backgroundobjects" svg:width="0.67cm" svg:height="0.67cm" svg:x="0.463cm" svg:y="0.548cm">
        <draw:image xlink:href="Pictures/10000201000004B0000004B03CA94145FE328DA1.png" xlink:type="simple" xlink:show="embed" xlink:actuate="onLoad">
          <text:p/>
        </draw:image>
      </draw:frame>
      <draw:frame presentation:style-name="CUSTOM_5f_4_5f_1_5f_1_5f_1_5f_1_5f_1_5f_1-outline1" draw:layer="backgroundobjects" svg:width="8.549cm" svg:height="4cm" svg:x="0.475cm" svg:y="1.614cm" presentation:class="outline" presentation:placeholder="true">
        <draw:text-box/>
      </draw:frame>
      <presentation:notes style:page-layout-name="PM2">
        <draw:page-thumbnail presentation:style-name="CUSTOM_5f_4_5f_1_5f_1_5f_1_5f_1_5f_1_5f_1-title" draw:layer="backgroundobjects" svg:width="13.113cm" svg:height="9.524cm" svg:x="2.968cm" svg:y="1.93cm" presentation:class="page"/>
        <draw:frame presentation:style-name="CUSTOM_5f_4_5f_1_5f_1_5f_1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custom-shape draw:name="Google Shape;26;p5" draw:style-name="Mgr10" draw:text-style-name="MP12"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5" draw:style-name="Mgr7" draw:text-style-name="MP8" draw:layer="backgroundobjects" svg:width="0.771cm" svg:height="0.771cm" svg:x="0.465cm" svg:y="0.548cm">
        <draw:image xlink:href="Pictures/10000201000004B0000004B0EBE811DF46451FA1.png" xlink:type="simple" xlink:show="embed" xlink:actuate="onLoad">
          <text:p/>
        </draw:image>
      </draw:frame>
      <draw:custom-shape draw:name="Google Shape;28;p5" draw:style-name="Mgr4" draw:text-style-name="MP7" draw:layer="backgroundobjects" svg:width="5.342cm" svg:height="0.542cm" svg:x="3.821cm" svg:y="0.657cm">
        <text:p text:style-name="MP6"><text:span text:style-name="MT1">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p5" presentation:style-name="CUSTOM_5f_2-title" draw:layer="backgroundobjects" svg:width="8.548cm" svg:height="0.813cm" svg:x="0.427cm" svg:y="1.31cm" presentation:class="title" presentation:placeholder="true" presentation:user-transformed="true">
        <draw:text-box/>
      </draw:frame>
      <draw:frame presentation:style-name="CUSTOM_5f_2-outline1" draw:layer="backgroundobjects" svg:width="8.549cm" svg:height="4cm" svg:x="0.475cm" svg:y="1.614cm" presentation:class="outline" presentation:placeholder="true">
        <draw:text-box/>
      </draw:frame>
      <presentation:notes style:page-layout-name="PM2">
        <draw:page-thumbnail presentation:style-name="CUSTOM_5f_2-title" draw:layer="backgroundobjects" svg:width="13.113cm" svg:height="9.524cm" svg:x="2.968cm" svg:y="1.93cm" presentation:class="page"/>
        <draw:frame presentation:style-name="CUSTOM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_5f_1" style:display-name="CUSTOM_3_1" style:page-layout-name="PM1" draw:style-name="Mdp1">
      <draw:custom-shape draw:name="Google Shape;38;p7" draw:style-name="Mgr11" draw:text-style-name="MP13"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p7" draw:style-name="Mgr7" draw:text-style-name="MP8" draw:layer="backgroundobjects" svg:width="0.722cm" svg:height="0.722cm" svg:x="0.465cm" svg:y="0.548cm">
        <draw:image xlink:href="Pictures/10000201000004B0000004B0065A810737EA14E4.png" xlink:type="simple" xlink:show="embed" xlink:actuate="onLoad">
          <text:p/>
        </draw:image>
      </draw:frame>
      <draw:custom-shape draw:name="Google Shape;40;p7" draw:style-name="Mgr4" draw:text-style-name="MP7" draw:layer="backgroundobjects" svg:width="5.342cm" svg:height="0.542cm" svg:x="3.821cm" svg:y="0.657cm">
        <text:p text:style-name="MP6"><text:span text:style-name="MT1">Process 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p7" presentation:style-name="CUSTOM_5f_3_5f_1-title" draw:layer="backgroundobjects" svg:width="8.548cm" svg:height="0.813cm" svg:x="0.427cm" svg:y="1.31cm" presentation:class="title" presentation:placeholder="true" presentation:user-transformed="true">
        <draw:text-box/>
      </draw:frame>
      <draw:frame presentation:style-name="CUSTOM_5f_3_5f_1-outline1" draw:layer="backgroundobjects" svg:width="8.549cm" svg:height="4cm" svg:x="0.475cm" svg:y="1.614cm" presentation:class="outline" presentation:placeholder="true">
        <draw:text-box/>
      </draw:frame>
      <presentation:notes style:page-layout-name="PM2">
        <draw:page-thumbnail presentation:style-name="CUSTOM_5f_3_5f_1-title" draw:layer="backgroundobjects" svg:width="13.113cm" svg:height="9.524cm" svg:x="2.968cm" svg:y="1.93cm" presentation:class="page"/>
        <draw:frame presentation:style-name="CUSTOM_5f_3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_5f_2" style:display-name="CUSTOM_3_2" style:page-layout-name="PM1" draw:style-name="Mdp1">
      <draw:custom-shape draw:name="Google Shape;44;p8" draw:style-name="Mgr12" draw:text-style-name="MP14" draw:layer="backgroundobjects" svg:width="9.499cm" svg:height="1.30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p8" draw:style-name="Mgr7" draw:text-style-name="MP8" draw:layer="backgroundobjects" svg:width="0.67cm" svg:height="0.67cm" svg:x="0.465cm" svg:y="0.548cm">
        <draw:image xlink:href="Pictures/10000201000004B0000004B0A4A906D4213AD285.png" xlink:type="simple" xlink:show="embed" xlink:actuate="onLoad">
          <text:p/>
        </draw:image>
      </draw:frame>
      <draw:custom-shape draw:name="Google Shape;46;p8" draw:style-name="Mgr4" draw:text-style-name="MP7" draw:layer="backgroundobjects" svg:width="6.087cm" svg:height="0.542cm" svg:x="3.088cm" svg:y="0.657cm">
        <text:p text:style-name="MP6"><text:span text:style-name="MT1">Provisioning 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p8" presentation:style-name="CUSTOM_5f_3_5f_2-title" draw:layer="backgroundobjects" svg:width="8.548cm" svg:height="0.813cm" svg:x="0.427cm" svg:y="1.31cm" presentation:class="title" presentation:placeholder="true" presentation:user-transformed="true">
        <draw:text-box/>
      </draw:frame>
      <draw:frame presentation:style-name="CUSTOM_5f_3_5f_2-outline1" draw:layer="backgroundobjects" svg:width="8.549cm" svg:height="4cm" svg:x="0.475cm" svg:y="1.614cm" presentation:class="outline" presentation:placeholder="true">
        <draw:text-box/>
      </draw:frame>
      <presentation:notes style:page-layout-name="PM2">
        <draw:page-thumbnail presentation:style-name="CUSTOM_5f_3_5f_2-title" draw:layer="backgroundobjects" svg:width="13.113cm" svg:height="9.524cm" svg:x="2.968cm" svg:y="1.93cm" presentation:class="page"/>
        <draw:frame presentation:style-name="CUSTOM_5f_3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5"/>
    <meta:generator>LibreOfficeDev/6.0.5.2$Linux_X86_64 LibreOffice_project/</meta:generator>
  </office:meta>
</office:document-meta>
</file>